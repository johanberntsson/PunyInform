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73166a" officeooo:paragraph-rsid="01549835"/>
    </style:style>
    <style:style style:name="P82" style:family="paragraph" style:parent-style-name="Heading_20_6">
      <style:text-properties officeooo:paragraph-rsid="01549835"/>
    </style:style>
    <style:style style:name="P83" style:family="paragraph" style:parent-style-name="Heading_20_2">
      <style:text-properties officeooo:paragraph-rsid="01549835"/>
    </style:style>
    <style:style style:name="P84" style:family="paragraph" style:parent-style-name="Heading_20_2">
      <style:text-properties officeooo:rsid="00aa386a" officeooo:paragraph-rsid="00aa386a"/>
    </style:style>
    <style:style style:name="P85" style:family="paragraph" style:parent-style-name="Heading_20_6">
      <style:text-properties officeooo:rsid="00aa386a" officeooo:paragraph-rsid="00aa386a"/>
    </style:style>
    <style:style style:name="P86" style:family="paragraph" style:parent-style-name="Heading_20_6">
      <style:text-properties officeooo:rsid="00735f64" officeooo:paragraph-rsid="00735f64"/>
    </style:style>
    <style:style style:name="P87" style:family="paragraph" style:parent-style-name="Heading_20_6">
      <style:text-properties officeooo:rsid="00735f64" officeooo:paragraph-rsid="00f81777"/>
    </style:style>
    <style:style style:name="P88" style:family="paragraph" style:parent-style-name="Heading_20_2">
      <style:text-properties officeooo:paragraph-rsid="0096caed"/>
    </style:style>
    <style:style style:name="P89" style:family="paragraph" style:parent-style-name="Heading_20_6">
      <style:text-properties officeooo:paragraph-rsid="0074f586"/>
    </style:style>
    <style:style style:name="P90" style:family="paragraph" style:parent-style-name="Heading_20_2">
      <style:text-properties officeooo:rsid="0114c619" officeooo:paragraph-rsid="0147a2e6"/>
    </style:style>
    <style:style style:name="P91" style:family="paragraph" style:parent-style-name="Heading_20_6">
      <style:text-properties officeooo:rsid="00e15419" officeooo:paragraph-rsid="0147a2e6"/>
    </style:style>
    <style:style style:name="P92" style:family="paragraph" style:parent-style-name="Heading_20_2">
      <style:text-properties officeooo:rsid="00e15419" officeooo:paragraph-rsid="00e15419"/>
    </style:style>
    <style:style style:name="P93" style:family="paragraph" style:parent-style-name="Heading_20_6">
      <style:text-properties officeooo:rsid="00e15419" officeooo:paragraph-rsid="00e15419"/>
    </style:style>
    <style:style style:name="P94" style:family="paragraph" style:parent-style-name="Heading_20_6">
      <style:text-properties officeooo:rsid="0078322f" officeooo:paragraph-rsid="0078322f"/>
    </style:style>
    <style:style style:name="P95" style:family="paragraph" style:parent-style-name="Heading_20_6">
      <style:text-properties officeooo:rsid="00788460" officeooo:paragraph-rsid="00788460"/>
    </style:style>
    <style:style style:name="P96" style:family="paragraph" style:parent-style-name="Heading_20_6">
      <style:text-properties officeooo:paragraph-rsid="01016172"/>
    </style:style>
    <style:style style:name="P97" style:family="paragraph" style:parent-style-name="Heading_20_2">
      <style:text-properties officeooo:paragraph-rsid="01181b3f"/>
    </style:style>
    <style:style style:name="P98" style:family="paragraph" style:parent-style-name="Heading_20_6">
      <style:text-properties officeooo:paragraph-rsid="01181b3f"/>
    </style:style>
    <style:style style:name="P99" style:family="paragraph" style:parent-style-name="Heading_20_6">
      <style:text-properties officeooo:rsid="007a7724" officeooo:paragraph-rsid="007a7724"/>
    </style:style>
    <style:style style:name="P100" style:family="paragraph" style:parent-style-name="Heading_20_6">
      <style:text-properties officeooo:rsid="0081b772" officeooo:paragraph-rsid="0081b772"/>
    </style:style>
    <style:style style:name="P10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02" style:family="paragraph" style:parent-style-name="Heading_20_6">
      <style:text-properties officeooo:rsid="0078322f" officeooo:paragraph-rsid="007d81c5"/>
    </style:style>
    <style:style style:name="P103" style:family="paragraph" style:parent-style-name="Heading_20_6">
      <style:text-properties officeooo:rsid="007d81c5" officeooo:paragraph-rsid="007d81c5"/>
    </style:style>
    <style:style style:name="P104" style:family="paragraph" style:parent-style-name="Heading_20_6">
      <style:text-properties officeooo:paragraph-rsid="0080c287"/>
    </style:style>
    <style:style style:name="P105" style:family="paragraph" style:parent-style-name="Heading_20_6">
      <style:text-properties officeooo:rsid="0080c287" officeooo:paragraph-rsid="0080c287"/>
    </style:style>
    <style:style style:name="P106" style:family="paragraph" style:parent-style-name="Heading_20_6">
      <style:text-properties officeooo:paragraph-rsid="0080d3c8"/>
    </style:style>
    <style:style style:name="P107" style:family="paragraph" style:parent-style-name="Heading_20_1">
      <style:text-properties officeooo:paragraph-rsid="0114c619"/>
    </style:style>
    <style:style style:name="P108" style:family="paragraph" style:parent-style-name="Text_20_body">
      <style:text-properties officeooo:rsid="006dc7e5" officeooo:paragraph-rsid="006dc7e5"/>
    </style:style>
    <style:style style:name="P109" style:family="paragraph" style:parent-style-name="Heading_20_2">
      <style:text-properties officeooo:rsid="006e91f7" officeooo:paragraph-rsid="0096caed"/>
    </style:style>
    <style:style style:name="P110" style:family="paragraph" style:parent-style-name="Heading_20_6">
      <style:text-properties officeooo:rsid="006e91f7" officeooo:paragraph-rsid="006e91f7"/>
    </style:style>
    <style:style style:name="P111" style:family="paragraph" style:parent-style-name="Heading_20_2">
      <style:text-properties officeooo:paragraph-rsid="011a38fa"/>
    </style:style>
    <style:style style:name="P112" style:family="paragraph" style:parent-style-name="Heading_20_6">
      <style:text-properties officeooo:rsid="006dc7e5" officeooo:paragraph-rsid="01181fa5"/>
    </style:style>
    <style:style style:name="P113" style:family="paragraph" style:parent-style-name="Heading_20_2">
      <style:text-properties officeooo:paragraph-rsid="01181fa5"/>
    </style:style>
    <style:style style:name="P114" style:family="paragraph" style:parent-style-name="Heading_20_6">
      <style:text-properties officeooo:rsid="006dc7e5" officeooo:paragraph-rsid="006e91f7"/>
    </style:style>
    <style:style style:name="P115" style:family="paragraph" style:parent-style-name="Heading_20_2">
      <style:text-properties officeooo:paragraph-rsid="0036524d"/>
    </style:style>
    <style:style style:name="P116" style:family="paragraph" style:parent-style-name="Heading_20_2">
      <style:text-properties officeooo:rsid="006e91f7" officeooo:paragraph-rsid="0149e9b8"/>
    </style:style>
    <style:style style:name="P117" style:family="paragraph" style:parent-style-name="Heading_20_6">
      <style:text-properties officeooo:rsid="006e91f7" officeooo:paragraph-rsid="0149e9b8"/>
    </style:style>
    <style:style style:name="P118" style:family="paragraph" style:parent-style-name="Heading_20_2">
      <style:text-properties officeooo:rsid="01439a10" officeooo:paragraph-rsid="01454757"/>
    </style:style>
    <style:style style:name="P119" style:family="paragraph" style:parent-style-name="Heading_20_6">
      <style:text-properties officeooo:rsid="01439a10" officeooo:paragraph-rsid="01439a10"/>
    </style:style>
    <style:style style:name="P120" style:family="paragraph" style:parent-style-name="Heading_20_2">
      <style:text-properties officeooo:rsid="006e91f7" officeooo:paragraph-rsid="006e91f7"/>
    </style:style>
    <style:style style:name="P121" style:family="paragraph" style:parent-style-name="Heading_20_6">
      <style:text-properties officeooo:paragraph-rsid="006e91f7"/>
    </style:style>
    <style:style style:name="P122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3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4" style:family="paragraph" style:parent-style-name="Text_20_body">
      <style:text-properties officeooo:paragraph-rsid="008573af"/>
    </style:style>
    <style:style style:name="P125" style:family="paragraph" style:parent-style-name="Heading_20_2">
      <style:text-properties officeooo:paragraph-rsid="00d275e5"/>
    </style:style>
    <style:style style:name="P126" style:family="paragraph" style:parent-style-name="Heading_20_6">
      <style:text-properties officeooo:rsid="0036b5d0" officeooo:paragraph-rsid="008573af"/>
    </style:style>
    <style:style style:name="P12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9" style:family="paragraph" style:parent-style-name="Heading_20_2">
      <style:text-properties officeooo:paragraph-rsid="0113d44d"/>
    </style:style>
    <style:style style:name="P130" style:family="paragraph" style:parent-style-name="Heading_20_6">
      <style:text-properties officeooo:rsid="0037062c" officeooo:paragraph-rsid="008573af"/>
    </style:style>
    <style:style style:name="P131" style:family="paragraph" style:parent-style-name="Heading_20_2">
      <style:text-properties officeooo:paragraph-rsid="008573af"/>
    </style:style>
    <style:style style:name="P132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3" style:family="paragraph" style:parent-style-name="Heading_20_6">
      <style:paragraph-properties style:writing-mode="lr-tb"/>
      <style:text-properties officeooo:paragraph-rsid="00da9fd4"/>
    </style:style>
    <style:style style:name="P134" style:family="paragraph" style:parent-style-name="Heading_20_2">
      <style:text-properties officeooo:rsid="0036b5d0" officeooo:paragraph-rsid="01524af4"/>
    </style:style>
    <style:style style:name="P135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6" style:family="paragraph" style:parent-style-name="Heading_20_2">
      <style:text-properties officeooo:paragraph-rsid="01524af4"/>
    </style:style>
    <style:style style:name="P137" style:family="paragraph" style:parent-style-name="Heading_20_6">
      <style:text-properties officeooo:rsid="0038dfd1" officeooo:paragraph-rsid="008573af"/>
    </style:style>
    <style:style style:name="P138" style:family="paragraph" style:parent-style-name="Heading_20_6">
      <style:text-properties officeooo:rsid="003bc049" officeooo:paragraph-rsid="008573af"/>
    </style:style>
    <style:style style:name="P139" style:family="paragraph" style:parent-style-name="Heading_20_2">
      <style:text-properties officeooo:rsid="00d76946" officeooo:paragraph-rsid="00e6ad03"/>
    </style:style>
    <style:style style:name="P140" style:family="paragraph" style:parent-style-name="Heading_20_6">
      <style:text-properties officeooo:paragraph-rsid="00d76946"/>
    </style:style>
    <style:style style:name="P141" style:family="paragraph" style:parent-style-name="Heading_20_6">
      <style:text-properties officeooo:rsid="003ddad5" officeooo:paragraph-rsid="008573af"/>
    </style:style>
    <style:style style:name="P142" style:family="paragraph" style:parent-style-name="Heading_20_6">
      <style:text-properties officeooo:paragraph-rsid="008573af"/>
    </style:style>
    <style:style style:name="P143" style:family="paragraph" style:parent-style-name="Horizontal_20_Line">
      <style:text-properties officeooo:paragraph-rsid="01207676"/>
    </style:style>
    <style:style style:name="P144" style:family="paragraph" style:parent-style-name="Heading_20_1">
      <style:text-properties officeooo:paragraph-rsid="0101f59d"/>
    </style:style>
    <style:style style:name="P145" style:family="paragraph" style:parent-style-name="Heading_20_2">
      <style:text-properties officeooo:paragraph-rsid="0101f59d"/>
    </style:style>
    <style:style style:name="P146" style:family="paragraph" style:parent-style-name="Heading_20_6">
      <style:text-properties officeooo:paragraph-rsid="0101f59d"/>
    </style:style>
    <style:style style:name="P147" style:family="paragraph" style:parent-style-name="Heading_20_6">
      <style:paragraph-properties style:writing-mode="lr-tb"/>
      <style:text-properties officeooo:paragraph-rsid="0101f59d"/>
    </style:style>
    <style:style style:name="P148" style:family="paragraph" style:parent-style-name="Heading_20_2">
      <style:text-properties fo:language="en" fo:country="US"/>
    </style:style>
    <style:style style:name="P149" style:family="paragraph" style:parent-style-name="Text_20_body">
      <style:text-properties officeooo:paragraph-rsid="00cbe9a7"/>
    </style:style>
    <style:style style:name="P150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51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3" style:family="paragraph" style:parent-style-name="Horizontal_20_Line">
      <style:text-properties fo:language="en" fo:country="US" officeooo:paragraph-rsid="00cbe9a7"/>
    </style:style>
    <style:style style:name="P154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5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6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7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8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9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60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61" style:family="paragraph" style:parent-style-name="Text_20_body">
      <style:text-properties officeooo:paragraph-rsid="00fd9722"/>
    </style:style>
    <style:style style:name="P162" style:family="paragraph" style:parent-style-name="Horizontal_20_Line">
      <style:text-properties officeooo:paragraph-rsid="00fd9722"/>
    </style:style>
    <style:style style:name="P163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4" style:family="paragraph" style:parent-style-name="Heading_20_6">
      <style:text-properties officeooo:rsid="0041772e" officeooo:paragraph-rsid="0041772e"/>
    </style:style>
    <style:style style:name="P165" style:family="paragraph" style:parent-style-name="Heading_20_2">
      <style:text-properties officeooo:paragraph-rsid="0050d590"/>
    </style:style>
    <style:style style:name="P166" style:family="paragraph" style:parent-style-name="Heading_20_6">
      <style:text-properties officeooo:rsid="004231ca" officeooo:paragraph-rsid="0050d590"/>
    </style:style>
    <style:style style:name="P167" style:family="paragraph" style:parent-style-name="Heading_20_6">
      <style:text-properties officeooo:rsid="004231ca" officeooo:paragraph-rsid="004231ca"/>
    </style:style>
    <style:style style:name="P168" style:family="paragraph" style:parent-style-name="Heading_20_6">
      <style:text-properties officeooo:rsid="0044426f" officeooo:paragraph-rsid="0044426f"/>
    </style:style>
    <style:style style:name="P169" style:family="paragraph" style:parent-style-name="Heading_20_6">
      <style:text-properties officeooo:rsid="0045b72a" officeooo:paragraph-rsid="0045b72a"/>
    </style:style>
    <style:style style:name="P170" style:family="paragraph" style:parent-style-name="Heading_20_6">
      <style:text-properties officeooo:rsid="00478282" officeooo:paragraph-rsid="00478282"/>
    </style:style>
    <style:style style:name="P171" style:family="paragraph" style:parent-style-name="Heading_20_6">
      <style:text-properties officeooo:rsid="0048db21" officeooo:paragraph-rsid="0048db21"/>
    </style:style>
    <style:style style:name="P172" style:family="paragraph" style:parent-style-name="Heading_20_6">
      <style:text-properties officeooo:rsid="004aca81" officeooo:paragraph-rsid="004aca81"/>
    </style:style>
    <style:style style:name="P173" style:family="paragraph" style:parent-style-name="Heading_20_6">
      <style:text-properties officeooo:rsid="004cbc04" officeooo:paragraph-rsid="004cbc04"/>
    </style:style>
    <style:style style:name="P174" style:family="paragraph" style:parent-style-name="Heading_20_2">
      <style:text-properties officeooo:paragraph-rsid="009777bf"/>
    </style:style>
    <style:style style:name="P175" style:family="paragraph" style:parent-style-name="Heading_20_6">
      <style:text-properties officeooo:rsid="004da5c5" officeooo:paragraph-rsid="004e78b0"/>
    </style:style>
    <style:style style:name="P176" style:family="paragraph" style:parent-style-name="Heading_20_6">
      <style:text-properties officeooo:rsid="004e78b0" officeooo:paragraph-rsid="004e78b0"/>
    </style:style>
    <style:style style:name="P177" style:family="paragraph" style:parent-style-name="Heading_20_2">
      <style:text-properties officeooo:paragraph-rsid="00c41095"/>
    </style:style>
    <style:style style:name="P178" style:family="paragraph" style:parent-style-name="Heading_20_6">
      <style:text-properties officeooo:rsid="004e78b0" officeooo:paragraph-rsid="0050d590"/>
    </style:style>
    <style:style style:name="P179" style:family="paragraph" style:parent-style-name="Heading_20_6">
      <style:text-properties officeooo:rsid="004febc9" officeooo:paragraph-rsid="004febc9"/>
    </style:style>
    <style:style style:name="P180" style:family="paragraph" style:parent-style-name="Heading_20_6">
      <style:text-properties officeooo:rsid="0050d590" officeooo:paragraph-rsid="0050d590"/>
    </style:style>
    <style:style style:name="P181" style:family="paragraph" style:parent-style-name="Heading_20_6">
      <style:text-properties officeooo:rsid="005194d4" officeooo:paragraph-rsid="005194d4"/>
    </style:style>
    <style:style style:name="P182" style:family="paragraph" style:parent-style-name="Heading_20_6">
      <style:text-properties officeooo:paragraph-rsid="005194d4"/>
    </style:style>
    <style:style style:name="P183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4" style:family="paragraph" style:parent-style-name="Heading_20_2">
      <style:text-properties officeooo:paragraph-rsid="00cbe9a7"/>
    </style:style>
    <style:style style:name="P185" style:family="paragraph" style:parent-style-name="Heading_20_6">
      <style:text-properties officeooo:rsid="0057a35c" officeooo:paragraph-rsid="00cbe9a7"/>
    </style:style>
    <style:style style:name="P186" style:family="paragraph" style:parent-style-name="Heading_20_6">
      <style:text-properties officeooo:rsid="005a5358" officeooo:paragraph-rsid="00cbe9a7"/>
    </style:style>
    <style:style style:name="P187" style:family="paragraph" style:parent-style-name="Heading_20_6">
      <style:text-properties officeooo:rsid="005ccc8d" officeooo:paragraph-rsid="00cbe9a7"/>
    </style:style>
    <style:style style:name="P188" style:family="paragraph" style:parent-style-name="Heading_20_6">
      <style:text-properties officeooo:rsid="005ce75d" officeooo:paragraph-rsid="00cbe9a7"/>
    </style:style>
    <style:style style:name="P189" style:family="paragraph" style:parent-style-name="Heading_20_6">
      <style:text-properties officeooo:rsid="005925a4" officeooo:paragraph-rsid="00cbe9a7"/>
    </style:style>
    <style:style style:name="P190" style:family="paragraph" style:parent-style-name="Heading_20_6">
      <style:text-properties officeooo:rsid="0032f870" officeooo:paragraph-rsid="00cbe9a7"/>
    </style:style>
    <style:style style:name="P191" style:family="paragraph" style:parent-style-name="Heading_20_6">
      <style:text-properties officeooo:paragraph-rsid="00cbe9a7"/>
    </style:style>
    <style:style style:name="P192" style:family="paragraph" style:parent-style-name="Heading_20_6">
      <style:text-properties officeooo:rsid="005d7fa7" officeooo:paragraph-rsid="00cbe9a7"/>
    </style:style>
    <style:style style:name="P193" style:family="paragraph" style:parent-style-name="Heading_20_6">
      <style:text-properties officeooo:rsid="005f7e45" officeooo:paragraph-rsid="00cbe9a7"/>
    </style:style>
    <style:style style:name="P194" style:family="paragraph" style:parent-style-name="Heading_20_2">
      <style:text-properties officeooo:rsid="00de5d9f" officeooo:paragraph-rsid="0157c4a5"/>
    </style:style>
    <style:style style:name="P195" style:family="paragraph" style:parent-style-name="Heading_20_6">
      <style:text-properties officeooo:rsid="00de5d9f" officeooo:paragraph-rsid="0157c4a5"/>
    </style:style>
    <style:style style:name="P196" style:family="paragraph" style:parent-style-name="Heading_20_6">
      <style:text-properties officeooo:rsid="00612dec" officeooo:paragraph-rsid="00cbe9a7"/>
    </style:style>
    <style:style style:name="P197" style:family="paragraph" style:parent-style-name="Heading_20_6">
      <style:text-properties officeooo:rsid="00623d25" officeooo:paragraph-rsid="00cbe9a7"/>
    </style:style>
    <style:style style:name="P198" style:family="paragraph" style:parent-style-name="Heading_20_6">
      <style:text-properties officeooo:rsid="0064250a" officeooo:paragraph-rsid="00cbe9a7"/>
    </style:style>
    <style:style style:name="P199" style:family="paragraph" style:parent-style-name="Heading_20_6">
      <style:text-properties officeooo:rsid="0066bd59" officeooo:paragraph-rsid="00cbe9a7"/>
    </style:style>
    <style:style style:name="P200" style:family="paragraph" style:parent-style-name="Heading_20_2">
      <style:text-properties officeooo:paragraph-rsid="0112ac2d"/>
    </style:style>
    <style:style style:name="P201" style:family="paragraph" style:parent-style-name="Heading_20_6">
      <style:text-properties officeooo:paragraph-rsid="0112ac2d"/>
    </style:style>
    <style:style style:name="P202" style:family="paragraph" style:parent-style-name="Heading_20_6">
      <style:text-properties officeooo:rsid="0032f870" officeooo:paragraph-rsid="0112ac2d"/>
    </style:style>
    <style:style style:name="P203" style:family="paragraph" style:parent-style-name="Heading_20_6">
      <style:text-properties officeooo:rsid="00687cfd" officeooo:paragraph-rsid="00cbe9a7"/>
    </style:style>
    <style:style style:name="P204" style:family="paragraph" style:parent-style-name="Heading_20_6">
      <style:text-properties officeooo:rsid="006adf42" officeooo:paragraph-rsid="00cbe9a7"/>
    </style:style>
    <style:style style:name="P205" style:family="paragraph" style:parent-style-name="Heading_20_6">
      <style:text-properties officeooo:rsid="006bc50a" officeooo:paragraph-rsid="00cbe9a7"/>
    </style:style>
    <style:style style:name="P206" style:family="paragraph" style:parent-style-name="Heading_20_6">
      <style:text-properties officeooo:rsid="002e632f" officeooo:paragraph-rsid="00cbe9a7"/>
    </style:style>
    <style:style style:name="P207" style:family="paragraph" style:parent-style-name="Heading_20_6">
      <style:text-properties officeooo:rsid="006c0690" officeooo:paragraph-rsid="00cbe9a7"/>
    </style:style>
    <style:style style:name="P208" style:family="paragraph" style:parent-style-name="Heading_20_6">
      <style:text-properties officeooo:rsid="006c0690" officeooo:paragraph-rsid="00ed4a5f"/>
    </style:style>
    <style:style style:name="P209" style:family="paragraph" style:parent-style-name="Horizontal_20_Line">
      <style:text-properties officeooo:paragraph-rsid="00ed4a5f"/>
    </style:style>
    <style:style style:name="P210" style:family="paragraph" style:parent-style-name="Heading_20_1">
      <style:text-properties officeooo:paragraph-rsid="00cbe9a7"/>
    </style:style>
    <style:style style:name="P211" style:family="paragraph" style:parent-style-name="Text_20_body">
      <style:paragraph-properties style:writing-mode="lr-tb"/>
      <style:text-properties officeooo:paragraph-rsid="00ea689f"/>
    </style:style>
    <style:style style:name="P212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3" style:family="paragraph" style:parent-style-name="Text_20_body">
      <style:paragraph-properties style:writing-mode="lr-tb"/>
      <style:text-properties officeooo:rsid="006c0690" officeooo:paragraph-rsid="00cbe9a7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7c4a5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1549835"/>
    </style:style>
    <style:style style:name="T125" style:family="text">
      <style:text-properties officeooo:rsid="0026fadb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7" style:family="text">
      <style:text-properties officeooo:rsid="002de707"/>
    </style:style>
    <style:style style:name="T128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9" style:family="text">
      <style:text-properties officeooo:rsid="00cea5d6"/>
    </style:style>
    <style:style style:name="T130" style:family="text">
      <style:text-properties style:font-name="Courier New1" officeooo:rsid="00cea5d6"/>
    </style:style>
    <style:style style:name="T131" style:family="text">
      <style:text-properties officeooo:rsid="00a77328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3" style:family="text">
      <style:text-properties officeooo:rsid="00aa386a"/>
    </style:style>
    <style:style style:name="T134" style:family="text">
      <style:text-properties fo:font-weight="normal" officeooo:rsid="0114c619" style:font-weight-asian="normal" style:font-weight-complex="normal"/>
    </style:style>
    <style:style style:name="T135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6" style:family="text">
      <style:text-properties fo:font-weight="normal" officeooo:rsid="011f17b7" style:font-weight-asian="normal" style:font-weight-complex="normal"/>
    </style:style>
    <style:style style:name="T137" style:family="text">
      <style:text-properties fo:font-weight="bold" officeooo:rsid="0073166a" style:font-weight-asian="bold" style:font-weight-complex="bold"/>
    </style:style>
    <style:style style:name="T138" style:family="text">
      <style:text-properties style:font-name="Courier New1" fo:font-weight="normal" officeooo:rsid="0114c619" style:font-weight-asian="normal" style:font-weight-complex="normal"/>
    </style:style>
    <style:style style:name="T139" style:family="text">
      <style:text-properties style:font-name="Arial1" fo:font-weight="normal" officeooo:rsid="0114c619" style:font-weight-asian="normal" style:font-weight-complex="normal"/>
    </style:style>
    <style:style style:name="T140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2" style:family="text">
      <style:text-properties fo:font-weight="normal" officeooo:rsid="0121d3f2" style:font-weight-asian="normal" style:font-weight-complex="normal"/>
    </style:style>
    <style:style style:name="T143" style:family="text">
      <style:text-properties fo:language="en" fo:country="US" fo:font-weight="bold" officeooo:rsid="00c41095" style:font-weight-asian="bold" style:font-weight-complex="bold"/>
    </style:style>
    <style:style style:name="T144" style:family="text">
      <style:text-properties style:font-name="Courier New1" fo:font-weight="normal" style:font-weight-asian="normal" style:font-weight-complex="normal"/>
    </style:style>
    <style:style style:name="T145" style:family="text">
      <style:text-properties fo:font-weight="normal" officeooo:rsid="012254a9" style:font-weight-asian="normal" style:font-weight-complex="normal"/>
    </style:style>
    <style:style style:name="T146" style:family="text">
      <style:text-properties style:font-name="Courier New1" fo:font-weight="normal" officeooo:rsid="012254a9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8" style:family="text">
      <style:text-properties officeooo:rsid="007221fa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50" style:family="text">
      <style:text-properties officeooo:rsid="0073166a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3" style:family="text">
      <style:text-properties officeooo:rsid="01454757"/>
    </style:style>
    <style:style style:name="T154" style:family="text">
      <style:text-properties style:font-name="Courier New1" officeooo:rsid="01454757"/>
    </style:style>
    <style:style style:name="T15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style:font-name="Courier New1" officeooo:rsid="010549aa"/>
    </style:style>
    <style:style style:name="T158" style:family="text">
      <style:text-properties officeooo:rsid="010549aa"/>
    </style:style>
    <style:style style:name="T159" style:family="text">
      <style:text-properties style:font-name="Courier New1" officeooo:rsid="00ac99f1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2" style:family="text">
      <style:text-properties style:font-name="Courier New1" officeooo:rsid="00fe523c"/>
    </style:style>
    <style:style style:name="T16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5498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style:font-name="Courier New1" officeooo:rsid="011141b6"/>
    </style:style>
    <style:style style:name="T166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9" style:family="text">
      <style:text-properties officeooo:rsid="00735f64"/>
    </style:style>
    <style:style style:name="T170" style:family="text">
      <style:text-properties officeooo:rsid="00f81777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style:font-name="Courier New1" officeooo:rsid="0080c287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8" style:family="text">
      <style:text-properties officeooo:rsid="0074f586"/>
    </style:style>
    <style:style style:name="T179" style:family="text">
      <style:text-properties style:font-name="Courier New1" officeooo:rsid="00735f64"/>
    </style:style>
    <style:style style:name="T180" style:family="text">
      <style:text-properties style:font-name="Courier New1" officeooo:rsid="00adf037"/>
    </style:style>
    <style:style style:name="T181" style:family="text">
      <style:text-properties officeooo:rsid="00cd0955"/>
    </style:style>
    <style:style style:name="T182" style:family="text">
      <style:text-properties officeooo:rsid="007489f5"/>
    </style:style>
    <style:style style:name="T183" style:family="text">
      <style:text-properties officeooo:rsid="00adf037"/>
    </style:style>
    <style:style style:name="T184" style:family="text">
      <style:text-properties style:font-name="Courier New1" officeooo:rsid="0074f586"/>
    </style:style>
    <style:style style:name="T18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officeooo:rsid="00788460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1" style:family="text">
      <style:text-properties style:font-name="Courier New1" officeooo:rsid="00788460"/>
    </style:style>
    <style:style style:name="T192" style:family="text">
      <style:text-properties officeooo:rsid="00ac99f1"/>
    </style:style>
    <style:style style:name="T193" style:family="text">
      <style:text-properties style:font-name="Arial1"/>
    </style:style>
    <style:style style:name="T194" style:family="text">
      <style:text-properties style:font-name="Arial1" officeooo:rsid="00ac99f1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6" style:family="text">
      <style:text-properties officeooo:rsid="007a7724"/>
    </style:style>
    <style:style style:name="T19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9" style:family="text">
      <style:text-properties style:font-name="Courier New1" officeooo:rsid="007a7724"/>
    </style:style>
    <style:style style:name="T200" style:family="text">
      <style:text-properties officeooo:rsid="00fe523c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2" style:family="text">
      <style:text-properties officeooo:rsid="01016172"/>
    </style:style>
    <style:style style:name="T203" style:family="text">
      <style:text-properties style:font-name="Courier New1" officeooo:rsid="01016172"/>
    </style:style>
    <style:style style:name="T204" style:family="text">
      <style:text-properties officeooo:rsid="0101f59d"/>
    </style:style>
    <style:style style:name="T205" style:family="text">
      <style:text-properties style:font-name="Courier New1" officeooo:rsid="0101f59d"/>
    </style:style>
    <style:style style:name="T206" style:family="text">
      <style:text-properties officeooo:rsid="00fe0e84"/>
    </style:style>
    <style:style style:name="T207" style:family="text">
      <style:text-properties style:font-name="Courier New1" officeooo:rsid="00fe0e84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officeooo:rsid="01181b3f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6" style:family="text">
      <style:text-properties style:font-name="Courier New1" officeooo:rsid="01181b3f"/>
    </style:style>
    <style:style style:name="T217" style:family="text">
      <style:text-properties fo:font-style="italic" officeooo:rsid="01181b3f" style:font-style-asian="italic" style:font-style-complex="italic"/>
    </style:style>
    <style:style style:name="T218" style:family="text">
      <style:text-properties fo:font-style="normal" officeooo:rsid="01181b3f" style:font-style-asian="normal" style:font-style-complex="normal"/>
    </style:style>
    <style:style style:name="T21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officeooo:rsid="007bf9df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3" style:family="text">
      <style:text-properties style:font-name="Courier New1" officeooo:rsid="007bf9df"/>
    </style:style>
    <style:style style:name="T224" style:family="text">
      <style:text-properties style:font-name="Courier New1" officeooo:rsid="007d1909"/>
    </style:style>
    <style:style style:name="T225" style:family="text">
      <style:text-properties officeooo:rsid="0081b772"/>
    </style:style>
    <style:style style:name="T226" style:family="text">
      <style:text-properties officeooo:rsid="0082ae64"/>
    </style:style>
    <style:style style:name="T227" style:family="text">
      <style:text-properties style:font-name="Courier New1" officeooo:rsid="0082ae64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9" style:family="text">
      <style:text-properties officeooo:rsid="007d1909"/>
    </style:style>
    <style:style style:name="T230" style:family="text">
      <style:text-properties officeooo:rsid="00ae0588"/>
    </style:style>
    <style:style style:name="T231" style:family="text">
      <style:text-properties officeooo:rsid="00cff26e"/>
    </style:style>
    <style:style style:name="T232" style:family="text">
      <style:text-properties officeooo:rsid="007d81c5"/>
    </style:style>
    <style:style style:name="T233" style:family="text">
      <style:text-properties style:font-name="Courier New1" officeooo:rsid="007d81c5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7f4f2e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561ff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8" style:family="text">
      <style:text-properties officeooo:rsid="01561ffc"/>
    </style:style>
    <style:style style:name="T239" style:family="text">
      <style:text-properties officeooo:rsid="0080d3c8"/>
    </style:style>
    <style:style style:name="T240" style:family="text">
      <style:text-properties style:font-name="Courier New1" officeooo:rsid="0080d3c8"/>
    </style:style>
    <style:style style:name="T241" style:family="text">
      <style:text-properties officeooo:rsid="00ccd9db"/>
    </style:style>
    <style:style style:name="T242" style:family="text">
      <style:text-properties officeooo:rsid="00f8c2be"/>
    </style:style>
    <style:style style:name="T243" style:family="text">
      <style:text-properties officeooo:rsid="00ae5505"/>
    </style:style>
    <style:style style:name="T244" style:family="text">
      <style:text-properties officeooo:rsid="0036524d"/>
    </style:style>
    <style:style style:name="T245" style:family="text">
      <style:text-properties style:font-name="Arial1" fo:font-size="9pt" fo:language="en" fo:country="US" officeooo:rsid="00708c71" style:font-size-asian="9pt" style:font-size-complex="9pt"/>
    </style:style>
    <style:style style:name="T246" style:family="text">
      <style:text-properties style:font-name="Arial1" fo:font-size="9pt" fo:language="en" fo:country="US" officeooo:rsid="007221fa" style:font-size-asian="9pt" style:font-size-complex="9pt"/>
    </style:style>
    <style:style style:name="T247" style:family="text">
      <style:text-properties style:font-name="Arial1" fo:font-size="9pt" fo:language="en" fo:country="US" officeooo:rsid="00da9fd4" style:font-size-asian="9pt" style:font-size-complex="9pt"/>
    </style:style>
    <style:style style:name="T248" style:family="text">
      <style:text-properties style:font-name="Courier New1" fo:font-size="9pt" fo:language="en" fo:country="US" style:font-size-asian="9pt" style:font-size-complex="9pt"/>
    </style:style>
    <style:style style:name="T249" style:family="text">
      <style:text-properties officeooo:rsid="00da9fd4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1" style:family="text">
      <style:text-properties officeooo:rsid="00db5a99"/>
    </style:style>
    <style:style style:name="T252" style:family="text">
      <style:text-properties style:font-name="Courier New1" officeooo:rsid="00db5a99"/>
    </style:style>
    <style:style style:name="T25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4" style:family="text">
      <style:text-properties officeooo:rsid="011a38fa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officeooo:rsid="006e91f7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8" style:family="text">
      <style:text-properties officeooo:rsid="00d0fcdc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0" style:family="text">
      <style:text-properties style:font-name="Courier New1" officeooo:rsid="006e91f7"/>
    </style:style>
    <style:style style:name="T261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2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63" style:family="text">
      <style:text-properties officeooo:rsid="0036b5d0"/>
    </style:style>
    <style:style style:name="T264" style:family="text">
      <style:text-properties officeooo:rsid="00d275e5"/>
    </style:style>
    <style:style style:name="T265" style:family="text">
      <style:text-properties officeooo:rsid="00fc58c3"/>
    </style:style>
    <style:style style:name="T266" style:family="text">
      <style:text-properties officeooo:rsid="00fd9722"/>
    </style:style>
    <style:style style:name="T267" style:family="text">
      <style:text-properties officeooo:rsid="0113d44d"/>
    </style:style>
    <style:style style:name="T26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officeooo:rsid="0037062c"/>
    </style:style>
    <style:style style:name="T274" style:family="text">
      <style:text-properties style:font-name="Courier New1" officeooo:rsid="0037062c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8" style:family="text">
      <style:text-properties officeooo:rsid="0038dfd1"/>
    </style:style>
    <style:style style:name="T279" style:family="text">
      <style:text-properties style:font-name="Courier New1" officeooo:rsid="0038dfd1"/>
    </style:style>
    <style:style style:name="T280" style:family="text">
      <style:text-properties officeooo:rsid="00c41095"/>
    </style:style>
    <style:style style:name="T281" style:family="text">
      <style:text-properties fo:language="en" fo:country="US" fo:font-weight="bold" style:font-weight-asian="bold" style:font-weight-complex="bold"/>
    </style:style>
    <style:style style:name="T282" style:family="text">
      <style:text-properties fo:language="en" fo:country="US" officeooo:rsid="00d30090"/>
    </style:style>
    <style:style style:name="T283" style:family="text">
      <style:text-properties style:font-name="Courier New1" fo:language="en" fo:country="US"/>
    </style:style>
    <style:style style:name="T284" style:family="text">
      <style:text-properties fo:language="en" fo:country="US" officeooo:rsid="00da9fd4"/>
    </style:style>
    <style:style style:name="T285" style:family="text">
      <style:text-properties fo:font-weight="bold" officeooo:rsid="014eeb93" style:font-weight-asian="bold" style:font-weight-complex="bold"/>
    </style:style>
    <style:style style:name="T286" style:family="text">
      <style:text-properties officeooo:rsid="014fb290"/>
    </style:style>
    <style:style style:name="T287" style:family="text">
      <style:text-properties officeooo:rsid="01524af4"/>
    </style:style>
    <style:style style:name="T288" style:family="text">
      <style:text-properties officeooo:rsid="003a5871"/>
    </style:style>
    <style:style style:name="T289" style:family="text">
      <style:text-properties officeooo:rsid="00e6ad03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2" style:family="text">
      <style:text-properties style:font-name="Courier New1" officeooo:rsid="00d76946"/>
    </style:style>
    <style:style style:name="T293" style:family="text">
      <style:text-properties officeooo:rsid="00d76946"/>
    </style:style>
    <style:style style:name="T294" style:family="text">
      <style:text-properties officeooo:rsid="00e15419"/>
    </style:style>
    <style:style style:name="T295" style:family="text">
      <style:text-properties style:font-name="Courier New1" officeooo:rsid="00e15419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1" style:family="text">
      <style:text-properties officeooo:rsid="003bc049"/>
    </style:style>
    <style:style style:name="T302" style:family="text">
      <style:text-properties officeooo:rsid="003ddad5"/>
    </style:style>
    <style:style style:name="T303" style:family="text">
      <style:text-properties officeooo:rsid="00d9664a"/>
    </style:style>
    <style:style style:name="T304" style:family="text">
      <style:text-properties style:font-name="Courier New1" officeooo:rsid="00d9664a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6" style:family="text">
      <style:text-properties fo:language="en" fo:country="US" officeooo:rsid="011573ee"/>
    </style:style>
    <style:style style:name="T307" style:family="text">
      <style:text-properties style:font-name="Courier New1" fo:language="en" fo:country="US" officeooo:rsid="011573ee"/>
    </style:style>
    <style:style style:name="T30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1" style:family="text">
      <style:text-properties fo:font-size="9pt" officeooo:rsid="00be561d" style:font-size-asian="9pt" style:font-size-complex="9pt"/>
    </style:style>
    <style:style style:name="T312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13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4" style:family="text">
      <style:text-properties style:font-name="Courier New1" officeooo:rsid="00be561d"/>
    </style:style>
    <style:style style:name="T315" style:family="text">
      <style:text-properties style:font-name="Courier New1" officeooo:rsid="013dab05"/>
    </style:style>
    <style:style style:name="T316" style:family="text">
      <style:text-properties style:font-name="Arial1" fo:font-size="9pt" officeooo:rsid="011573ee" style:font-size-asian="9pt" style:font-size-complex="9pt"/>
    </style:style>
    <style:style style:name="T317" style:family="text">
      <style:text-properties officeooo:rsid="002f012a"/>
    </style:style>
    <style:style style:name="T318" style:family="text">
      <style:text-properties style:font-name="Arial1" fo:font-size="9pt" officeooo:rsid="000cda8a" style:font-size-asian="9pt" style:font-size-complex="9pt"/>
    </style:style>
    <style:style style:name="T319" style:family="text">
      <style:text-properties officeooo:rsid="000cda8a"/>
    </style:style>
    <style:style style:name="T320" style:family="text">
      <style:text-properties style:font-name="Arial1" fo:font-size="9pt" style:font-size-asian="9pt" style:font-size-complex="9pt"/>
    </style:style>
    <style:style style:name="T321" style:family="text">
      <style:text-properties officeooo:rsid="000db421"/>
    </style:style>
    <style:style style:name="T322" style:family="text">
      <style:text-properties style:font-name="Arial1" fo:font-size="9pt" officeooo:rsid="000f1643" style:font-size-asian="9pt" style:font-size-complex="9pt"/>
    </style:style>
    <style:style style:name="T323" style:family="text">
      <style:text-properties officeooo:rsid="000f1643"/>
    </style:style>
    <style:style style:name="T324" style:family="text">
      <style:text-properties officeooo:rsid="014ebe99"/>
    </style:style>
    <style:style style:name="T325" style:family="text">
      <style:text-properties officeooo:rsid="000f82b5"/>
    </style:style>
    <style:style style:name="T326" style:family="text">
      <style:text-properties style:font-name="Arial1" fo:font-size="9pt" officeooo:rsid="000f82b5" style:font-size-asian="9pt" style:font-size-complex="9pt"/>
    </style:style>
    <style:style style:name="T327" style:family="text">
      <style:text-properties style:font-name="Courier New1" fo:font-weight="normal" officeooo:rsid="001180d9" style:font-weight-asian="normal" style:font-weight-complex="normal"/>
    </style:style>
    <style:style style:name="T328" style:family="text">
      <style:text-properties fo:font-weight="normal" officeooo:rsid="001180d9" style:font-weight-asian="normal" style:font-weight-complex="normal"/>
    </style:style>
    <style:style style:name="T329" style:family="text">
      <style:text-properties style:font-name="Courier New1" fo:font-weight="normal" officeooo:rsid="00132930" style:font-weight-asian="normal" style:font-weight-complex="normal"/>
    </style:style>
    <style:style style:name="T330" style:family="text">
      <style:text-properties fo:font-weight="normal" officeooo:rsid="00132930" style:font-weight-asian="normal" style:font-weight-complex="normal"/>
    </style:style>
    <style:style style:name="T331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32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33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4" style:family="text">
      <style:text-properties officeooo:rsid="00cc5d89"/>
    </style:style>
    <style:style style:name="T335" style:family="text">
      <style:text-properties style:font-name="Courier New1" officeooo:rsid="00cc5d89"/>
    </style:style>
    <style:style style:name="T336" style:family="text">
      <style:text-properties style:font-name="Arial1" fo:font-size="9pt" officeooo:rsid="00cc5d89" style:font-size-asian="9pt" style:font-size-complex="9pt"/>
    </style:style>
    <style:style style:name="T337" style:family="text">
      <style:text-properties officeooo:rsid="00162b46"/>
    </style:style>
    <style:style style:name="T338" style:family="text">
      <style:text-properties style:font-name="Courier New1" officeooo:rsid="00162b46"/>
    </style:style>
    <style:style style:name="T339" style:family="text">
      <style:text-properties officeooo:rsid="00f69497"/>
    </style:style>
    <style:style style:name="T340" style:family="text">
      <style:text-properties style:font-name="Courier New1" officeooo:rsid="00f69497"/>
    </style:style>
    <style:style style:name="T341" style:family="text">
      <style:text-properties style:font-name="Arial1" fo:font-size="9pt" officeooo:rsid="00162b46" style:font-size-asian="9pt" style:font-size-complex="9pt"/>
    </style:style>
    <style:style style:name="T342" style:family="text">
      <style:text-properties officeooo:rsid="00f6ca1f"/>
    </style:style>
    <style:style style:name="T343" style:family="text">
      <style:text-properties style:font-name="Courier New1" officeooo:rsid="00f6ca1f"/>
    </style:style>
    <style:style style:name="T344" style:family="text">
      <style:text-properties style:font-name="Arial1" fo:font-size="9pt" officeooo:rsid="00f6ca1f" style:font-size-asian="9pt" style:font-size-complex="9pt"/>
    </style:style>
    <style:style style:name="T345" style:family="text">
      <style:text-properties style:font-name="Arial1" fo:font-size="9pt" officeooo:rsid="001fb21c" style:font-size-asian="9pt" style:font-size-complex="9pt"/>
    </style:style>
    <style:style style:name="T346" style:family="text">
      <style:text-properties style:font-name="Arial1" officeooo:rsid="001fb21c"/>
    </style:style>
    <style:style style:name="T347" style:family="text">
      <style:text-properties officeooo:rsid="0016a20e"/>
    </style:style>
    <style:style style:name="T348" style:family="text">
      <style:text-properties style:font-name="Courier New1" officeooo:rsid="0028dc1a"/>
    </style:style>
    <style:style style:name="T349" style:family="text">
      <style:text-properties officeooo:rsid="0028dc1a"/>
    </style:style>
    <style:style style:name="T350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1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2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53" style:family="text">
      <style:text-properties officeooo:rsid="00d3e1d6"/>
    </style:style>
    <style:style style:name="T354" style:family="text">
      <style:text-properties officeooo:rsid="0050d590"/>
    </style:style>
    <style:style style:name="T355" style:family="text">
      <style:text-properties officeooo:rsid="004febc9"/>
    </style:style>
    <style:style style:name="T35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7" style:family="text">
      <style:text-properties officeooo:rsid="004231ca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style:font-name="Courier New1" officeooo:rsid="0050d590"/>
    </style:style>
    <style:style style:name="T360" style:family="text">
      <style:text-properties officeooo:rsid="0044426f"/>
    </style:style>
    <style:style style:name="T361" style:family="text">
      <style:text-properties officeooo:rsid="0045b72a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4" style:family="text">
      <style:text-properties officeooo:rsid="00c8d0e5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6" style:family="text">
      <style:text-properties style:font-name="Courier New1" officeooo:rsid="00c8d0e5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8" style:family="text">
      <style:text-properties officeooo:rsid="005261c2"/>
    </style:style>
    <style:style style:name="T369" style:family="text">
      <style:text-properties style:font-name="Courier New1" officeooo:rsid="005261c2"/>
    </style:style>
    <style:style style:name="T370" style:family="text">
      <style:text-properties officeooo:rsid="00408195"/>
    </style:style>
    <style:style style:name="T371" style:family="text">
      <style:text-properties style:font-name="Courier New1" officeooo:rsid="004e78b0"/>
    </style:style>
    <style:style style:name="T372" style:family="text">
      <style:text-properties officeooo:rsid="004e78b0"/>
    </style:style>
    <style:style style:name="T373" style:family="text">
      <style:text-properties style:font-name="Arial1" officeooo:rsid="004e78b0"/>
    </style:style>
    <style:style style:name="T37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5" style:family="text">
      <style:text-properties officeooo:rsid="005194d4"/>
    </style:style>
    <style:style style:name="T376" style:family="text">
      <style:text-properties style:font-name="Courier New1" officeooo:rsid="005194d4"/>
    </style:style>
    <style:style style:name="T3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8" style:family="text">
      <style:text-properties fo:font-style="italic" officeooo:rsid="005194d4" style:font-style-asian="italic" style:font-style-complex="italic"/>
    </style:style>
    <style:style style:name="T379" style:family="text">
      <style:text-properties fo:font-style="normal" officeooo:rsid="005194d4" style:font-style-asian="normal" style:font-style-complex="normal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81" style:family="text">
      <style:text-properties officeooo:rsid="00d3e1d6" style:font-size-asian="7.84999990463257pt" style:font-weight-asian="normal" style:font-size-complex="9pt" style:font-weight-complex="normal"/>
    </style:style>
    <style:style style:name="T382" style:family="text">
      <style:text-properties officeooo:rsid="0050d590" style:font-size-asian="7.84999990463257pt" style:font-weight-asian="normal" style:font-size-complex="9pt" style:font-weight-complex="normal"/>
    </style:style>
    <style:style style:name="T383" style:family="text">
      <style:text-properties officeooo:rsid="004febc9" style:font-size-asian="7.84999990463257pt" style:font-weight-asian="normal" style:font-size-complex="9pt" style:font-weight-complex="normal"/>
    </style:style>
    <style:style style:name="T384" style:family="text">
      <style:text-properties officeooo:rsid="005ce75d" style:font-size-asian="7.84999990463257pt" style:font-weight-asian="normal" style:font-size-complex="9pt" style:font-weight-complex="normal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6" style:family="text">
      <style:text-properties officeooo:rsid="005a5358"/>
    </style:style>
    <style:style style:name="T387" style:family="text">
      <style:text-properties style:font-name="Courier New1" officeooo:rsid="005a5358"/>
    </style:style>
    <style:style style:name="T388" style:family="text">
      <style:text-properties officeooo:rsid="005b47d9"/>
    </style:style>
    <style:style style:name="T389" style:family="text">
      <style:text-properties officeooo:rsid="0066bd59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1" style:family="text">
      <style:text-properties officeooo:rsid="0034c137"/>
    </style:style>
    <style:style style:name="T392" style:family="text">
      <style:text-properties style:font-name="Courier New1" officeooo:rsid="0034c137"/>
    </style:style>
    <style:style style:name="T393" style:family="text">
      <style:text-properties officeooo:rsid="005ce75d"/>
    </style:style>
    <style:style style:name="T39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5" style:family="text">
      <style:text-properties officeooo:rsid="00b57062"/>
    </style:style>
    <style:style style:name="T396" style:family="text">
      <style:text-properties officeooo:rsid="005d7fa7"/>
    </style:style>
    <style:style style:name="T397" style:family="text">
      <style:text-properties style:font-name="Courier New1" officeooo:rsid="005d7fa7"/>
    </style:style>
    <style:style style:name="T398" style:family="text">
      <style:text-properties officeooo:rsid="0157c4a5"/>
    </style:style>
    <style:style style:name="T399" style:family="text">
      <style:text-properties officeooo:rsid="00c730ff"/>
    </style:style>
    <style:style style:name="T400" style:family="text">
      <style:text-properties officeooo:rsid="006bc50a"/>
    </style:style>
    <style:style style:name="T401" style:family="text">
      <style:text-properties officeooo:rsid="00dfbede"/>
    </style:style>
    <style:style style:name="T402" style:family="text">
      <style:text-properties style:font-name="Courier New1" officeooo:rsid="00dfbede"/>
    </style:style>
    <style:style style:name="T403" style:family="text">
      <style:text-properties style:font-name="Courier New1" officeooo:rsid="0157c4a5"/>
    </style:style>
    <style:style style:name="T40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5" style:family="text">
      <style:text-properties officeooo:rsid="00a8c39a"/>
    </style:style>
    <style:style style:name="T406" style:family="text">
      <style:text-properties style:font-name="Courier New1" officeooo:rsid="00a8c39a"/>
    </style:style>
    <style:style style:name="T40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8" style:family="text">
      <style:text-properties officeooo:rsid="00653164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0" style:family="text">
      <style:text-properties style:font-name="Courier New1" officeooo:rsid="00653164"/>
    </style:style>
    <style:style style:name="T411" style:family="text">
      <style:text-properties officeooo:rsid="0032f870"/>
    </style:style>
    <style:style style:name="T412" style:family="text">
      <style:text-properties officeooo:rsid="00f53c6c"/>
    </style:style>
    <style:style style:name="T41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14" style:family="text">
      <style:text-properties officeooo:rsid="0112ac2d"/>
    </style:style>
    <style:style style:name="T4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6" style:family="text">
      <style:text-properties style:font-name="Courier New1" officeooo:rsid="0112ac2d"/>
    </style:style>
    <style:style style:name="T417" style:family="text">
      <style:text-properties officeooo:rsid="00c05bfa"/>
    </style:style>
    <style:style style:name="T418" style:family="text">
      <style:text-properties style:font-name="Courier New1" officeooo:rsid="00c05bfa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3" style:family="text">
      <style:text-properties officeooo:rsid="00b80e06"/>
    </style:style>
    <style:style style:name="T424" style:family="text">
      <style:text-properties style:font-name="Courier New1" officeooo:rsid="00b80e06"/>
    </style:style>
    <style:style style:name="T4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7" style:family="text">
      <style:text-properties officeooo:rsid="006c0690"/>
    </style:style>
    <style:style style:name="T428" style:family="text">
      <style:text-properties style:font-name="Courier New1" officeooo:rsid="006c0690"/>
    </style:style>
    <style:style style:name="T42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30" style:family="text">
      <style:text-properties officeooo:rsid="00320722"/>
    </style:style>
    <style:style style:name="T431" style:family="text">
      <style:text-properties style:font-name="Courier New1" officeooo:rsid="00320722"/>
    </style:style>
    <style:style style:name="T43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33" style:family="text">
      <style:text-properties officeooo:rsid="006c5dae"/>
    </style:style>
    <style:style style:name="T434" style:family="text">
      <style:text-properties fo:language="en" fo:country="US" fo:font-weight="bold" officeooo:rsid="00e86c1e" style:font-weight-asian="bold" style:font-weight-complex="bold"/>
    </style:style>
    <style:style style:name="T435" style:family="text">
      <style:text-properties fo:language="en" fo:country="US" fo:font-weight="normal" officeooo:rsid="00e86c1e" style:font-weight-asian="normal" style:font-weight-complex="normal"/>
    </style:style>
    <style:style style:name="T436" style:family="text">
      <style:text-properties fo:language="en" fo:country="US" fo:font-weight="normal" officeooo:rsid="00ee95d9" style:font-weight-asian="normal" style:font-weight-complex="normal"/>
    </style:style>
    <style:style style:name="T437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8" style:family="text">
      <style:text-properties fo:language="en" fo:country="US" fo:font-weight="normal" officeooo:rsid="009943ad" style:font-weight-asian="normal" style:font-weight-complex="normal"/>
    </style:style>
    <style:style style:name="T439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40" style:family="text">
      <style:text-properties fo:language="en" fo:country="US" fo:font-weight="bold" officeooo:rsid="00ea689f" style:font-weight-asian="bold" style:font-weight-complex="bold"/>
    </style:style>
    <style:style style:name="T441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42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43" style:family="text">
      <style:text-properties fo:language="en" fo:country="US" fo:font-weight="normal" officeooo:rsid="00ea689f" style:font-weight-asian="normal" style:font-weight-complex="normal"/>
    </style:style>
    <style:style style:name="T444" style:family="text">
      <style:text-properties fo:language="en" fo:country="US" fo:font-weight="normal" officeooo:rsid="00ed151b" style:font-weight-asian="normal" style:font-weight-complex="normal"/>
    </style:style>
    <style:style style:name="T445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6" style:family="text">
      <style:text-properties fo:language="en" fo:country="US" fo:font-weight="normal" officeooo:rsid="00eb95d3" style:font-weight-asian="normal" style:font-weight-complex="normal"/>
    </style:style>
    <style:style style:name="T447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8" style:family="text">
      <style:text-properties fo:language="en" fo:country="US" fo:font-weight="normal" officeooo:rsid="00cbe9a7" style:font-weight-asian="normal" style:font-weight-complex="normal"/>
    </style:style>
    <style:style style:name="T449" style:family="text">
      <style:text-properties fo:language="en" fo:country="US" fo:font-weight="normal" officeooo:rsid="00dd98da" style:font-weight-asian="normal" style:font-weight-complex="normal"/>
    </style:style>
    <style:style style:name="T450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51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52" style:family="text">
      <style:text-properties fo:language="en" fo:country="US" fo:font-weight="normal" officeooo:rsid="00c41095" style:font-weight-asian="normal" style:font-weight-complex="normal"/>
    </style:style>
    <style:style style:name="T453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6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but less compatible statusline <text:span text:style-name="T124">(</text:span>z5+ <text:span text:style-name="T124">only)</text:span>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5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6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6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7">and moves</text:span>, <text:span text:style-name="T125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6">not score</text:span> on the statusline.</text:h>
      <text:h text:style-name="P60" text:outline-level="2">Story = <text:span text:style-name="T128">"</text:span>text<text:span text:style-name="T128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9"> </text:span><text:span text:style-name="T130">number</text:span>. Requires <text:span text:style-name="T14">TASKS_PROVIDED</text:span>.</text:h>
      <text:h text:style-name="Heading_20_2" text:outline-level="2">Banner<text:span text:style-name="T131">()</text:span></text:h>
      <text:h text:style-name="P65" text:outline-level="6">Print the game name, <text:span text:style-name="T132">serial#</text:span><text:span text:style-name="T109"> </text:span>etc. <text:span text:style-name="T109">To </text:span><text:span text:style-name="T132">skip</text:span><text:span text:style-name="T109"> this at game start, </text:span><text:span text:style-name="T132">r</text:span><text:span text:style-name="T109">eturn 2 from </text:span><text:span text:style-name="T14">Initialise</text:span><text:span text:style-name="T133"> </text:span><text:span text:style-name="T109">and call </text:span><text:span text:style-name="T14">Banner</text:span> later.</text:h>
      <text:h text:style-name="P66" text:outline-level="2"><text:span text:style-name="T134">C</text:span><text:span text:style-name="T135">hangeFgColour</text:span><text:span text:style-name="T99">(</text:span><text:span text:style-name="T135">colour</text:span><text:span text:style-name="T99">)</text:span><text:span text:style-name="T136"> </text:span><text:span text:style-name="T137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7">PUNY++</text:span></text:h>
      <text:h text:style-name="P69" text:outline-level="6"><text:span text:style-name="T134">Call from entry point routine </text:span><text:span text:style-name="T138">ChooseObjectsFinal </text:span>to remove option<text:span text:style-name="T139"> </text:span><text:span text:style-name="T138">number</text:span><text:span text:style-name="T139"> </text:span>(0 or higher)<text:span text:style-name="T139">.</text:span></text:h>
      <text:h text:style-name="P68" text:outline-level="2">ChooseObjectsFinal_<text:span text:style-name="T140">Pick</text:span>(number) <text:span text:style-name="T137">PUNY++</text:span></text:h>
      <text:h text:style-name="P69" text:outline-level="6"><text:span text:style-name="T139">Call from entry point routine </text:span><text:span text:style-name="T138">ChooseObjectsFinal </text:span><text:span text:style-name="T139">to </text:span><text:span text:style-name="T141">pick</text:span><text:span text:style-name="T139"> option </text:span><text:span text:style-name="T138">number</text:span><text:span text:style-name="T139"> (0 or higher).</text:span></text:h>
      <text:h text:style-name="P70" text:outline-level="2"><text:span text:style-name="T134">C</text:span><text:span text:style-name="T99">learScreen(window)</text:span><text:span text:style-name="T142"> </text:span><text:span text:style-name="T143">~P</text:span><text:span text:style-name="T55">UNY</text:span></text:h>
      <text:h text:style-name="P71" text:outline-level="6"><text:span text:style-name="T99">z5+ only. Call with argument </text:span><text:span text:style-name="T144">WIN_MAIN</text:span><text:span text:style-name="T99">, </text:span><text:span text:style-name="T144">WIN_STATUS</text:span><text:span text:style-name="T99"> or </text:span><text:span text:style-name="T144">WIN_ALL </text:span><text:span text:style-name="T99">to </text:span><text:span text:style-name="T145">set colours (if </text:span><text:span text:style-name="T146">clr_on</text:span><text:span text:style-name="T145"> is </text:span><text:span text:style-name="T146">true</text:span><text:span text:style-name="T145">) and </text:span><text:span text:style-name="T99">clear main and/or </text:span><text:span text:style-name="T147">status</text:span><text:span text:style-name="T99"> window. </text:span></text:h>
      <text:h text:style-name="Heading_20_2" text:outline-level="2">CommonAncestor<text:span text:style-name="T148">(object1, object2)</text:span></text:h>
      <text:h text:style-name="P65" text:outline-level="6"><text:span text:style-name="T149">Return</text:span> the <text:span text:style-name="T149">neare</text:span>st object that contains both <text:span text:style-name="T14">object1</text:span> and <text:span text:style-name="T14">object2</text:span> <text:span text:style-name="T150">on some level</text:span>, or <text:span text:style-name="T14">false</text:span>.</text:h>
      <text:h text:style-name="P72" text:outline-level="2">DoorDir(object) <text:span text:style-name="T137">PUNY++</text:span></text:h>
      <text:h text:style-name="P73" text:outline-level="6">Returns the direction <text:span text:style-name="T151">in which</text:span> the door object lies.</text:h>
      <text:h text:style-name="P72" text:outline-level="2">Door<text:span text:style-name="T140">To</text:span>(object) <text:span text:style-name="T137">PUNY++</text:span></text:h>
      <text:h text:style-name="P73" text:outline-level="6">Returns the room which the door object <text:span text:style-name="T151">leads to</text:span><text:span text:style-name="T152">, or 1 if object.door_to is a routine and it returned 1, meaning it printed a message why the player can't enter</text:span>.</text:h>
      <text:h text:style-name="P74" text:outline-level="2">DrawStatusLine<text:span text:style-name="T150">(</text:span><text:span text:style-name="T153">newlines</text:span><text:span text:style-name="T150">)</text:span><text:span text:style-name="T153"> </text:span><text:span text:style-name="T143">~P</text:span><text:span text:style-name="T55">UNY</text:span></text:h>
      <text:h text:style-name="P75" text:outline-level="6"><text:span text:style-name="T153">z5+ only. </text:span>Print the statusline.<text:span text:style-name="T153"> If </text:span><text:span text:style-name="T154">newlines</text:span><text:span text:style-name="T153"> is true, it must instead print as many newlines as the statusline height</text:span></text:h>
      <text:h text:style-name="P76" text:outline-level="2"><text:span text:style-name="T155">FastSpaces</text:span>(<text:span text:style-name="T155">number</text:span>) <text:span text:style-name="T156">PUNY++</text:span></text:h>
      <text:h text:style-name="Heading_20_6" text:outline-level="6">Print <text:span text:style-name="T157">number</text:span><text:span text:style-name="T158"> spaces in an efficient manner.</text:span></text:h>
      <text:h text:style-name="P77" text:outline-level="2">ImplicitDisrobeIfWorn(object) <text:span text:style-name="T137">PUNY++</text:span></text:h>
      <text:h text:style-name="P78" text:outline-level="6">Take off object if worn. Return false for success.</text:h>
      <text:h text:style-name="P77" text:outline-level="2">Implicit<text:span text:style-name="T140">Grab</text:span>If<text:span text:style-name="T140">NotHeld</text:span>(object) <text:span text:style-name="T137">PUNY++</text:span></text:h>
      <text:h text:style-name="P78" text:outline-level="6">Take object if <text:span text:style-name="T151">not held</text:span>. Return false for success.</text:h>
      <text:h text:style-name="P79" text:outline-level="2">IndirectlyContains<text:span text:style-name="T150">(object1, object2)</text:span></text:h>
      <text:h text:style-name="P80" text:outline-level="6">Return <text:span text:style-name="T14">true</text:span> if <text:span text:style-name="T14">object</text:span><text:span text:style-name="T159">1</text:span> <text:span text:style-name="T160">holds</text:span> <text:span text:style-name="T14">object</text:span><text:span text:style-name="T161">2</text:span>, on some level.<text:span text:style-name="T162"> </text:span></text:h>
      <text:h text:style-name="P81" text:outline-level="2"><text:span text:style-name="T163">IsARoutine</text:span>(<text:span text:style-name="T163">value</text:span>) <text:span text:style-name="T156">PUNY++</text:span></text:h>
      <text:h text:style-name="P82" text:outline-level="6"><text:span text:style-name="T124">Return true if value can be a routine address</text:span><text:span text:style-name="T158">.</text:span></text:h>
      <text:h text:style-name="P81" text:outline-level="2"><text:span text:style-name="T163">IsAString</text:span>(<text:span text:style-name="T163">value</text:span>) <text:span text:style-name="T156">PUNY++</text:span></text:h>
      <text:h text:style-name="P82" text:outline-level="6"><text:span text:style-name="T124">Return true if value can be a string address</text:span><text:span text:style-name="T158">.</text:span></text:h>
      <text:h text:style-name="P83" text:outline-level="2"><text:span text:style-name="T164">LanguageNumber</text:span><text:span text:style-name="T150">(</text:span><text:span text:style-name="T164">number</text:span><text:span text:style-name="T150">)</text:span></text:h>
      <text:h text:style-name="P80" text:outline-level="6"><text:span text:style-name="T132">Print</text:span> <text:span text:style-name="T165">number</text:span><text:span text:style-name="T132"> using words</text:span>.<text:span text:style-name="T109"> Requires </text:span><text:span text:style-name="T165">OPTIONAL_LANGUAGE_NUMBER</text:span><text:span text:style-name="T109">.</text:span><text:span text:style-name="T162"> </text:span></text:h>
      <text:h text:style-name="P79" text:outline-level="2">LoopOverScope<text:span text:style-name="T150">(</text:span><text:span text:style-name="T166">routine</text:span><text:span text:style-name="T150">, actor)</text:span></text:h>
      <text:h text:style-name="P75" text:outline-level="6">Call <text:span text:style-name="T167">routine</text:span> once for e<text:span text:style-name="T168">ach</text:span> object in scope for <text:span text:style-name="T14">actor</text:span> (default<text:span text:style-name="T168">:</text:span> <text:span text:style-name="T14">player</text:span>), passing the object as a parameter.</text:h>
      <text:h text:style-name="P84" text:outline-level="2">MoveFloatingObjects()</text:h>
      <text:h text:style-name="P85" text:outline-level="6">Check which objects with <text:span text:style-name="T14">found_in</text:span> should be present.</text:h>
      <text:h text:style-name="Heading_20_2" text:outline-level="2"><text:soft-page-break/>NextWord<text:span text:style-name="T150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9">()</text:span></text:h>
      <text:h text:style-name="P86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NumberWord<text:span text:style-name="T169">(numword)</text:span></text:h>
      <text:h text:style-name="P87" text:outline-level="6">If <text:span text:style-name="T14">numword</text:span> is a word<text:span text:style-name="T170">, e.g. </text:span><text:span text:style-name="T171">'</text:span><text:span text:style-name="T172">six</text:span><text:span text:style-name="T171">'</text:span><text:span text:style-name="T172">,</text:span> representing a number<text:span text:style-name="T173"> 1-20</text:span>, return the number. <text:span text:style-name="T173">If not,</text:span> return <text:span text:style-name="T14">false</text:span>.<text:span text:style-name="T174"> </text:span><text:span text:style-name="T175">Requires</text:span><text:span text:style-name="T174"> </text:span><text:span text:style-name="T176">OPTIONAL_ALLOW_WRITTEN_NUMBERS</text:span><text:span text:style-name="T174">.</text:span></text:h>
      <text:h text:style-name="Heading_20_2" text:outline-level="2">NumberWords<text:span text:style-name="T169">()</text:span></text:h>
      <text:h text:style-name="P86" text:outline-level="6">Return the number of words in player input.</text:h>
      <text:h text:style-name="P88" text:outline-level="2">ObjectCapacity<text:span text:style-name="T169">(object)</text:span><text:span text:style-name="T45"> </text:span><text:span text:style-name="T17">PUNY++</text:span></text:h>
      <text:h text:style-name="P86" text:outline-level="6">Return the object's value for the <text:span text:style-name="T14">capacity</text:span> property, <text:span text:style-name="T49">defaulting to</text:span> <text:span text:style-name="T14">DEFAULT_CAPACITY</text:span> <text:span text:style-name="T177">or 100 if not defined</text:span>.</text:h>
      <text:h text:style-name="Heading_20_2" text:outline-level="2">ObjectIsUntouchable<text:span text:style-name="T178">(object, flag)</text:span></text:h>
      <text:h text:style-name="P89" text:outline-level="6"><text:span text:style-name="T169">Return </text:span><text:span text:style-name="T179">true</text:span><text:span text:style-name="T169"> if </text:span><text:span text:style-name="T180">player</text:span> can't <text:span text:style-name="T181">touch</text:span> <text:span text:style-name="T180">o</text:span><text:span text:style-name="T179">bject</text:span><text:span text:style-name="T182">. If</text:span><text:span text:style-name="T183"> so, </text:span><text:span text:style-name="T178">and </text:span><text:span text:style-name="T184">flag</text:span><text:span text:style-name="T178"> is </text:span><text:span text:style-name="T184">false</text:span><text:span text:style-name="T178"> or unspecified, also print a message.</text:span></text:h>
      <text:h text:style-name="P90" text:outline-level="2"><text:span text:style-name="T185">OzmooColoursAvailable</text:span>() <text:span text:style-name="T137">PUNY++</text:span></text:h>
      <text:h text:style-name="P91" text:outline-level="6"><text:span text:style-name="T186">Returns true if the game is being played on Z-code interpreter Ozmoo, with the 8 extra colours available</text:span><text:span text:style-name="T139">.</text:span></text:h>
      <text:h text:style-name="P92" text:outline-level="2">ParseToken(type, data)</text:h>
      <text:h text:style-name="P93" text:outline-level="6">Use <text:span text:style-name="T187">in general parsing routines</text:span>. See DM4 index for examples.</text:h>
      <text:h text:style-name="Heading_20_2" text:outline-level="2">PlaceInScope<text:span text:style-name="T188">(object)</text:span></text:h>
      <text:h text:style-name="P94" text:outline-level="6">Use in user-supplied scope routines to put <text:span text:style-name="T189">object</text:span> in scope. <text:span text:style-name="T190">Ignores</text:span><text:span text:style-name="T188"> </text:span><text:span text:style-name="T191">add_to_scope</text:span><text:span text:style-name="T188"> property</text:span><text:span text:style-name="T192"> </text:span><text:span text:style-name="T190">and</text:span><text:span text:style-name="T192"> children</text:span><text:span text:style-name="T188">.</text:span></text:h>
      <text:h text:style-name="Heading_20_2" text:outline-level="2">PlayerTo<text:span text:style-name="T188">(object, flag)</text:span></text:h>
      <text:h text:style-name="P95" text:outline-level="6">Move player to <text:span text:style-name="T14">object</text:span><text:span text:style-name="T193">, which must be a room or an enterable object. If </text:span><text:span text:style-name="T14">flag</text:span><text:span text:style-name="T193"> is </text:span><text:span text:style-name="T161">0</text:span><text:span text:style-name="T193"> or omitted, print a </text:span><text:span text:style-name="T194">long</text:span><text:span text:style-name="T193"> room description. If </text:span><text:span text:style-name="T14">flag</text:span><text:span text:style-name="T193"> is </text:span><text:span text:style-name="T14">1</text:span><text:span text:style-name="T193">, </text:span><text:span text:style-name="T195">keep quiet</text:span><text:span text:style-name="T193">. If </text:span><text:span text:style-name="T14">flag</text:span><text:span text:style-name="T193"> is </text:span><text:span text:style-name="T14">2</text:span><text:span text:style-name="T193">, print a room description </text:span><text:span text:style-name="T49">based on</text:span><text:span text:style-name="T193"> the </text:span><text:span text:style-name="T14">lookmode</text:span><text:span text:style-name="T193"> value.</text:span></text:h>
      <text:h text:style-name="P88" text:outline-level="2">PrintContents<text:span text:style-name="T188">(</text:span><text:span text:style-name="T196">text, object, </text:span><text:span text:style-name="T197">style</text:span><text:span text:style-name="T196">)</text:span><text:span text:style-name="T45"> </text:span><text:span text:style-name="T17">PUNY++</text:span></text:h>
      <text:h text:style-name="P96" text:outline-level="6"><text:span text:style-name="T198">Recursively l</text:span><text:span text:style-name="T188">ist contents of </text:span><text:span text:style-name="T191">object</text:span><text:span text:style-name="T188">.</text:span><text:span text:style-name="T196"> Hide items that have </text:span><text:span text:style-name="T199">concealed</text:span><text:span text:style-name="T196"> or </text:span><text:span text:style-name="T199">scenery</text:span><text:span text:style-name="T196">, unless </text:span><text:span text:style-name="T199">action</text:span><text:span text:style-name="T196"> is </text:span><text:span text:style-name="T199">##Inv</text:span><text:span text:style-name="T196">.</text:span><text:span text:style-name="T109"> </text:span><text:span text:style-name="T195">P</text:span><text:span text:style-name="T196">rint </text:span><text:span text:style-name="T183">or run </text:span><text:span text:style-name="T199">text</text:span><text:span text:style-name="T196"> </text:span><text:span text:style-name="T200">(unless 0) </text:span><text:span text:style-name="T196">before first </text:span><text:span text:style-name="T195">item</text:span><text:span text:style-name="T196">. If </text:span><text:span text:style-name="T201">style</text:span><text:span text:style-name="T202"> has</text:span><text:span text:style-name="T196"> </text:span><text:span text:style-name="T203">WORKFLAG_BIT </text:span>set, <text:span text:style-name="T196">only print objects which have the </text:span><text:span text:style-name="T199">workflag</text:span><text:span text:style-name="T196"> attribute. If </text:span><text:span text:style-name="T132">it</text:span><text:span text:style-name="T202"> has</text:span><text:span text:style-name="T196"> </text:span><text:span text:style-name="T203">ISARE_BIT</text:span><text:span text:style-name="T202"> s</text:span><text:span text:style-name="T196">et,</text:span><text:span text:style-name="T202"> print "is" or "are" before list.</text:span><text:span text:style-name="T204"> If it has </text:span><text:span text:style-name="T205">NEWLINE_BIT</text:span><text:span text:style-name="T204"> set, print each object on a new line.</text:span><text:span text:style-name="T202"> </text:span><text:span text:style-name="T196">Return </text:span><text:span text:style-name="T199">true</text:span><text:span text:style-name="T196"> if any objects were listed.</text:span><text:span text:style-name="T206"> Call with </text:span><text:span text:style-name="T207">text==1</text:span><text:span text:style-name="T206"> to not print anything but return </text:span><text:span text:style-name="T207">0</text:span><text:span text:style-name="T206"> </text:span><text:span text:style-name="T208">if </text:span><text:span text:style-name="T209">object</text:span><text:span text:style-name="T208"> contains no</text:span><text:span text:style-name="T206"> </text:span><text:span text:style-name="T208">printable objects</text:span><text:span text:style-name="T206">, </text:span><text:span text:style-name="T207">1</text:span><text:span text:style-name="T206"> </text:span><text:span text:style-name="T210">if contents </text:span><text:span text:style-name="T211">can</text:span><text:span text:style-name="T210"> be prefixed with "is", </text:span><text:span text:style-name="T212">2</text:span><text:span text:style-name="T210"> for "are"</text:span><text:span text:style-name="T213">.</text:span><text:span text:style-name="T206"> </text:span></text:h>
      <text:h text:style-name="P97" text:outline-level="2">PrintContents<text:span text:style-name="T214">FromR</text:span><text:span text:style-name="T188">(</text:span><text:span text:style-name="T196">text, objec</text:span><text:span text:style-name="T214">t</text:span><text:span text:style-name="T196">)</text:span><text:span text:style-name="T45"> </text:span><text:span text:style-name="T17">PUNY++</text:span></text:h>
      <text:h text:style-name="P98" text:outline-level="6"><text:span text:style-name="T215">Like PrintContents, but </text:span><text:span text:style-name="T198">l</text:span><text:span text:style-name="T188">ist </text:span><text:span text:style-name="T191">object</text:span><text:span text:style-name="T216"> </text:span><text:span text:style-name="T217">and its siblings </text:span><text:span text:style-name="T218">+ contents</text:span><text:span text:style-name="T214">, retaining </text:span><text:span text:style-name="T215">curr</text:span><text:span text:style-name="T214">ent style and indentation</text:span><text:span text:style-name="T215">.</text:span><text:span text:style-name="T196"> </text:span></text:h>
      <text:h text:style-name="Heading_20_2" text:outline-level="2">PrintMsg(<text:span text:style-name="T219">msg</text:span>, arg1, arg2) <text:span text:style-name="T156">PUNY++</text:span></text:h>
      <text:h text:style-name="P99" text:outline-level="6">Print<text:span text:style-name="T183"> </text:span>library message<text:span text:style-name="T183"> </text:span><text:span text:style-name="T180">msg</text:span><text:span text:style-name="T183"> </text:span>. Some <text:span text:style-name="T220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6">(object, property</text:span><text:span text:style-name="T221">, flag</text:span><text:span text:style-name="T196">)</text:span></text:h>
      <text:h text:style-name="P99" text:outline-level="6">If <text:span text:style-name="T14">object.property</text:span> <text:span text:style-name="T222">holds a</text:span><text:span text:style-name="T221"> routine or list of routines, run them using </text:span><text:span text:style-name="T223">RunRoutines</text:span><text:span text:style-name="T224">(object, property)</text:span><text:span text:style-name="T221">. If it holds </text:span>a string, print <text:span text:style-name="T222">it</text:span><text:span text:style-name="T221"> and then a newline. If </text:span><text:span text:style-name="T223">flag</text:span><text:span text:style-name="T221"> is </text:span><text:span text:style-name="T223">true</text:span><text:span text:style-name="T221">, skip the newline.</text:span></text:h>
      <text:h text:style-name="Heading_20_2" text:outline-level="2">PronounNotice<text:span text:style-name="T221">(objec</text:span><text:span text:style-name="T225">t</text:span><text:span text:style-name="T221">)</text:span></text:h>
      <text:h text:style-name="P100" text:outline-level="6">Make <text:span text:style-name="T190">a</text:span><text:span text:style-name="T226"> pronoun (</text:span><text:span text:style-name="T227">'it'</text:span><text:span text:style-name="T226">, </text:span><text:span text:style-name="T227">'her'</text:span><text:span text:style-name="T226"> </text:span><text:span text:style-name="T228">etc</text:span><text:span text:style-name="T226">) refer to </text:span><text:span text:style-name="T227">object</text:span><text:span text:style-name="T226">.</text:span></text:h>
      <text:h text:style-name="Heading_20_2" text:outline-level="2">RunRoutines<text:span text:style-name="T221">(object, property, switch)</text:span></text:h>
      <text:h text:style-name="P101" text:outline-level="6">I<text:span text:style-name="T196">f </text:span><text:span text:style-name="T199">object.property</text:span><text:span text:style-name="T196"> </text:span>holds a routine or list of routines, run <text:span text:style-name="T229">each routine </text:span>until one of them return<text:span text:style-name="T229">s</text:span> <text:span text:style-name="T230">a non-zero value</text:span>. Return the return value of the last routine <text:span text:style-name="T230">run</text:span>.<text:line-break/><text:span text:style-name="T229">If </text:span><text:span text:style-name="T224">switch</text:span><text:span text:style-name="T229"> has a non-zero value, the routines can have switch-clauses to match this value</text:span><text:span text:style-name="T231">, otherwise </text:span><text:span text:style-name="T229">they can have switch-clauses </text:span><text:span text:style-name="T231">to </text:span><text:span text:style-name="T229">match </text:span><text:span text:style-name="T224">action</text:span><text:span text:style-name="T229">.</text:span></text:h>
      <text:h text:style-name="Heading_20_2" text:outline-level="2">ScopeWithin<text:span text:style-name="T229">(object)</text:span></text:h>
      <text:h text:style-name="P102" text:outline-level="6">Use in user-supplied scope routines<text:span text:style-name="T232">. Put all </text:span><text:span text:style-name="T190">item</text:span><text:span text:style-name="T232">s which are in </text:span><text:span text:style-name="T233">object</text:span><text:span text:style-name="T232"> into scope, also recursively searching supporters, transparent objects and open containers, and check the </text:span><text:span text:style-name="T233">add_to_scope</text:span><text:span text:style-name="T232"> property of all objects added</text:span><text:span text:style-name="T188">.</text:span></text:h>
      <text:h text:style-name="Heading_20_2" text:outline-level="2">SetTime(<text:span text:style-name="T24">number</text:span>, step)</text:h>
      <text:h text:style-name="P103" text:outline-level="6">Sets the time to <text:span text:style-name="T14">number</text:span> minutes after midnight. If <text:span text:style-name="T14">step</text:span> is a positive number, one turn takes <text:span text:style-name="T234">step</text:span> minutes. Otherwise, there are <text:span text:style-name="T14">-step</text:span> turns to a minute.</text:h>
      <text:h text:style-name="Heading_20_2" text:outline-level="2">TestScope<text:span text:style-name="T235">(</text:span><text:span text:style-name="T174">object, actor)</text:span></text:h>
      <text:h text:style-name="P104" text:outline-level="6"><text:span text:style-name="T174">Return </text:span><text:span text:style-name="T176">true</text:span><text:span text:style-name="T174"> if </text:span><text:span text:style-name="T176">object</text:span><text:span text:style-name="T174"> is in scope for </text:span><text:span text:style-name="T176">actor</text:span><text:span text:style-name="T174"> (defaults to </text:span><text:span text:style-name="T176">player</text:span><text:span text:style-name="T174">).</text:span></text:h>
      <text:h text:style-name="Heading_20_2" text:outline-level="2">TryNumber<text:span text:style-name="T174">(wordnum)</text:span></text:h>
      <text:h text:style-name="P105" text:outline-level="6"><text:span text:style-name="T49">Try to parse</text:span> word <text:span text:style-name="T14">wordnum</text:span> in player input as a number<text:span text:style-name="T49">. </text:span><text:span text:style-name="T236">R</text:span><text:span text:style-name="T49">eturn the number (0-10000</text:span><text:span text:style-name="T236">)</text:span><text:span text:style-name="T49">, </text:span><text:span text:style-name="T236">or -1000 for invalid number</text:span><text:span text:style-name="T49">. If </text:span><text:span text:style-name="T234">OPTIONAL_ALLOW_WRITTEN_NUMBERS</text:span><text:span text:style-name="T49"> is defined, also </text:span><text:span text:style-name="T237">parse</text:span><text:span text:style-name="T49"> number word</text:span><text:span text:style-name="T237">s</text:span><text:span text:style-name="T49"> (</text:span><text:span text:style-name="T234">'one'</text:span><text:span text:style-name="T49"> .. </text:span><text:span text:style-name="T234">'twenty'</text:span><text:span text:style-name="T49">).</text:span></text:h>
      <text:h text:style-name="Heading_20_2" text:outline-level="2">WordAddress<text:span text:style-name="T174">(wordnum)</text:span></text:h>
      <text:h text:style-name="P105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4">(wordnum)</text:span></text:h>
      <text:h text:style-name="P105" text:outline-level="6">Return the <text:span text:style-name="T238">length of</text:span> word <text:span text:style-name="T14">wordnum</text:span> in player input.</text:h>
      <text:h text:style-name="Heading_20_2" text:outline-level="2">WordValue<text:span text:style-name="T174">(wordnum)</text:span></text:h>
      <text:h text:style-name="P105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1">()</text:span></text:h>
      <text:h text:style-name="P106" text:outline-level="6"><text:span text:style-name="T239">Wait for the player to type something. Return </text:span><text:span text:style-name="T240">true</text:span><text:span text:style-name="T239"> if they type</text:span><text:span text:style-name="T241">d</text:span><text:span text:style-name="T242"> yes</text:span><text:span text:style-name="T243">, </text:span><text:span text:style-name="T240">false</text:span><text:span text:style-name="T239"> if they type</text:span><text:span text:style-name="T241">d</text:span><text:span text:style-name="T242"> no</text:span><text:span text:style-name="T243">, or ask again.</text:span></text:h>
      <text:p text:style-name="P37"/>
      <text:h text:style-name="P107" text:outline-level="1">Print<text:span text:style-name="T244">ing</text:span> rules</text:h>
      <text:p text:style-name="P108">A printing rule is used to print something based on one argument, typically an object. <text:span text:style-name="T245">Example</text:span><text:span text:style-name="T246"> of </text:span><text:span text:style-name="T247">use</text:span>: <text:line-break/><text:span text:style-name="T14">print "The </text:span><text:span text:style-name="T248">pump</text:span><text:span text:style-name="T14"> is ", (OnOff) Pump, ".^";</text:span></text:p>
      <text:h text:style-name="P109" text:outline-level="2">CObjIs<text:span text:style-name="T45"> </text:span><text:span text:style-name="T17">PUNY++</text:span></text:h>
      <text:h text:style-name="P110" text:outline-level="6">Prints <text:span text:style-name="T249">"</text:span><text:span text:style-name="T250">T</text:span>he <text:span text:style-name="T249">(</text:span>object<text:span text:style-name="T249">) "</text:span>, and "is" or "are"<text:span text:style-name="T251"> (see </text:span><text:span text:style-name="T252">IsOrAre</text:span><text:span text:style-name="T251">).</text:span></text:h>
      <text:h text:style-name="P111" text:outline-level="2">CTheyreor<text:span text:style-name="T253">I</text:span>ts<text:span text:style-name="T254"> </text:span><text:span text:style-name="T17">PUNY++</text:span></text:h>
      <text:h text:style-name="P112" text:outline-level="6">Prints "<text:span text:style-name="T255">It</text:span>'s" or "They're" or "He's" <text:span text:style-name="T250">etc</text:span><text:span text:style-name="T256">.</text:span></text:h>
      <text:h text:style-name="P113" text:outline-level="2">CTheyreorThats</text:h>
      <text:h text:style-name="P112" text:outline-level="6">Prints "That's" or "They're" or "He's" <text:span text:style-name="T250">etc</text:span><text:span text:style-name="T256">.</text:span></text:h>
      <text:h text:style-name="P113" text:outline-level="2">IsOrAre</text:h>
      <text:h text:style-name="P114" text:outline-level="6">Prints "is" or "are", based on <text:span text:style-name="T14">pluralname</text:span><text:span text:style-name="T256"> and if the object is the player object</text:span>.</text:h>
      <text:h text:style-name="P115" text:outline-level="2">ItorThem</text:h>
      <text:h text:style-name="P114" text:outline-level="6"><text:span text:style-name="T256">Prints "it", "them", "her"</text:span><text:span text:style-name="T257"> etc</text:span><text:span text:style-name="T258">.</text:span></text:h>
      <text:h text:style-name="P116" text:outline-level="2">ObjIs<text:span text:style-name="T45"> </text:span><text:span text:style-name="T17">PUNY++</text:span></text:h>
      <text:h text:style-name="P117" text:outline-level="6">Prints <text:span text:style-name="T249">"</text:span><text:span text:style-name="T259">t</text:span>he <text:span text:style-name="T249">(</text:span>object<text:span text:style-name="T249">) "</text:span>, and "is" or "are"<text:span text:style-name="T251"> (see </text:span><text:span text:style-name="T252">IsOrAre</text:span><text:span text:style-name="T251">).</text:span></text:h>
      <text:h text:style-name="P88" text:outline-level="2">OnOff<text:span text:style-name="T45"> </text:span><text:span text:style-name="T17">PUNY++</text:span></text:h>
      <text:h text:style-name="P110" text:outline-level="6">Prints "on" or "off", based on <text:span text:style-name="T14">on</text:span>.</text:h>
      <text:h text:style-name="P118" text:outline-level="2">SingularS <text:span text:style-name="T17">PUNY++</text:span></text:h>
      <text:h text:style-name="P119" text:outline-level="6">Prints "s" if the object doesn't have <text:span text:style-name="T260">pluralname</text:span><text:span text:style-name="T193">.</text:span></text:h>
      <text:h text:style-name="P120" text:outline-level="2">That<text:span text:style-name="T261">o</text:span>rThose</text:h>
      <text:h text:style-name="P121" text:outline-level="6"><text:span text:style-name="T256">Prints "that" or "those" based on </text:span><text:span text:style-name="T260">pluralname</text:span><text:span text:style-name="T256">.</text:span></text:h>
      <text:h text:style-name="P122" text:outline-level="1"/>
      <text:h text:style-name="P123" text:outline-level="1"><text:span text:style-name="T262">E</text:span>ntry point routines</text:h>
      <text:p text:style-name="P124">The<text:span text:style-name="T263">se routines, if defined by the game author, are run under the circumstances stated for each routine.</text:span></text:p>
      <text:h text:style-name="P125" text:outline-level="2">AfterLife<text:span text:style-name="T264">()</text:span></text:h>
      <text:h text:style-name="P126" text:outline-level="6"><text:span text:style-name="T49">When</text:span> player has died. Can <text:span text:style-name="T258">be used to </text:span>revive player.</text:h>
      <text:h text:style-name="P125" text:outline-level="2">AfterPrompt<text:span text:style-name="T264">()</text:span></text:h>
      <text:h text:style-name="P126" text:outline-level="6"><text:span text:style-name="T49">A</text:span>fter the input prompt has been printed.</text:h>
      <text:h text:style-name="P125" text:outline-level="2">Amusing<text:span text:style-name="T264">()</text:span></text:h>
      <text:h text:style-name="P126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3">.</text:span></text:h>
      <text:h text:style-name="P125" text:outline-level="2">BeforeParsing<text:span text:style-name="T264">()</text:span></text:h>
      <text:h text:style-name="P127" text:outline-level="6">After player input, before parsing starts.</text:h>
      <text:h text:style-name="Heading_20_2" text:outline-level="2">ChooseObjects(<text:span text:style-name="T265">obj, code</text:span>)</text:h>
      <text:h text:style-name="P128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6">ex</text:span>clude (<text:span text:style-name="T266">0</text:span>) or include (<text:span text:style-name="T266">1</text:span>) the object. Return 0 to don't interfere, 1 to force inclusion, 2 to force exclusion.</text:h>
      <text:h text:style-name="P129" text:outline-level="2">ChooseObjects<text:span text:style-name="T267">Final</text:span>(<text:span text:style-name="T268">array</text:span><text:span text:style-name="T265">, </text:span><text:span text:style-name="T268">length</text:span>)<text:span text:style-name="T267"> </text:span><text:span text:style-name="T17">PUNY++</text:span></text:h>
      <text:h text:style-name="Heading_20_6" text:outline-level="6"><text:span text:style-name="T269">Called just before having to ask the player which object they mean. </text:span><text:span text:style-name="T270">array</text:span><text:span text:style-name="T269"> holds the address of a word array holding object numbers, </text:span><text:span text:style-name="T270">length</text:span><text:span text:style-name="T269"> holds the number of objects. Use </text:span><text:span text:style-name="T270">ChooseObjectsFinal_Pick</text:span><text:span text:style-name="T271"> </text:span><text:span text:style-name="T269">and/or </text:span><text:span text:style-name="T270">ChooseObjectsFinal_Discard </text:span><text:span text:style-name="T269">to either pick an object or discard options. You may rearrange </text:span><text:span text:style-name="T272">the array.</text:span></text:h>
      <text:h text:style-name="P129" text:outline-level="2">DarkToDark<text:span text:style-name="T264">()</text:span></text:h>
      <text:h text:style-name="P126" text:outline-level="6">When player moves from one dark location to another.</text:h>
      <text:h text:style-name="P125" text:outline-level="2">DeathMessage<text:span text:style-name="T264">()</text:span></text:h>
      <text:h text:style-name="P126" text:outline-level="6">When game ends and <text:span text:style-name="T14">deadflag</text:span> is set to 3 or higher. Should print a <text:span text:style-name="T49">few words</text:span> to say why the game ended.</text:h>
      <text:h text:style-name="P88" text:outline-level="2">DebugParseNameObject<text:span text:style-name="T273">(object)</text:span><text:span text:style-name="T45"> </text:span><text:span text:style-name="T17">PUNY++</text:span></text:h>
      <text:h text:style-name="P126" text:outline-level="6">When the parser checks for match<text:span text:style-name="T273">ing objects</text:span> for a debug verb <text:span text:style-name="T273">like </text:span><text:span text:style-name="T274">'purloin'</text:span>. Return true if <text:span text:style-name="T275">object</text:span> has a <text:span text:style-name="T14">parse_name</text:span> routine.</text:h>
      <text:h text:style-name="P88" text:outline-level="2">DisallowTakeAnimate<text:span text:style-name="T264">()</text:span><text:span text:style-name="T45"> </text:span><text:span text:style-name="T17">PUNY++</text:span></text:h>
      <text:h text:style-name="P130" text:outline-level="6">When the player tries to <text:span text:style-name="T276">take</text:span> <text:span text:style-name="T277">noun</text:span><text:span text:style-name="T276">, which has </text:span><text:span text:style-name="T277">animate</text:span>. Return <text:span text:style-name="T14">false</text:span> <text:span text:style-name="T276">to allow this, or true to disallow it</text:span>.</text:h>
      <text:h text:style-name="P125" text:outline-level="2">GamePostRoutine<text:span text:style-name="T264">()</text:span></text:h>
      <text:h text:style-name="P130" text:outline-level="6">When <text:span text:style-name="T14">after</text:span> routines have been run.</text:h>
      <text:h text:style-name="P125" text:outline-level="2">GamePreRoutine<text:span text:style-name="T264">()</text:span></text:h>
      <text:h text:style-name="P130" text:outline-level="6">Before <text:span text:style-name="T14">before</text:span> routines have been run.</text:h>
      <text:h text:style-name="P131" text:outline-level="2">InScope<text:span text:style-name="T273">(actor)</text:span></text:h>
      <text:h text:style-name="P130" text:outline-level="6">When working out the scope for the actor. <text:span text:style-name="T278">Call </text:span><text:span text:style-name="T279">ScopeWithin</text:span><text:span text:style-name="T278"> and </text:span><text:span text:style-name="T279">PlaceInScope</text:span><text:span text:style-name="T278"> to add objects to scope. Return true if no other objects should be in scope.</text:span></text:h>
      <text:h text:style-name="P132" text:outline-level="2">Initialise<text:span text:style-name="T280"> </text:span><text:span text:style-name="T102">~P</text:span><text:span text:style-name="T17">UNY</text:span></text:h>
      <text:h text:style-name="P133" text:outline-level="6"><text:span text:style-name="T281">Mandatory</text:span><text:span text:style-name="T24">: A </text:span><text:span text:style-name="T282">(possibly empty) </text:span><text:span text:style-name="T24">routine which is called when the game starts. </text:span><text:span text:style-name="T250">May</text:span><text:span text:style-name="T24"> print an introduction. May return 2 to skip the game banner. </text:span><text:span text:style-name="T250">M</text:span><text:span text:style-name="T24">ust set </text:span><text:span text:style-name="T283">location</text:span><text:span text:style-name="T24">, unless </text:span><text:span text:style-name="T283">INITIAL_LOCATION_VALUE</text:span><text:span text:style-name="T24"> </text:span><text:span text:style-name="T250">is</text:span><text:span text:style-name="T24"> defined</text:span><text:span text:style-name="T284">.</text:span></text:h>
      <text:h text:style-name="P134" text:outline-level="2">IsARoom(obj, verdict) <text:span text:style-name="T285">PUNY++</text:span></text:h>
      <text:h text:style-name="P135" text:outline-level="6"><text:span text:style-name="T286">Player has typed </text:span><text:span text:style-name="T287">PLACES,</text:span><text:span text:style-name="T286"> GOTO or ROOMS. </text:span><text:span text:style-name="T14">Verdict </text:span>= <text:span text:style-name="T286">1 or 0</text:span> says if library thinks <text:span text:style-name="T14">obj</text:span> is a room <text:span text:style-name="T286">or not</text:span>. Return 0 to accept, 1 to say it’s a room, 2 to say it’s not.</text:h>
      <text:h text:style-name="P136" text:outline-level="2">LibraryMessages<text:span text:style-name="T131">(number, arg1, arg2)</text:span><text:span text:style-name="T45"> </text:span><text:span text:style-name="T17">PUNY++</text:span></text:h>
      <text:h text:style-name="P137" text:outline-level="6">When a library message is about to be printed. <text:span text:style-name="T288">Use it to print your own complex library messages.</text:span></text:h>
      <text:h text:style-name="P131" text:outline-level="2">LookRoutine</text:h>
      <text:h text:style-name="P138" text:outline-level="6">After the room and everything in it has been described.</text:h>
      <text:h text:style-name="P131" text:outline-level="2">NewRoom</text:h>
      <text:h text:style-name="P138" text:outline-level="6">When the player has entered a new room, before the room is described.</text:h>
      <text:h text:style-name="P139" text:outline-level="2">ParseNoun(object)<text:span text:style-name="T289"> </text:span><text:span text:style-name="T143">~P</text:span><text:span text:style-name="T55">UNY</text:span></text:h>
      <text:h text:style-name="P140" text:outline-level="6"><text:span text:style-name="T290">When checking if input matches </text:span><text:span text:style-name="T291">object</text:span><text:span text:style-name="T24">, before</text:span> <text:span text:style-name="T292">parse_name</text:span><text:span text:style-name="T293"> </text:span><text:span text:style-name="T294">and </text:span><text:span text:style-name="T295">name</text:span><text:span text:style-name="T294"> </text:span><text:span text:style-name="T293">propert</text:span><text:span text:style-name="T290">ies are checked</text:span><text:span text:style-name="T293">. </text:span><text:span text:style-name="T294">Can advance </text:span><text:span text:style-name="T295">wn</text:span><text:span text:style-name="T294"> and</text:span><text:span text:style-name="T296"> </text:span><text:span text:style-name="T297">return </text:span><text:span text:style-name="T298">-1</text:span><text:span text:style-name="T290"> to consume words</text:span><text:span text:style-name="T299"> (</text:span><text:span text:style-name="T300">parse_name</text:span><text:span text:style-name="T299"> + </text:span><text:span text:style-name="T300">name</text:span><text:span text:style-name="T299"> will also be checked)</text:span><text:span text:style-name="T290">, just return <text:line-break/></text:span><text:span text:style-name="T291">-1</text:span><text:span text:style-name="T290"> to not interfere, or return how many words matched.</text:span></text:h>
      <text:h text:style-name="P131" text:outline-level="2">ParseNumber<text:span text:style-name="T301">(buffer, length)</text:span></text:h>
      <text:h text:style-name="P138" text:outline-level="6">When the parser needs to check if <text:span text:style-name="T49">the input word that starts at </text:span><text:span text:style-name="T234">buffer</text:span><text:span text:style-name="T49"> and is </text:span><text:span text:style-name="T234">length</text:span><text:span text:style-name="T49"> bytes long, </text:span>is a number. Return the number, or <text:span text:style-name="T14">false</text:span> if no number was found.</text:h>
      <text:h text:style-name="P125" text:outline-level="2">PrintRank<text:span text:style-name="T264">()</text:span></text:h>
      <text:h text:style-name="P141" text:outline-level="6">When the scor<text:span text:style-name="T49">ing</text:span> message is printed. Prints the final part, typically giving the player a rank based on <text:span text:style-name="T14">score</text:span>.</text:h>
      <text:h text:style-name="P131" text:outline-level="2">PrintTaskName<text:span text:style-name="T302">(n)</text:span></text:h>
      <text:h text:style-name="P141" text:outline-level="6">When listing a completed task. Print name of task <text:span text:style-name="T14">n</text:span>.</text:h>
      <text:h text:style-name="P131" text:outline-level="2">PrintVerb<text:span text:style-name="T302">(verb)</text:span></text:h>
      <text:h text:style-name="P141" text:outline-level="6">When the parser needs to print a verb. Typically needed for long verbs. Return true if the routine printed the verb.</text:h>
      <text:h text:style-name="P125" text:outline-level="2">TimePasses<text:span text:style-name="T264">()</text:span></text:h>
      <text:h text:style-name="P141" text:outline-level="6">After a game turn has ended, in which <text:span text:style-name="T14">turns</text:span> increased.</text:h>
      <text:h text:style-name="P131" text:outline-level="2">UnknownVerb<text:span text:style-name="T302">(word)</text:span></text:h>
      <text:h text:style-name="P142" text:outline-level="6"><text:span text:style-name="T302">When the parser doesn’t recognize the verb. Return</text:span><text:span text:style-name="T303"> </text:span><text:span text:style-name="T302">a dictionary word to use as the verb instead</text:span><text:span text:style-name="T303">, or </text:span><text:span text:style-name="T304">false</text:span><text:span text:style-name="T302">.</text:span></text:h>
      <text:p text:style-name="P143"/>
      <text:h text:style-name="P144" text:outline-level="1">Library objects</text:h>
      <text:h text:style-name="P145" text:outline-level="2">Directions<text:span text:style-name="T45"> </text:span><text:span text:style-name="T17">PUNY</text:span><text:span text:style-name="T57">++</text:span></text:h>
      <text:h text:style-name="P146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7" text:outline-level="6"><text:span text:style-name="T24">The default player object. It’s better to use the </text:span><text:span text:style-name="T283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5">F</text:span><text:span text:style-name="T24">ake room</text:span><text:span text:style-name="T306">. </text:span><text:span text:style-name="T24"><text:s/></text:span><text:span text:style-name="T306">W</text:span><text:span text:style-name="T24">hen </text:span><text:span text:style-name="T283">real_location</text:span><text:span text:style-name="T307"> </text:span><text:span text:style-name="T24">is </text:span><text:span text:style-name="T306">dark, </text:span><text:span text:style-name="T307">location</text:span><text:span text:style-name="T306"> points </text:span><text:span text:style-name="T305">here</text:span><text:span text:style-name="T24">. The player is never moved to </text:span><text:span text:style-name="T283">thedark</text:span><text:span text:style-name="T24">.</text:span></text:h>
      <text:h text:style-name="P148" text:outline-level="2"/>
      <text:h text:style-name="P123" text:outline-level="1">Group 1 actions</text:h>
      <text:p text:style-name="P149"><text:span text:style-name="T308">Group 1 actions are metaverbs that control gameplay, and debug verbs. They don’t run </text:span><text:span text:style-name="T309">before</text:span><text:span text:style-name="T310"> </text:span><text:span text:style-name="T308">or </text:span><text:span text:style-name="T309">after</text:span><text:span text:style-name="T310"> </text:span><text:span text:style-name="T308">routines.</text:span></text:p>
      <text:p text:style-name="P150">Again, FullScore, LookModeLong, LookModeNormal, LookModeShort, NotifyO<text:span text:style-name="T311">ff</text:span>, NotifyO<text:span text:style-name="T311">n</text:span>, Oops, OopsCorrection, Restart, Restore, Save, Score, Version, Quit</text:p>
      <text:p text:style-name="P151"><text:span text:style-name="T312">OPTIONAL_EXTENDED_METAVERBS</text:span><text:span text:style-name="T313"> adds</text:span>: <text:span text:style-name="T14">CommandsOff, CommandsOn, CommandsRead, Objects, Places, Scrip</text:span><text:span text:style-name="T314">t</text:span><text:span text:style-name="T14">Off, ScriptOn, Verify</text:span></text:p>
      <text:p text:style-name="P152"><text:span text:style-name="T312">DEBUG</text:span><text:span text:style-name="T313"> adds</text:span>: <text:span text:style-name="T14">ActionsOff, ActionsOn, Debug, </text:span><text:span text:style-name="T315">Forest, </text:span><text:span text:style-name="T14">GoNear, </text:span><text:span text:style-name="T315">Goto, </text:span><text:span text:style-name="T14">Pronouns, Purloin, RandomSeed, </text:span><text:span text:style-name="T315">Rooms, </text:span><text:span text:style-name="T14">RoutinesOff, RoutinesOn, Scope, TimersOff, TimersOn, Tree</text:span></text:p>
      <text:p text:style-name="P153"/>
      <text:h text:style-name="P154" text:outline-level="1">Group 2 actions</text:h>
      <text:p text:style-name="P155">The<text:span text:style-name="T316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7">r</text:span>outines.</text:p>
      <text:p text:style-name="P151"><text:span text:style-name="T14">Close</text:span><text:tab/><text:tab/>"CLOSE (<text:span text:style-name="T318">noun</text:span>)"<text:line-break/><text:span text:style-name="T14">Disrobe</text:span><text:tab/>"<text:span text:style-name="T319">TAKE OFF (</text:span><text:span text:style-name="T318">noun</text:span><text:span text:style-name="T319">)"<text:line-break/></text:span><text:span text:style-name="T14">Drop</text:span><text:tab/><text:tab/>"<text:span text:style-name="T319">DROP (</text:span><text:span text:style-name="T318">noun</text:span><text:span text:style-name="T319">)"<text:line-break/></text:span><text:span text:style-name="T14">Eat</text:span><text:tab/><text:tab/>"<text:span text:style-name="T319">EAT (</text:span><text:span text:style-name="T318">noun</text:span><text:span text:style-name="T319">)"<text:line-break/></text:span><text:span text:style-name="T14">Enter</text:span><text:tab/><text:tab/>"<text:span text:style-name="T319">ENTER (noun)"<text:line-break/></text:span><text:span text:style-name="T14">Examine</text:span><text:tab/>"<text:span text:style-name="T319">EXAMINE (noun)"<text:line-break/></text:span><text:span text:style-name="T14">Exit</text:span><text:tab/><text:tab/>"<text:span text:style-name="T319">EXIT (noun)"<text:line-break/></text:span><text:span text:style-name="T14">GetOff</text:span><text:tab/><text:tab/>"<text:span text:style-name="T319">GET OFF (noun)"<text:line-break/></text:span><text:span text:style-name="T14">Go</text:span><text:tab/><text:tab/>"<text:span text:style-name="T319">GO (direction)"<text:line-break/></text:span><text:span text:style-name="T14">Insert</text:span><text:tab/><text:tab/>"<text:span text:style-name="T319">INSERT (noun) INTO (second)"<text:line-break/></text:span><text:span text:style-name="T14">Inv</text:span><text:tab/><text:tab/>"<text:span text:style-name="T319">INVENTORY"<text:line-break/></text:span><text:span text:style-name="T14">Lock</text:span><text:tab/><text:tab/>"<text:span text:style-name="T319">LOCK (noun) with (</text:span><text:span text:style-name="T318">second</text:span><text:span text:style-name="T319">)"<text:line-break/></text:span><text:span text:style-name="T14">Look</text:span><text:tab/><text:tab/>"<text:span text:style-name="T319">LOOK"<text:line-break/></text:span><text:span text:style-name="T14">Open</text:span><text:tab/><text:tab/>"<text:span text:style-name="T319">OPEN (noun)"<text:line-break/></text:span><text:span text:style-name="T14">PutOn</text:span><text:tab/><text:tab/>"<text:span text:style-name="T319">PUT (noun) ON (</text:span><text:span text:style-name="T318">second</text:span><text:span text:style-name="T319">)"<text:line-break/></text:span><text:span text:style-name="T14">Remove</text:span><text:tab/><text:tab/>"<text:span text:style-name="T319">REMOVE (noun) FROM (second)"<text:line-break/></text:span><text:span text:style-name="T14">Search</text:span><text:tab/><text:tab/>"<text:span text:style-name="T319">SEARCH (noun)"<text:line-break/></text:span><text:span text:style-name="T14">SwitchOff</text:span><text:tab/>"<text:span text:style-name="T319">SWITCH OFF (noun)"<text:line-break/></text:span><text:span text:style-name="T14">SwitchOn</text:span><text:tab/>"<text:span text:style-name="T319">SWITCH ON (noun)"<text:line-break/></text:span><text:span text:style-name="T14">Take</text:span><text:tab/><text:tab/>"<text:span text:style-name="T319">TAKE (noun)"<text:line-break/></text:span><text:span text:style-name="T14">Transfer</text:span><text:tab/>"<text:span text:style-name="T319">TRANSFER (noun) </text:span><text:span text:style-name="T318">TO</text:span><text:span text:style-name="T319"> (second)"<text:line-break/></text:span><text:span text:style-name="T14">Unlock</text:span><text:tab/><text:tab/>"<text:span text:style-name="T319">UNLOCK (noun) WITH (</text:span><text:span text:style-name="T318">second</text:span><text:span text:style-name="T319">)"<text:line-break/></text:span><text:span text:style-name="T14">Wait</text:span><text:tab/><text:tab/>"<text:span text:style-name="T319">WAIT"<text:line-break/></text:span><text:span text:style-name="T14">Wear</text:span><text:tab/><text:tab/>"<text:span text:style-name="T319">WEAR (noun)"</text:span></text:p>
      <text:p text:style-name="P156">OPTIONAL_EXTENDED_VERBSET adds<text:span text:style-name="T99">:</text:span></text:p>
      <text:p text:style-name="P157"><text:span text:style-name="T144">Empty</text:span><text:span text:style-name="T99"><text:tab/><text:tab/>"EMPTY (noun)"<text:line-break/></text:span><text:span text:style-name="T144">EmptyT</text:span><text:span text:style-name="T99"><text:tab/><text:tab/>"EMPTY (noun) INTO (second)"<text:line-break/></text:span><text:span text:style-name="T144">GoIn</text:span><text:span text:style-name="T99"><text:tab/><text:tab/>"INSIDE"</text:span></text:p>
      <text:p text:style-name="P153"/>
      <text:h text:style-name="P154" text:outline-level="1">Group 3 actions</text:h>
      <text:p text:style-name="P155">These actions normally <text:span text:style-name="T316">just</text:span> print a standard message. They run <text:span text:style-name="T14">before</text:span> <text:span text:style-name="T317">r</text:span>outines <text:span text:style-name="T320">but not</text:span> <text:span text:style-name="T14">after</text:span> <text:span text:style-name="T317">r</text:span>outines.</text:p>
      <text:p text:style-name="P151"><text:span text:style-name="T14">Answer</text:span><text:tab/><text:tab/>"<text:span text:style-name="T321">ANSWER (topic) TO (</text:span><text:span text:style-name="T322">second</text:span><text:span text:style-name="T321">)"</text:span><text:line-break/><text:span text:style-name="T14">Ask</text:span><text:tab/><text:tab/>"<text:span text:style-name="T323">ASK (noun) ABOUT (topic)"</text:span><text:line-break/><text:span text:style-name="T14">AskFor</text:span><text:tab/><text:tab/>"<text:span text:style-name="T323">ASK (noun) FOR (second)"</text:span><text:line-break/><text:span text:style-name="T14">AskTo</text:span><text:tab/><text:tab/>"<text:span text:style-name="T323">ASK (noun) TO (topic)"</text:span><text:line-break/><text:span text:style-name="T14">Attack</text:span><text:tab/><text:tab/>"<text:span text:style-name="T323">ATTACK (noun)"</text:span><text:line-break/><text:span text:style-name="T14">Climb</text:span><text:tab/><text:tab/>"<text:span text:style-name="T323">CLIMB (noun)"</text:span><text:line-break/><text:span text:style-name="T14">Consult</text:span><text:tab/>"<text:span text:style-name="T324">READ</text:span><text:span text:style-name="T323"> ABOUT (topic) </text:span><text:span text:style-name="T324">IN (noun)</text:span><text:span text:style-name="T323">"</text:span><text:line-break/><text:span text:style-name="T14">Cut</text:span><text:tab/><text:tab/>"<text:span text:style-name="T323">CUT (noun)"</text:span><text:line-break/><text:span text:style-name="T14">Dig</text:span><text:tab/><text:tab/>"<text:span text:style-name="T323">DIG (noun)"</text:span><text:line-break/><text:span text:style-name="T14">Drink</text:span><text:tab/><text:tab/>"<text:span text:style-name="T323">DRINK (noun)"</text:span><text:line-break/><text:span text:style-name="T14">Fill</text:span><text:tab/><text:tab/>"<text:span text:style-name="T323">FILL (noun)"</text:span><text:line-break/><text:span text:style-name="T14">Give</text:span><text:tab/><text:tab/>"<text:span text:style-name="T323">GIVE (noun) to <text:s/>(</text:span><text:span text:style-name="T322">second</text:span><text:span text:style-name="T323">)"</text:span><text:line-break/><text:span text:style-name="T14">Jump</text:span><text:tab/><text:tab/>"<text:span text:style-name="T323">JUMP"</text:span><text:line-break/><text:span text:style-name="T14">JumpOver</text:span><text:tab/>"<text:span text:style-name="T323">JUMP OVER (noun)"</text:span><text:line-break/><text:span text:style-name="T14">Listen</text:span><text:tab/><text:tab/>"<text:span text:style-name="T323">LISTEN </text:span><text:span text:style-name="T325">TO (noun)</text:span><text:span text:style-name="T323">"</text:span><text:line-break/><text:span text:style-name="T14">Pull</text:span><text:tab/><text:tab/>"<text:span text:style-name="T323">PULL (noun)"</text:span><text:line-break/><text:span text:style-name="T14">Push</text:span><text:tab/><text:tab/>"<text:span text:style-name="T323">PUSH (noun)"</text:span><text:line-break/><text:span text:style-name="T14">PushDir</text:span><text:tab/>"<text:span text:style-name="T323">PUSH (noun) (direction)"</text:span><text:line-break/><text:span text:style-name="T14">Rub</text:span><text:tab/><text:tab/>"<text:span text:style-name="T323">RUB (noun)"</text:span><text:line-break/><text:span text:style-name="T14">Shout</text:span><text:tab/><text:tab/>"<text:span text:style-name="T323">SHOUT (topic)"</text:span><text:line-break/><text:span text:style-name="T14">ShoutAt</text:span><text:tab/>"<text:span text:style-name="T323">SHOUT (topic) AT (second)"</text:span><text:line-break/><text:span text:style-name="T14">Show</text:span><text:tab/><text:tab/>"<text:span text:style-name="T323">SHOW (noun) (second)"</text:span><text:line-break/><text:span text:style-name="T14">Smell</text:span><text:tab/><text:tab/><text:span text:style-name="T323">"</text:span><text:span text:style-name="T325">SMELL (noun)"</text:span><text:line-break/><text:span text:style-name="T14">Tell</text:span><text:tab/><text:tab/>"<text:span text:style-name="T325">TELL</text:span><text:span text:style-name="T323"> (noun) </text:span><text:span text:style-name="T325">ABOUT</text:span><text:span text:style-name="T323"> (</text:span><text:span text:style-name="T326">topic</text:span><text:span text:style-name="T323">)"</text:span><text:line-break/><text:span text:style-name="T14">ThrowAt</text:span><text:tab/>"<text:span text:style-name="T325">THROW (noun) AT (second)"</text:span><text:line-break/><text:span text:style-name="T14">Tie</text:span><text:tab/><text:tab/>"<text:span text:style-name="T325">TIE (noun) TO (second)"</text:span><text:line-break/><text:span text:style-name="T14">Touch</text:span><text:tab/><text:tab/>"<text:span text:style-name="T325">TOUCH (noun)"</text:span><text:line-break/><text:span text:style-name="T14">Turn</text:span><text:tab/><text:tab/>"<text:span text:style-name="T325">TURN</text:span><text:span text:style-name="T323"> (noun)"</text:span></text:p>
      <text:p text:style-name="P156">OPTIONAL_EXTENDED_VERBSET adds<text:span text:style-name="T99">:</text:span></text:p>
      <text:p text:style-name="P151"><text:span text:style-name="T327">Blow</text:span><text:span text:style-name="T328"><text:tab/><text:tab/>"BLOW (noun)"<text:line-break/></text:span><text:span text:style-name="T327">Mild</text:span><text:span text:style-name="T328"><text:tab/><text:tab/>"DARN"<text:line-break/></text:span><text:span text:style-name="T327">Burn</text:span><text:span text:style-name="T328"><text:tab/><text:tab/>"BURN (noun)"<text:line-break/></text:span><text:span text:style-name="T327">Buy</text:span><text:span text:style-name="T328"><text:tab/><text:tab/>"BUY (noun)"<text:line-break/></text:span><text:span text:style-name="T329">Kiss</text:span><text:span text:style-name="T330"><text:tab/><text:tab/>"KISS (noun)"<text:line-break/></text:span><text:span text:style-name="T329">No</text:span><text:span text:style-name="T330"><text:tab/><text:tab/>"NO"<text:line-break/></text:span><text:span text:style-name="T331">Set</text:span><text:span text:style-name="T332"><text:tab/><text:tab/>"SET</text:span><text:span text:style-name="T333"> (noun)"<text:line-break/></text:span><text:span text:style-name="T331">SetTo</text:span><text:span text:style-name="T332"><text:tab/><text:tab/>"SET (noun) TO (special)"<text:line-break/></text:span><text:span text:style-name="T331">Strong</text:span><text:span text:style-name="T332"><text:tab/><text:tab/>"SHIT"<text:line-break/></text:span><text:span text:style-name="T331">Sing</text:span><text:span text:style-name="T332"><text:tab/><text:tab/>"SING"<text:line-break/></text:span><text:span text:style-name="T331">Sleep</text:span><text:span text:style-name="T332"><text:tab/><text:tab/>"SLEEP"<text:line-break/></text:span><text:span text:style-name="T331">Sorry</text:span><text:span text:style-name="T332"><text:tab/><text:tab/>"SORRY"<text:line-break/></text:span><text:span text:style-name="T331">Squeeze</text:span><text:span text:style-name="T332"><text:tab/>"SQUEEZE</text:span><text:span text:style-name="T333"> (noun)"<text:line-break/></text:span><text:span text:style-name="T331">Swim</text:span><text:span text:style-name="T332"><text:tab/><text:tab/>"SWIM"<text:line-break/></text:span><text:span text:style-name="T331">Swing</text:span><text:span text:style-name="T332"><text:tab/><text:tab/>"SWING (noun)"<text:line-break/></text:span><text:span text:style-name="T331">Taste</text:span><text:span text:style-name="T332"><text:tab/><text:tab/>"TASTE (noun)"<text:line-break/></text:span><text:span text:style-name="T331">Think</text:span><text:span text:style-name="T332"><text:tab/><text:tab/>"THINK"<text:line-break/></text:span><text:span text:style-name="T331">Transfer</text:span><text:span text:style-name="T332"><text:tab/>"TRANSFER (noun) TO</text:span><text:span text:style-name="T333"> (</text:span><text:span text:style-name="T332">second</text:span><text:span text:style-name="T333">)"<text:line-break/></text:span><text:span text:style-name="T331">Wake</text:span><text:span text:style-name="T332"><text:tab/><text:tab/>"WAKE UP"<text:line-break/></text:span><text:span text:style-name="T331">WakeOther</text:span><text:span text:style-name="T332"><text:tab/>"WAKE UP</text:span><text:span text:style-name="T333"> (noun)"<text:line-break/></text:span><text:span text:style-name="T331">Wave</text:span><text:span text:style-name="T332"><text:tab/><text:tab/>"WAVE"<text:line-break/></text:span><text:span text:style-name="T331">Yes</text:span><text:span text:style-name="T332"><text:tab/><text:tab/>"YES"</text:span><text:span text:style-name="T328"><text:line-break/></text:span></text:p>
      <text:h text:style-name="P158" text:outline-level="1">Fake actions</text:h>
      <text:p text:style-name="P159">These actions are not referred to anywhere in the grammar, and they don’t have action routines, e.g. the<text:span text:style-name="T334"> fake action </text:span><text:span text:style-name="T335">Going</text:span><text:span text:style-name="T334"> </text:span><text:span text:style-name="T336">ha</text:span>s no <text:span text:style-name="T334">action routine </text:span><text:span text:style-name="T14">GoingSub</text:span>.</text:p>
      <text:p text:style-name="P160"><text:span text:style-name="T14">Going</text:span><text:tab/><text:tab/><text:span text:style-name="T337">Sent to the </text:span><text:span text:style-name="T338">before</text:span><text:span text:style-name="T337"> routine for the room<text:line-break/><text:tab/><text:tab/>that the player is about to enter.</text:span></text:p>
      <text:p text:style-name="P160"><text:span text:style-name="T14">LetGo</text:span><text:tab/><text:tab/><text:span text:style-name="T337">Sent to the container/supporter from<text:line-break/><text:tab/><text:tab/>which the player takes something.</text:span></text:p>
      <text:p text:style-name="P160"><text:span text:style-name="T14">NotUnderstood</text:span><text:tab/><text:span text:style-name="T337">Sent to creature</text:span><text:span text:style-name="T339">'s </text:span><text:span text:style-name="T340">orders</text:span><text:span text:style-name="T337"> when player </text:span><text:span text:style-name="T339"><text:s/><text:tab/><text:tab/></text:span><text:span text:style-name="T337">issued</text:span><text:span text:style-name="T339"> </text:span><text:span text:style-name="T337">an incomprehensible </text:span><text:span text:style-name="T341">order</text:span><text:span text:style-name="T337"> to it.</text:span></text:p>
      <text:p text:style-name="P160"><text:soft-page-break/><text:span text:style-name="T14">Order</text:span><text:tab/><text:tab/><text:span text:style-name="T337">Sent to </text:span><text:span text:style-name="T342">creature's </text:span><text:span text:style-name="T343">life</text:span><text:span text:style-name="T342"> when player<text:line-break/><text:tab/><text:tab/>issued </text:span><text:span text:style-name="T344">an</text:span><text:span text:style-name="T303"> order</text:span><text:span text:style-name="T342"> to it, and </text:span><text:span text:style-name="T343">orders</text:span><text:span text:style-name="T342"> didn't<text:line-break/><text:tab/><text:tab/>handle it</text:span><text:span text:style-name="T303">.</text:span></text:p>
      <text:p text:style-name="P160"><text:span text:style-name="T14">PluralFound</text:span><text:tab/><text:span text:style-name="T345">A </text:span><text:span text:style-name="T338">parse_name</text:span><text:span text:style-name="T337"> routine </text:span><text:span text:style-name="T46">can set<text:line-break/><text:tab/><text:tab/></text:span><text:span text:style-name="T47">parser_action </text:span><text:span text:style-name="T346">to this value when a<text:line-break/><text:tab/><text:tab/>match is found and it’s in plural.</text:span></text:p>
      <text:p text:style-name="P160"><text:span text:style-name="T14">Receive</text:span><text:tab/><text:span text:style-name="T337">Sent to the </text:span><text:span text:style-name="T347">object the player tries to place<text:line-break/><text:tab/><text:tab/>something in/on. </text:span><text:span text:style-name="T348">receive_action<text:line-break/><text:tab/><text:tab/></text:span><text:span text:style-name="T349">holds the original action.</text:span></text:p>
      <text:p text:style-name="P161"><text:span text:style-name="T350">ThrownAt</text:span><text:span text:style-name="T351"><text:tab/></text:span><text:span text:style-name="T24">Sent by action </text:span><text:span text:style-name="T352">ThrowAt</text:span><text:span text:style-name="T24"> to the object the<text:line-break/><text:tab/><text:tab/>player tries to throw something at.</text:span></text:p>
      <text:p text:style-name="P162"><text:line-break/></text:p>
      <text:h text:style-name="P62" text:outline-level="1">Object attributes<text:span text:style-name="T353"> (flags)</text:span></text:h>
      <text:p text:style-name="P163"><text:span text:style-name="T353">An attribute is a flag which can be on or off.</text:span><text:span text:style-name="T354"><text:line-break/>[</text:span>OBJ <text:span text:style-name="T354">]</text:span>means this is used for regular object<text:span text:style-name="T354">s</text:span>.<text:line-break/><text:span text:style-name="T354">[</text:span>ROOM<text:span text:style-name="T354">]</text:span> means this is used for rooms.</text:p>
      <text:h text:style-name="Heading_20_2" text:outline-level="2"><text:span text:style-name="T24">a</text:span>bsent [OBJ]</text:h>
      <text:h text:style-name="P164" text:outline-level="6">For object with <text:span text:style-name="T14">found_in</text:span>: Remove<text:span text:style-name="T355">d</text:span> from game for now.</text:h>
      <text:h text:style-name="Heading_20_2" text:outline-level="2"><text:span text:style-name="T24">a</text:span>nimate [OBJ]</text:h>
      <text:h text:style-name="P164" text:outline-level="6">Is a living thing, can be talked to etc.</text:h>
      <text:h text:style-name="Heading_20_2" text:outline-level="2"><text:span text:style-name="T24">c</text:span>lothing [OBJ]</text:h>
      <text:h text:style-name="P164" text:outline-level="6">Can be worn.</text:h>
      <text:h text:style-name="Heading_20_2" text:outline-level="2"><text:span text:style-name="T24">c</text:span>oncealed [OBJ]</text:h>
      <text:h text:style-name="P164" text:outline-level="6"><text:span text:style-name="T356">Is visible but not easy to spot, like a secret door. </text:span>Can be interacted with but is not <text:span text:style-name="T357">printed in room desc</text:span><text:span text:style-name="T356">r</text:span><text:span text:style-name="T357">iption.</text:span></text:h>
      <text:h text:style-name="P165" text:outline-level="2">container<text:span text:style-name="T354"> [OBJ]</text:span></text:h>
      <text:h text:style-name="P166" text:outline-level="6">Objects can be p<text:span text:style-name="T49">ut</text:span> in it and removed from it, if it's <text:span text:style-name="T14">open</text:span>.<text:span text:style-name="T354"> Can't also have </text:span><text:span text:style-name="T358">support</text:span><text:span text:style-name="T359">er</text:span><text:span text:style-name="T354">. Can have </text:span><text:span text:style-name="T359">enterable</text:span><text:span text:style-name="T354">.</text:span></text:h>
      <text:h text:style-name="P165" text:outline-level="2">door<text:span text:style-name="T354"> [OBJ]</text:span></text:h>
      <text:h text:style-name="P167" text:outline-level="6">Is a portal between rooms. Use<text:span text:style-name="T360"> properties</text:span> <text:span text:style-name="T14">door_to</text:span>, <text:span text:style-name="T14">door_dir</text:span> and, unless it's a one-way door, <text:span text:style-name="T14">found_in</text:span>.</text:h>
      <text:h text:style-name="P165" text:outline-level="2">edible<text:span text:style-name="T354"> [OBJ]</text:span></text:h>
      <text:h text:style-name="P168" text:outline-level="6">Can be eaten.</text:h>
      <text:h text:style-name="P165" text:outline-level="2">enterable<text:span text:style-name="T354"> [OBJ]</text:span></text:h>
      <text:h text:style-name="P168" text:outline-level="6"><text:span text:style-name="T49">C</text:span>an<text:span text:style-name="T361"> be</text:span> <text:span text:style-name="T49">entered</text:span>. <text:span text:style-name="T362">Must have</text:span> <text:span text:style-name="T14">container</text:span> or <text:span text:style-name="T14">supporter</text:span>.</text:h>
      <text:h text:style-name="P165" text:outline-level="2">female<text:span text:style-name="T354"> [OBJ]</text:span></text:h>
      <text:h text:style-name="P169" text:outline-level="6">Can be referred to as <text:span text:style-name="T363">she/her</text:span>. Must have <text:span text:style-name="T14">animate</text:span>.</text:h>
      <text:h text:style-name="Heading_20_2" text:outline-level="2">general [OBJ] [<text:span text:style-name="T24">ROOM</text:span>]</text:h>
      <text:h text:style-name="P170" text:outline-level="6">To be used by the game author for whatever they like.</text:h>
      <text:h text:style-name="Heading_20_2" text:outline-level="2">light [OBJ] [<text:span text:style-name="T24">ROOM</text:span>]</text:h>
      <text:h text:style-name="P170" text:outline-level="6">Provides light. For room and container, lights up what's inside as well.<text:span text:style-name="T364"> Note: </text:span><text:span text:style-name="T365">This attribute is not defined if</text:span><text:span text:style-name="T364"> </text:span><text:span text:style-name="T366">OPTIONAL_NO_DARKNESS</text:span><text:span text:style-name="T364"> is defined.</text:span></text:h>
      <text:h text:style-name="P165" text:outline-level="2">lockable<text:span text:style-name="T354"> [OBJ]</text:span></text:h>
      <text:h text:style-name="P171" text:outline-level="6">Can be locked and unlocked, using the object specified by <text:span text:style-name="T14">with_key</text:span> property.</text:h>
      <text:h text:style-name="P165" text:outline-level="2">locked<text:span text:style-name="T354"> [OBJ]</text:span></text:h>
      <text:h text:style-name="P171" text:outline-level="6"><text:span text:style-name="T367">Can't be opened</text:span>.</text:h>
      <text:h text:style-name="P165" text:outline-level="2">moved<text:span text:style-name="T354"> [OBJ]</text:span></text:h>
      <text:h text:style-name="P171" text:outline-level="6">Is or has been held directly by the player.</text:h>
      <text:h text:style-name="P165" text:outline-level="2">neuter<text:span text:style-name="T354"> [OBJ]</text:span></text:h>
      <text:h text:style-name="P171" text:outline-level="6">Can be referred to as "it" (<text:span text:style-name="T49">Main</text:span>ly used for <text:span text:style-name="T14">animate</text:span> objects, as this is default behaviour for non-animates).</text:h>
      <text:h text:style-name="P165" text:outline-level="2">on<text:span text:style-name="T354"> [OBJ]</text:span></text:h>
      <text:h text:style-name="P172" text:outline-level="6">Is currently switched on.<text:span text:style-name="T368"> See </text:span><text:span text:style-name="T369">switchable</text:span><text:span text:style-name="T368"> attribute.</text:span></text:h>
      <text:h text:style-name="P165" text:outline-level="2">open<text:span text:style-name="T354"> [OBJ]</text:span></text:h>
      <text:h text:style-name="P172" text:outline-level="6">For doors and containers: Is currently open.</text:h>
      <text:h text:style-name="P165" text:outline-level="2">openable<text:span text:style-name="T354"> [OBJ]</text:span></text:h>
      <text:h text:style-name="P172" text:outline-level="6"><text:span text:style-name="T49">For doors and containers:</text:span> Can be opened and closed.</text:h>
      <text:h text:style-name="P165" text:outline-level="2">pluralname<text:span text:style-name="T354"> [OBJ]</text:span></text:h>
      <text:h text:style-name="P173" text:outline-level="6"><text:span text:style-name="T49">C</text:span>an be referred to as they/them. </text:h>
      <text:h text:style-name="P165" text:outline-level="2"><text:span text:style-name="T370">p</text:span>roper<text:span text:style-name="T354"> [OBJ]</text:span></text:h>
      <text:h text:style-name="P173" text:outline-level="6">Has a name which should n<text:span text:style-name="T49">ever</text:span> be preceded by an article, like "John".</text:h>
      <text:h text:style-name="P174" text:outline-level="2">reactive [OBJ] [<text:span text:style-name="T24">ROOM</text:span>]<text:span text:style-name="T45"> </text:span><text:span text:style-name="T17">PUNY++</text:span></text:h>
      <text:h text:style-name="P175" text:outline-level="6">The object provides at least one of <text:span text:style-name="T371">add_to_scope</text:span><text:span text:style-name="T372">, </text:span><text:span text:style-name="T14">each_turn</text:span><text:span text:style-name="T373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4">reactive</text:span><text:span text:style-name="T49"> attribute </text:span>is set automatically.</text:h>
      <text:h text:style-name="P165" text:outline-level="2">scenery<text:span text:style-name="T354"> [OBJ]</text:span></text:h>
      <text:h text:style-name="P176" text:outline-level="6">Can't be taken, is not mentioned in room descriptions.</text:h>
      <text:h text:style-name="P177" text:outline-level="2">scored [OBJ] [<text:span text:style-name="T24">ROOM</text:span>]</text:h>
      <text:h text:style-name="P176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5" text:outline-level="2">static<text:span text:style-name="T354"> [OBJ]</text:span></text:h>
      <text:h text:style-name="P176" text:outline-level="6">Can't be taken.</text:h>
      <text:h text:style-name="P165" text:outline-level="2">supporter<text:span text:style-name="T354"> [OBJ]</text:span></text:h>
      <text:h text:style-name="P178" text:outline-level="6">Is a supporter, meaning things can be placed on top of it.<text:span text:style-name="T354"> Can't also have </text:span><text:span text:style-name="T359">container</text:span><text:span text:style-name="T354">. Can have </text:span><text:span text:style-name="T359">enterable</text:span><text:span text:style-name="T354">.</text:span></text:h>
      <text:h text:style-name="P165" text:outline-level="2">switchable<text:span text:style-name="T354"> [OBJ]</text:span></text:h>
      <text:h text:style-name="P179" text:outline-level="6">Can be switched on and off. The <text:span text:style-name="T14">on</text:span> attribute tells its current state.</text:h>
      <text:h text:style-name="P165" text:outline-level="2">talkable<text:span text:style-name="T354"> [OBJ]</text:span></text:h>
      <text:h text:style-name="P180" text:outline-level="6">Can be talked to, even though it's not <text:span text:style-name="T14">animate</text:span>.</text:h>
      <text:h text:style-name="P165" text:outline-level="2">transparent<text:span text:style-name="T354"> [OBJ]</text:span></text:h>
      <text:h text:style-name="P180" text:outline-level="6"><text:span text:style-name="T374">F</text:span><text:span text:style-name="T375">or a </text:span><text:span text:style-name="T376">container</text:span><text:span text:style-name="T375">: </text:span><text:span text:style-name="T374">T</text:span><text:span text:style-name="T375">he contents are visible even if the container is closed. For an </text:span><text:span text:style-name="T377">animate</text:span><text:span text:style-name="T374"> object</text:span><text:span text:style-name="T375">: Held objects are visible to others</text:span><text:span text:style-name="T374">.</text:span><text:span text:style-name="T375"> For other objects: </text:span><text:span text:style-name="T374">O</text:span><text:span text:style-name="T375">bjects that are part of this objects (i.e. are </text:span><text:span text:style-name="T378">inside</text:span><text:span text:style-name="T379"> this object) are visible</text:span><text:span text:style-name="T380">.</text:span></text:h>
      <text:h text:style-name="Heading_20_2" text:outline-level="2">visited [<text:span text:style-name="T24">ROOM</text:span>]</text:h>
      <text:h text:style-name="P181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81" text:outline-level="6"><text:span text:style-name="T49">Temporary internal flag. C</text:span>an be used by game code too.</text:h>
      <text:h text:style-name="P165" text:outline-level="2">worn<text:span text:style-name="T354"> [OBJ]</text:span></text:h>
      <text:h text:style-name="P182" text:outline-level="6"><text:span text:style-name="T375">For object that has </text:span><text:span text:style-name="T376">clothing</text:span><text:span text:style-name="T375">: Is currently being worn.</text:span></text:h>
      <text:h text:style-name="P123" text:outline-level="1">Object properties</text:h>
      <text:p text:style-name="P183"><text:span text:style-name="T381">A property is a 16-bit value or a list of values.</text:span><text:span text:style-name="T382"><text:line-break/>[</text:span><text:span text:style-name="T383">OBJ</text:span><text:span text:style-name="T382">]</text:span><text:span text:style-name="T381"> </text:span><text:span text:style-name="T383">means this is used for regular object</text:span><text:span text:style-name="T382">s</text:span><text:span text:style-name="T383">.<text:line-break/></text:span><text:span text:style-name="T382">[</text:span><text:span text:style-name="T383">ROOM</text:span><text:span text:style-name="T382">]</text:span><text:span text:style-name="T383"> means this is used for rooms.<text:line-break/></text:span><text:span text:style-name="T384">(+) means "additive" - if an object which defines the property inherits from a class which also defines the property, it gets both values.</text:span></text:p>
      <text:h text:style-name="P184" text:outline-level="2">add_to_scope<text:span text:style-name="T354"> [OBJ]</text:span></text:h>
      <text:h text:style-name="P185" text:outline-level="6"><text:span text:style-name="T385">A</text:span> list <text:span text:style-name="T386">of objects that should be added to scope when this object is in scope, or a routine which puts objects in scope using </text:span><text:span text:style-name="T387">ScopeWithin</text:span><text:span text:style-name="T386"> and </text:span><text:span text:style-name="T387">PlaceInScope</text:span><text:span text:style-name="T386">.</text:span></text:h>
      <text:h text:style-name="P184" text:outline-level="2">after [OBJ] [<text:span text:style-name="T24">ROOM</text:span>] (+)</text:h>
      <text:h text:style-name="P186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8"> The routine should return false to continue, telling the player what has happened, or true to stop processing the action and produce no further output.</text:span></text:h>
      <text:h text:style-name="P184" text:outline-level="2">article<text:span text:style-name="T354"> [OBJ]</text:span><text:span text:style-name="T280"> </text:span><text:span text:style-name="T102">~P</text:span><text:span text:style-name="T17">UNY</text:span></text:h>
      <text:h text:style-name="P187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4" text:outline-level="2">before [OBJ] [<text:span text:style-name="T24">ROOM</text:span>] (+)</text:h>
      <text:h text:style-name="P188" text:outline-level="6">Li<text:span text:style-name="T389">ke</text:span> <text:span text:style-name="T14">after</text:span>, but is run before the action happens. Returning true stops the default action from happening at all.</text:h>
      <text:h text:style-name="P184" text:outline-level="2">cant_go [<text:span text:style-name="T24">ROOM</text:span>]</text:h>
      <text:h text:style-name="P186" text:outline-level="6">A string or a routine to print a message<text:span text:style-name="T49">,</text:span> when the player tries to go in a direction where there's no exit.</text:h>
      <text:h text:style-name="P184" text:outline-level="2">capacity<text:span text:style-name="T354"> [OBJ]</text:span><text:span text:style-name="T280"> </text:span><text:span text:style-name="T102">~P</text:span><text:span text:style-name="T17">UNY</text:span></text:h>
      <text:h text:style-name="P189" text:outline-level="6">The maximum number of items that can be in this container, on this supporter or held by this <text:span text:style-name="T390">actor</text:span>. To read the <text:span text:style-name="T49">capacity of an object</text:span>, taking the default capacity into consideration, you must call <text:span text:style-name="T14">ObjectCapacity(object)</text:span>.</text:h>
      <text:h text:style-name="P184" text:outline-level="2">d_to [<text:span text:style-name="T24">ROOM</text:span>]</text:h>
      <text:h text:style-name="P190" text:outline-level="6">Holds a possible exit. The value can be <text:span text:style-name="T391">any of:</text:span></text:h>
      <text:h text:style-name="P190" text:outline-level="6"><text:span text:style-name="T391">* </text:span><text:span text:style-name="T392">false</text:span><text:span text:style-name="T391"> – not an exit<text:line-break/>* </text:span>a room where the exits leads<text:line-break/>* <text:span text:style-name="T391">a door object – the exit leads through this door<text:line-break/></text:span>* a string saying why the player can’t go there<text:line-break/><text:span text:style-name="T391">* </text:span>a routine which either returns <text:span text:style-name="T14">false</text:span>, <text:span text:style-name="T391">a room, a door object</text:span>, or prints <text:span text:style-name="T49">its own</text:span> message and returns <text:span text:style-name="T14">true</text:span>.</text:h>
      <text:h text:style-name="P184" text:outline-level="2">daemon [OBJ] [<text:span text:style-name="T24">ROOM</text:span>]</text:h>
      <text:h text:style-name="P191" text:outline-level="6"><text:span text:style-name="T393">A routine </text:span><text:span text:style-name="T390">that is</text:span><text:span text:style-name="T393"> </text:span><text:span text:style-name="T394">executed</text:span><text:span text:style-name="T393"> every turn</text:span><text:span text:style-name="T395"> once it is started</text:span><text:span text:style-name="T396">. </text:span><text:span text:style-name="T390">Use</text:span><text:span text:style-name="T396"> </text:span><text:span text:style-name="T397">StartDaemon</text:span><text:span text:style-name="T396"> and </text:span><text:span text:style-name="T397">StopDaemon</text:span> to start/stop it.</text:h>
      <text:h text:style-name="P184" text:outline-level="2">describe<text:span text:style-name="T354"> [OBJ]</text:span><text:span text:style-name="T393"> (+)</text:span><text:span text:style-name="T280"> </text:span><text:span text:style-name="T102">~P</text:span><text:span text:style-name="T17">UNY</text:span></text:h>
      <text:h text:style-name="P192" text:outline-level="6">A string or a routine to print a paragraph of text for an object in a room description. If it's a string, <text:span text:style-name="T398">the value 1 or 2,</text:span> or a routine which returns <text:span text:style-name="T398">1 or 2</text:span>, the object won't be further described. <text:span text:style-name="T398">If the value / return value is 2, the library will consider it as if nothing was printed.</text:span> <text:span text:style-name="T399">Not supported for rooms as in DM4. </text:span>Note: Start <text:span text:style-name="T400">and end </text:span>the description with a newline ("^").</text:h>
      <text:h text:style-name="P184" text:outline-level="2">description [OBJ] [<text:span text:style-name="T24">ROOM</text:span>]</text:h>
      <text:h text:style-name="P192" text:outline-level="6">For an object: A string or a routine to print the text the player should get when examining the object.<text:line-break/>For a room: A string or a routine to print the room description.</text:h>
      <text:h text:style-name="P184" text:outline-level="2">door_dir<text:span text:style-name="T354"> [OBJ]</text:span><text:span text:style-name="T280"> </text:span><text:span text:style-name="T102">~P</text:span><text:span text:style-name="T17">UNY</text:span></text:h>
      <text:h text:style-name="P192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4" text:outline-level="2">door_to<text:span text:style-name="T354"> [OBJ]</text:span><text:span text:style-name="T280"> </text:span><text:span text:style-name="T102">~P</text:span><text:span text:style-name="T17">UNY</text:span></text:h>
      <text:h text:style-name="P192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4">to</text:span> can be <text:span text:style-name="T49">omitted</text:span>.</text:h>
      <text:h text:style-name="P184" text:outline-level="2">e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each_turn [OBJ] [<text:span text:style-name="T24">ROOM</text:span>] (+)</text:h>
      <text:h text:style-name="P193" text:outline-level="6">A routine which is executed every turn when the object is in scope.</text:h>
      <text:h text:style-name="P184" text:outline-level="2">found_in<text:span text:style-name="T354"> [OBJ]</text:span></text:h>
      <text:h text:style-name="P193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4" text:outline-level="2">grammar [OBJ] <text:span text:style-name="T102">~P</text:span><text:span text:style-name="T17">UNY</text:span></text:h>
      <text:h text:style-name="P195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401">Return </text:span><text:span text:style-name="T402">true</text:span><text:span text:style-name="T401"> if routine has parsed all input and set up </text:span><text:span text:style-name="T402">action</text:span><text:span text:style-name="T401">, </text:span><text:span text:style-name="T402">noun</text:span><text:span text:style-name="T401"> and </text:span><text:span text:style-name="T402">second</text:span><text:span text:style-name="T401">. Return 'verb' </text:span><text:span text:style-name="T398">and set </text:span><text:span text:style-name="T403">parser_one = 1</text:span><text:span text:style-name="T401"> to use this verb's grammar instead, or </text:span><text:span text:style-name="T398">return </text:span><text:span text:style-name="T401">-'verb' </text:span><text:span text:style-name="T398">and set </text:span><text:span text:style-name="T403">parser_one = -1</text:span><text:span text:style-name="T401"> to use this verb's grammar but fall back to the verb in player input if parsing fails. Return </text:span><text:span text:style-name="T402">false</text:span><text:span text:style-name="T401"> to parse as usual.</text:span></text:h>
      <text:h text:style-name="P184" text:outline-level="2">in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initial [OBJ] [<text:span text:style-name="T24">ROOM</text:span>]</text:h>
      <text:h text:style-name="P196" text:outline-level="6">For an object: A string or a routine to <text:span text:style-name="T404">describe</text:span> the object before it's been picked up.<text:span text:style-name="T405"> Note: For doors/containers and switchable objects, use </text:span><text:span text:style-name="T406">when_open</text:span><text:span text:style-name="T405"> + </text:span><text:span text:style-name="T406">when_closed</text:span><text:span text:style-name="T405"> and </text:span><text:span text:style-name="T406">when_on</text:span><text:span text:style-name="T405"> + </text:span><text:span text:style-name="T406">when_off</text:span><text:span text:style-name="T405"> respectively. </text:span><text:line-break/>For a <text:span text:style-name="T49">room</text:span>: A string or a routine to print a text when the player enters the room.</text:h>
      <text:h text:style-name="P184" text:outline-level="2">inside_description<text:span text:style-name="T354"> [OBJ]</text:span></text:h>
      <text:h text:style-name="P197" text:outline-level="6">For a<text:span text:style-name="T407">n enterable object</text:span>: A string or a routine <text:span text:style-name="T49">that will </text:span><text:span text:style-name="T407">printed/run</text:span> when the player is in<text:span text:style-name="T407">/on the object</text:span>.</text:h>
      <text:h text:style-name="P184" text:outline-level="2">invent<text:span text:style-name="T354"> [OBJ]</text:span></text:h>
      <text:h text:style-name="P198" text:outline-level="6">A routine to print the object in a list (typically in player inventory or a room description). First the routine is called before the object name has been printed<text:span text:style-name="T408">, </text:span>with <text:span text:style-name="T14">inventory_stage</text:span> set to 1.<text:span text:style-name="T408"> Then </text:span><text:span text:style-name="T409">it'</text:span><text:span text:style-name="T408">s called again when the object name has been printed but no additional information (e.g. "(providing light)"), with </text:span><text:span text:style-name="T14">inventory_stage</text:span> set to <text:span text:style-name="T408"><text:s/>2.<text:line-break/>For both calls, </text:span><text:span text:style-name="T409">t</text:span><text:span text:style-name="T408">he routine should return </text:span><text:span text:style-name="T410">false</text:span><text:span text:style-name="T408"> to continue or </text:span><text:span text:style-name="T410">true</text:span><text:span text:style-name="T408"> to stop all further output.</text:span></text:h>
      <text:h text:style-name="P184" text:outline-level="2"><text:span text:style-name="T411">l</text:span>ife<text:span text:style-name="T354"> [OBJ]</text:span><text:span text:style-name="T393"> (+)</text:span></text:h>
      <text:h text:style-name="P199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oft-page-break/>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12">Can be a string instead of a routine.</text:span></text:h>
      <text:h text:style-name="P200" text:outline-level="2"><text:span text:style-name="T413">list_together</text:span> [<text:span text:style-name="T413">OBJ</text:span>]<text:span text:style-name="T414"> </text:span><text:span text:style-name="T102">~P</text:span><text:span text:style-name="T17">UNY</text:span></text:h>
      <text:h text:style-name="P201" text:outline-level="6"><text:span text:style-name="T415">Objects that have the same value are listed together in object listings</text:span><text:span text:style-name="T411">.</text:span><text:span text:style-name="T414"> Set to a low number to print them adjacent to each other, a string to print them as a group, or (advanced) a routine to handle the printing yourself. Can't handle identical objects. Requires </text:span><text:span text:style-name="T416">OPTIONAL_LIST_TOGETHER</text:span><text:span text:style-name="T414">. </text:span></text:h>
      <text:h text:style-name="P200" text:outline-level="2">n_to [<text:span text:style-name="T24">ROOM</text:span>]</text:h>
      <text:h text:style-name="P202" text:outline-level="6"><text:span text:style-name="T49">An exit</text:span> property. See <text:span text:style-name="T14">d_to</text:span>.</text:h>
      <text:h text:style-name="P200" text:outline-level="2">name [<text:span text:style-name="T24">OBJ</text:span>] [<text:span text:style-name="T24">ROOM</text:span>]</text:h>
      <text:h text:style-name="P199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4" text:outline-level="2">ne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nw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orders<text:span text:style-name="T354"> [OBJ]</text:span></text:h>
      <text:h text:style-name="P203" text:outline-level="6">For <text:span text:style-name="T14">animate</text:span> or <text:span text:style-name="T14">talkable</text:span> objects: A routine to carry out the player's orders<text:span text:style-name="T417"> or decline to do so</text:span>. <text:span text:style-name="T417">The routine should either return </text:span><text:span text:style-name="T418">false</text:span><text:span text:style-name="T417">, or print a message and return </text:span><text:span text:style-name="T418">true</text:span><text:span text:style-name="T417"> to stop further processing. </text:span><text:span text:style-name="T49">T</text:span>he player object's <text:span text:style-name="T14">orders</text:span> routine is called first<text:span text:style-name="T417">, and then</text:span> the addressed object's <text:span text:style-name="T14">orders</text:span> routine is called.</text:h>
      <text:h text:style-name="P184" text:outline-level="2">out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parse_name<text:span text:style-name="T354"> [OBJ]</text:span></text:h>
      <text:h text:style-name="P204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9"> or </text:span><text:span text:style-name="T420">-1</text:span><text:span text:style-name="T419"> to say it chooses not to decide</text:span><text:span text:style-name="T421"> (i.e. the </text:span><text:span text:style-name="T422">name</text:span><text:span text:style-name="T421"> property will be consulted, if provided)</text:span>.</text:h>
      <text:h text:style-name="P184" text:outline-level="2">react_after<text:span text:style-name="T354"> [OBJ]</text:span></text:h>
      <text:h text:style-name="P204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4" text:outline-level="2">react_before<text:span text:style-name="T354"> [OBJ]</text:span></text:h>
      <text:h text:style-name="P204" text:outline-level="6"><text:span text:style-name="T49">L</text:span>ike <text:span text:style-name="T234">before</text:span>, but re<text:span text:style-name="T49">ceives</text:span> all actions taking place when this object is in scope.</text:h>
      <text:h text:style-name="P184" text:outline-level="2">s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se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short_name<text:span text:style-name="T354"> [OBJ]</text:span></text:h>
      <text:h text:style-name="P205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23">Sometimes it's useful to print a prefix (e.g. an adjective) and return </text:span><text:span text:style-name="T424">false</text:span><text:span text:style-name="T423">.</text:span></text:h>
      <text:h text:style-name="P184" text:outline-level="2">sw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time_left [OBJ] [<text:span text:style-name="T24">ROOM</text:span>]</text:h>
      <text:h text:style-name="P205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25">will be</text:span> called.<text:line-break/><text:span text:style-name="T423">For other objects/rooms: Use it as a general variable.</text:span></text:h>
      <text:h text:style-name="P184" text:outline-level="2">time_out [OBJ] [<text:span text:style-name="T24">ROOM</text:span>] (+)</text:h>
      <text:h text:style-name="P205" text:outline-level="6">A routine to be called <text:span text:style-name="T426">when a timer times out</text:span><text:span text:style-name="T427">. Start the countdown with </text:span><text:span text:style-name="T428">StartTimer(object, turns)</text:span><text:span text:style-name="T427">. <text:s/></text:span></text:h>
      <text:h text:style-name="P184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6" text:outline-level="6"><text:span text:style-name="T429">A number that d</text:span>etermines when this object’s <text:span text:style-name="T14">timer</text:span>/<text:span text:style-name="T14">daemon</text:span> executes relative to other timers/daemons. The lower the earlier. <text:span text:style-name="T430">Objects that don’t provide it have the value 100. Requires </text:span><text:span text:style-name="T431">OPTIONAL_ORDERED_TIMERS</text:span><text:span text:style-name="T430">.</text:span></text:h>
      <text:h text:style-name="P184" text:outline-level="2">u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w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when_closed<text:span text:style-name="T354"> [OBJ]</text:span></text:h>
      <text:h text:style-name="P207" text:outline-level="6">For doors <text:span text:style-name="T49">and</text:span> containers: A string or routine to describe the object when it's closed.</text:h>
      <text:h text:style-name="P184" text:outline-level="2">when_off<text:span text:style-name="T354"> [OBJ]</text:span></text:h>
      <text:h text:style-name="P207" text:outline-level="6">For a switchable object: A string or routine to describe the object when it's <text:span text:style-name="T49">off</text:span>.</text:h>
      <text:h text:style-name="P184" text:outline-level="2">when_on<text:span text:style-name="T354"> [OBJ]</text:span></text:h>
      <text:h text:style-name="P207" text:outline-level="6">Like <text:span text:style-name="T14">when_off</text:span>, but for when it's on.<text:span text:style-name="T405"> </text:span><text:span text:style-name="T49">Not used if </text:span><text:span text:style-name="T432">the object</text:span> has <text:span text:style-name="T14">moved</text:span>.</text:h>
      <text:h text:style-name="P184" text:outline-level="2">when_open<text:span text:style-name="T354"> [OBJ]</text:span></text:h>
      <text:h text:style-name="P207" text:outline-level="6">Like <text:span text:style-name="T14">when</text:span><text:span text:style-name="T234">_</text:span><text:span text:style-name="T14">closed</text:span>, but for when it's open.<text:span text:style-name="T405"> </text:span><text:span text:style-name="T49">Not used if </text:span><text:span text:style-name="T432">the object</text:span> has <text:span text:style-name="T14">moved</text:span>.</text:h>
      <text:h text:style-name="P184" text:outline-level="2">with_key<text:span text:style-name="T354"> [OBJ]</text:span><text:span text:style-name="T280"> </text:span><text:span text:style-name="T102">~P</text:span><text:span text:style-name="T17">UNY</text:span></text:h>
      <text:h text:style-name="P208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33">the object held in </text:span><text:span text:style-name="T14">second</text:span> <text:span text:style-name="T49">works as a key</text:span>.</text:h>
      <text:p text:style-name="P209"/>
      <text:h text:style-name="P210" text:outline-level="1">About this document</text:h>
      <text:p text:style-name="P211"><text:span text:style-name="T434">This is</text:span><text:span text:style-name="T435"> meant to </text:span><text:span text:style-name="T436">be printed out and </text:span><text:span text:style-name="T435">serve as a quick index to all the functionality that the PunyInform library provides. </text:span><text:span text:style-name="T437">A similar</text:span><text:span text:style-name="T435"> document for the Inform 6 language is Inform in Four Minutes, available at http://www.firthworks.com/roger/</text:span><text:span text:style-name="T438"><text:line-break/><text:line-break/></text:span><text:span text:style-name="T439">T</text:span><text:span text:style-name="T440">his is not</text:span><text:span text:style-name="T441"> </text:span><text:span text:style-name="T442">meant to be </text:span><text:span text:style-name="T24">a</text:span><text:span text:style-name="T443"> document from which to learn PunyInform, a replacement for </text:span><text:span text:style-name="T444">The </text:span><text:span text:style-name="T443">Inform Designer's Manual, </text:span><text:span text:style-name="T445">Four</text:span><text:span text:style-name="T443">th Edition (DM4) or th</text:span><text:span text:style-name="T441">e</text:span><text:span text:style-name="T443"> PunyInform manual and tutorials. To keep it short, this document</text:span><text:span text:style-name="T446"> </text:span><text:span text:style-name="T443">leave</text:span><text:span text:style-name="T446">s</text:span><text:span text:style-name="T443"> out </text:span><text:span text:style-name="T446">finer </text:span><text:span text:style-name="T443">details. Always consult DM4 and/or the PunyInform manual to get the full picture (See Legend below).</text:span><text:span text:style-name="T438"><text:line-break/><text:line-break/></text:span><text:span text:style-name="T447">C</text:span><text:span text:style-name="T438">reated and </text:span><text:span text:style-name="T447">maintain</text:span><text:span text:style-name="T438">ed by Fredrik Ramsberg</text:span><text:span text:style-name="T448">. Improvement suggestions by Garry Francis</text:span><text:span text:style-name="T449">,</text:span><text:span text:style-name="T448"> Johan Berntsson</text:span><text:span text:style-name="T449"> and Nick Moffitt</text:span><text:span text:style-name="T448">.</text:span><text:span text:style-name="T438"><text:line-break/><text:line-break/>Based on InfoLib at Your Fingertips by Roger Firth.</text:span></text:p>
      <text:p text:style-name="P212">Legend</text:p>
      <text:p text:style-name="P213"><text:span text:style-name="T438">Items marked </text:span><text:span text:style-name="T450">PUNY++</text:span><text:span text:style-name="T438"> are</text:span><text:span text:style-name="T451">n't</text:span><text:span text:style-name="T438"> </text:span><text:span text:style-name="T451">described in DM4</text:span><text:span text:style-name="T438">. </text:span><text:span text:style-name="T452">Items marked </text:span><text:span text:style-name="T453">~</text:span><text:span text:style-name="T450">PUNY</text:span><text:span text:style-name="T452"> don't work exactly as described in DM4. </text:span><text:span text:style-name="T438">See PunyInform manual</text:span><text:span text:style-name="T452"> for details on these items</text:span><text:span text:style-name="T438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6-05-11T22:21:51.001949100</dc:date>
    <meta:editing-duration>P28DT15H55M20S</meta:editing-duration>
    <meta:editing-cycles>192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5" meta:word-count="5686" meta:character-count="35948" meta:non-whitespace-character-count="30700"/>
  </office:meta>
</office:document-meta>
</file>