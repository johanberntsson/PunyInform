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2">
      <style:paragraph-properties style:writing-mode="lr-tb"/>
      <style:text-properties fo:language="en" fo:country="US" officeooo:paragraph-rsid="015b101b"/>
    </style:style>
    <style:style style:name="P59" style:family="paragraph" style:parent-style-name="Heading_20_6">
      <style:paragraph-properties style:writing-mode="lr-tb"/>
      <style:text-properties fo:language="en" fo:country="US" officeooo:paragraph-rsid="015b101b"/>
    </style:style>
    <style:style style:name="P60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61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2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3" style:family="paragraph" style:parent-style-name="Horizontal_20_Line">
      <style:text-properties officeooo:paragraph-rsid="0121d3f2"/>
    </style:style>
    <style:style style:name="P64" style:family="paragraph" style:parent-style-name="Heading_20_1">
      <style:paragraph-properties style:writing-mode="lr-tb"/>
      <style:text-properties fo:language="en" fo:country="US"/>
    </style:style>
    <style:style style:name="P65" style:family="paragraph" style:parent-style-name="Heading_20_2">
      <style:text-properties officeooo:rsid="00a0e720" officeooo:paragraph-rsid="00a0e720"/>
    </style:style>
    <style:style style:name="P66" style:family="paragraph" style:parent-style-name="Heading_20_6">
      <style:text-properties officeooo:rsid="00a0e720" officeooo:paragraph-rsid="00a0e720"/>
    </style:style>
    <style:style style:name="P67" style:family="paragraph" style:parent-style-name="Heading_20_6">
      <style:text-properties officeooo:rsid="007221fa" officeooo:paragraph-rsid="007221fa"/>
    </style:style>
    <style:style style:name="P68" style:family="paragraph" style:parent-style-name="Heading_20_2">
      <style:text-properties style:font-name="Courier New1" officeooo:rsid="011efb55" officeooo:paragraph-rsid="011f17b7"/>
    </style:style>
    <style:style style:name="P69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70" style:family="paragraph" style:parent-style-name="Heading_20_2">
      <style:text-properties officeooo:rsid="0114c619" officeooo:paragraph-rsid="0114c619"/>
    </style:style>
    <style:style style:name="P71" style:family="paragraph" style:parent-style-name="Heading_20_6">
      <style:text-properties officeooo:paragraph-rsid="0114c619"/>
    </style:style>
    <style:style style:name="P72" style:family="paragraph" style:parent-style-name="Heading_20_2">
      <style:text-properties style:font-name="Courier New1" officeooo:rsid="011efb55" officeooo:paragraph-rsid="0121d3f2"/>
    </style:style>
    <style:style style:name="P73" style:family="paragraph" style:parent-style-name="Heading_20_6">
      <style:text-properties style:font-name="Arial1" officeooo:rsid="011efb55" officeooo:paragraph-rsid="011efb55"/>
    </style:style>
    <style:style style:name="P74" style:family="paragraph" style:parent-style-name="Heading_20_2">
      <style:text-properties officeooo:rsid="013243e8" officeooo:paragraph-rsid="013243e8"/>
    </style:style>
    <style:style style:name="P75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6" style:family="paragraph" style:parent-style-name="Heading_20_2">
      <style:text-properties officeooo:paragraph-rsid="01454757"/>
    </style:style>
    <style:style style:name="P77" style:family="paragraph" style:parent-style-name="Heading_20_6">
      <style:text-properties officeooo:rsid="0073166a" officeooo:paragraph-rsid="0073166a"/>
    </style:style>
    <style:style style:name="P78" style:family="paragraph" style:parent-style-name="Heading_20_2">
      <style:text-properties officeooo:rsid="0073166a" officeooo:paragraph-rsid="010549aa"/>
    </style:style>
    <style:style style:name="P79" style:family="paragraph" style:parent-style-name="Heading_20_2">
      <style:text-properties officeooo:rsid="010cd283" officeooo:paragraph-rsid="010cd283"/>
    </style:style>
    <style:style style:name="P80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81" style:family="paragraph" style:parent-style-name="Heading_20_2">
      <style:text-properties officeooo:paragraph-rsid="011141b6"/>
    </style:style>
    <style:style style:name="P82" style:family="paragraph" style:parent-style-name="Heading_20_6">
      <style:text-properties officeooo:rsid="0073166a" officeooo:paragraph-rsid="011141b6"/>
    </style:style>
    <style:style style:name="P83" style:family="paragraph" style:parent-style-name="Heading_20_2">
      <style:text-properties officeooo:rsid="0073166a" officeooo:paragraph-rsid="01549835"/>
    </style:style>
    <style:style style:name="P84" style:family="paragraph" style:parent-style-name="Heading_20_6">
      <style:text-properties officeooo:paragraph-rsid="01549835"/>
    </style:style>
    <style:style style:name="P85" style:family="paragraph" style:parent-style-name="Heading_20_2">
      <style:text-properties officeooo:paragraph-rsid="01549835"/>
    </style:style>
    <style:style style:name="P86" style:family="paragraph" style:parent-style-name="Heading_20_2">
      <style:text-properties officeooo:rsid="00aa386a" officeooo:paragraph-rsid="00aa386a"/>
    </style:style>
    <style:style style:name="P87" style:family="paragraph" style:parent-style-name="Heading_20_6">
      <style:text-properties officeooo:rsid="00aa386a" officeooo:paragraph-rsid="00aa386a"/>
    </style:style>
    <style:style style:name="P88" style:family="paragraph" style:parent-style-name="Heading_20_6">
      <style:text-properties officeooo:rsid="00735f64" officeooo:paragraph-rsid="00735f64"/>
    </style:style>
    <style:style style:name="P89" style:family="paragraph" style:parent-style-name="Heading_20_6">
      <style:text-properties officeooo:rsid="00735f64" officeooo:paragraph-rsid="00f81777"/>
    </style:style>
    <style:style style:name="P90" style:family="paragraph" style:parent-style-name="Heading_20_2">
      <style:text-properties officeooo:paragraph-rsid="0096caed"/>
    </style:style>
    <style:style style:name="P91" style:family="paragraph" style:parent-style-name="Heading_20_6">
      <style:text-properties officeooo:paragraph-rsid="0074f586"/>
    </style:style>
    <style:style style:name="P92" style:family="paragraph" style:parent-style-name="Heading_20_2">
      <style:text-properties officeooo:rsid="0114c619" officeooo:paragraph-rsid="0147a2e6"/>
    </style:style>
    <style:style style:name="P93" style:family="paragraph" style:parent-style-name="Heading_20_6">
      <style:text-properties officeooo:rsid="00e15419" officeooo:paragraph-rsid="0147a2e6"/>
    </style:style>
    <style:style style:name="P94" style:family="paragraph" style:parent-style-name="Heading_20_2">
      <style:text-properties officeooo:rsid="00e15419" officeooo:paragraph-rsid="00e15419"/>
    </style:style>
    <style:style style:name="P95" style:family="paragraph" style:parent-style-name="Heading_20_6">
      <style:text-properties officeooo:rsid="00e15419" officeooo:paragraph-rsid="00e15419"/>
    </style:style>
    <style:style style:name="P96" style:family="paragraph" style:parent-style-name="Heading_20_6">
      <style:text-properties officeooo:rsid="0078322f" officeooo:paragraph-rsid="0078322f"/>
    </style:style>
    <style:style style:name="P97" style:family="paragraph" style:parent-style-name="Heading_20_6">
      <style:text-properties officeooo:rsid="00788460" officeooo:paragraph-rsid="00788460"/>
    </style:style>
    <style:style style:name="P98" style:family="paragraph" style:parent-style-name="Heading_20_6">
      <style:text-properties officeooo:paragraph-rsid="01016172"/>
    </style:style>
    <style:style style:name="P99" style:family="paragraph" style:parent-style-name="Heading_20_2">
      <style:text-properties officeooo:paragraph-rsid="01181b3f"/>
    </style:style>
    <style:style style:name="P100" style:family="paragraph" style:parent-style-name="Heading_20_6">
      <style:text-properties officeooo:paragraph-rsid="01181b3f"/>
    </style:style>
    <style:style style:name="P101" style:family="paragraph" style:parent-style-name="Heading_20_6">
      <style:text-properties officeooo:rsid="007a7724" officeooo:paragraph-rsid="007a7724"/>
    </style:style>
    <style:style style:name="P102" style:family="paragraph" style:parent-style-name="Heading_20_6">
      <style:text-properties officeooo:rsid="0081b772" officeooo:paragraph-rsid="0081b772"/>
    </style:style>
    <style:style style:name="P103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04" style:family="paragraph" style:parent-style-name="Heading_20_6">
      <style:text-properties officeooo:rsid="0078322f" officeooo:paragraph-rsid="007d81c5"/>
    </style:style>
    <style:style style:name="P105" style:family="paragraph" style:parent-style-name="Heading_20_6">
      <style:text-properties officeooo:rsid="007d81c5" officeooo:paragraph-rsid="007d81c5"/>
    </style:style>
    <style:style style:name="P106" style:family="paragraph" style:parent-style-name="Heading_20_6">
      <style:text-properties officeooo:paragraph-rsid="0080c287"/>
    </style:style>
    <style:style style:name="P107" style:family="paragraph" style:parent-style-name="Heading_20_6">
      <style:text-properties officeooo:rsid="0080c287" officeooo:paragraph-rsid="0080c287"/>
    </style:style>
    <style:style style:name="P108" style:family="paragraph" style:parent-style-name="Heading_20_6">
      <style:text-properties officeooo:paragraph-rsid="0080d3c8"/>
    </style:style>
    <style:style style:name="P109" style:family="paragraph" style:parent-style-name="Heading_20_1">
      <style:text-properties officeooo:paragraph-rsid="0114c619"/>
    </style:style>
    <style:style style:name="P110" style:family="paragraph" style:parent-style-name="Text_20_body">
      <style:text-properties officeooo:rsid="006dc7e5" officeooo:paragraph-rsid="006dc7e5"/>
    </style:style>
    <style:style style:name="P111" style:family="paragraph" style:parent-style-name="Heading_20_2">
      <style:text-properties officeooo:rsid="006e91f7" officeooo:paragraph-rsid="0096caed"/>
    </style:style>
    <style:style style:name="P112" style:family="paragraph" style:parent-style-name="Heading_20_6">
      <style:text-properties officeooo:rsid="006e91f7" officeooo:paragraph-rsid="006e91f7"/>
    </style:style>
    <style:style style:name="P113" style:family="paragraph" style:parent-style-name="Heading_20_2">
      <style:text-properties officeooo:paragraph-rsid="011a38fa"/>
    </style:style>
    <style:style style:name="P114" style:family="paragraph" style:parent-style-name="Heading_20_6">
      <style:text-properties officeooo:rsid="006dc7e5" officeooo:paragraph-rsid="01181fa5"/>
    </style:style>
    <style:style style:name="P115" style:family="paragraph" style:parent-style-name="Heading_20_2">
      <style:text-properties officeooo:paragraph-rsid="01181fa5"/>
    </style:style>
    <style:style style:name="P116" style:family="paragraph" style:parent-style-name="Heading_20_6">
      <style:text-properties officeooo:rsid="006dc7e5" officeooo:paragraph-rsid="006e91f7"/>
    </style:style>
    <style:style style:name="P117" style:family="paragraph" style:parent-style-name="Heading_20_2">
      <style:text-properties officeooo:paragraph-rsid="0036524d"/>
    </style:style>
    <style:style style:name="P118" style:family="paragraph" style:parent-style-name="Heading_20_2">
      <style:text-properties officeooo:rsid="006e91f7" officeooo:paragraph-rsid="0149e9b8"/>
    </style:style>
    <style:style style:name="P119" style:family="paragraph" style:parent-style-name="Heading_20_6">
      <style:text-properties officeooo:rsid="006e91f7" officeooo:paragraph-rsid="0149e9b8"/>
    </style:style>
    <style:style style:name="P120" style:family="paragraph" style:parent-style-name="Heading_20_2">
      <style:text-properties officeooo:rsid="01439a10" officeooo:paragraph-rsid="01454757"/>
    </style:style>
    <style:style style:name="P121" style:family="paragraph" style:parent-style-name="Heading_20_6">
      <style:text-properties officeooo:rsid="01439a10" officeooo:paragraph-rsid="01439a10"/>
    </style:style>
    <style:style style:name="P122" style:family="paragraph" style:parent-style-name="Heading_20_2">
      <style:text-properties officeooo:rsid="006e91f7" officeooo:paragraph-rsid="006e91f7"/>
    </style:style>
    <style:style style:name="P123" style:family="paragraph" style:parent-style-name="Heading_20_6">
      <style:text-properties officeooo:paragraph-rsid="006e91f7"/>
    </style:style>
    <style:style style:name="P124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5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6" style:family="paragraph" style:parent-style-name="Text_20_body">
      <style:text-properties officeooo:paragraph-rsid="008573af"/>
    </style:style>
    <style:style style:name="P127" style:family="paragraph" style:parent-style-name="Heading_20_2">
      <style:text-properties officeooo:paragraph-rsid="00d275e5"/>
    </style:style>
    <style:style style:name="P128" style:family="paragraph" style:parent-style-name="Heading_20_6">
      <style:text-properties officeooo:rsid="0036b5d0" officeooo:paragraph-rsid="008573af"/>
    </style:style>
    <style:style style:name="P12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1" style:family="paragraph" style:parent-style-name="Heading_20_2">
      <style:text-properties officeooo:paragraph-rsid="0113d44d"/>
    </style:style>
    <style:style style:name="P132" style:family="paragraph" style:parent-style-name="Heading_20_6">
      <style:text-properties officeooo:rsid="0037062c" officeooo:paragraph-rsid="008573af"/>
    </style:style>
    <style:style style:name="P133" style:family="paragraph" style:parent-style-name="Heading_20_2">
      <style:text-properties officeooo:paragraph-rsid="008573af"/>
    </style:style>
    <style:style style:name="P134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5" style:family="paragraph" style:parent-style-name="Heading_20_6">
      <style:paragraph-properties style:writing-mode="lr-tb"/>
      <style:text-properties officeooo:paragraph-rsid="00da9fd4"/>
    </style:style>
    <style:style style:name="P136" style:family="paragraph" style:parent-style-name="Heading_20_2">
      <style:text-properties officeooo:rsid="0036b5d0" officeooo:paragraph-rsid="01524af4"/>
    </style:style>
    <style:style style:name="P137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8" style:family="paragraph" style:parent-style-name="Heading_20_2">
      <style:text-properties officeooo:paragraph-rsid="01524af4"/>
    </style:style>
    <style:style style:name="P139" style:family="paragraph" style:parent-style-name="Heading_20_6">
      <style:text-properties officeooo:rsid="0038dfd1" officeooo:paragraph-rsid="008573af"/>
    </style:style>
    <style:style style:name="P140" style:family="paragraph" style:parent-style-name="Heading_20_6">
      <style:text-properties officeooo:rsid="003bc049" officeooo:paragraph-rsid="008573af"/>
    </style:style>
    <style:style style:name="P141" style:family="paragraph" style:parent-style-name="Heading_20_2">
      <style:text-properties officeooo:rsid="00d76946" officeooo:paragraph-rsid="00e6ad03"/>
    </style:style>
    <style:style style:name="P142" style:family="paragraph" style:parent-style-name="Heading_20_6">
      <style:text-properties officeooo:paragraph-rsid="00d76946"/>
    </style:style>
    <style:style style:name="P143" style:family="paragraph" style:parent-style-name="Heading_20_6">
      <style:text-properties officeooo:rsid="003ddad5" officeooo:paragraph-rsid="008573af"/>
    </style:style>
    <style:style style:name="P144" style:family="paragraph" style:parent-style-name="Heading_20_6">
      <style:text-properties officeooo:paragraph-rsid="008573af"/>
    </style:style>
    <style:style style:name="P145" style:family="paragraph" style:parent-style-name="Horizontal_20_Line">
      <style:text-properties officeooo:paragraph-rsid="01207676"/>
    </style:style>
    <style:style style:name="P146" style:family="paragraph" style:parent-style-name="Heading_20_1">
      <style:text-properties officeooo:paragraph-rsid="0101f59d"/>
    </style:style>
    <style:style style:name="P147" style:family="paragraph" style:parent-style-name="Heading_20_2">
      <style:text-properties officeooo:paragraph-rsid="0101f59d"/>
    </style:style>
    <style:style style:name="P148" style:family="paragraph" style:parent-style-name="Heading_20_6">
      <style:text-properties officeooo:paragraph-rsid="0101f59d"/>
    </style:style>
    <style:style style:name="P149" style:family="paragraph" style:parent-style-name="Heading_20_6">
      <style:paragraph-properties style:writing-mode="lr-tb"/>
      <style:text-properties officeooo:paragraph-rsid="0101f59d"/>
    </style:style>
    <style:style style:name="P150" style:family="paragraph" style:parent-style-name="Heading_20_2">
      <style:text-properties fo:language="en" fo:country="US"/>
    </style:style>
    <style:style style:name="P151" style:family="paragraph" style:parent-style-name="Text_20_body">
      <style:text-properties officeooo:paragraph-rsid="00cbe9a7"/>
    </style:style>
    <style:style style:name="P152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53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54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5" style:family="paragraph" style:parent-style-name="Horizontal_20_Line">
      <style:text-properties fo:language="en" fo:country="US" officeooo:paragraph-rsid="00cbe9a7"/>
    </style:style>
    <style:style style:name="P156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7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8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9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60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61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62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63" style:family="paragraph" style:parent-style-name="Text_20_body">
      <style:text-properties officeooo:paragraph-rsid="00fd9722"/>
    </style:style>
    <style:style style:name="P164" style:family="paragraph" style:parent-style-name="Horizontal_20_Line">
      <style:text-properties officeooo:paragraph-rsid="00fd9722"/>
    </style:style>
    <style:style style:name="P165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6" style:family="paragraph" style:parent-style-name="Heading_20_6">
      <style:text-properties officeooo:rsid="0041772e" officeooo:paragraph-rsid="0041772e"/>
    </style:style>
    <style:style style:name="P167" style:family="paragraph" style:parent-style-name="Heading_20_2">
      <style:text-properties officeooo:paragraph-rsid="0050d590"/>
    </style:style>
    <style:style style:name="P168" style:family="paragraph" style:parent-style-name="Heading_20_6">
      <style:text-properties officeooo:rsid="004231ca" officeooo:paragraph-rsid="0050d590"/>
    </style:style>
    <style:style style:name="P169" style:family="paragraph" style:parent-style-name="Heading_20_6">
      <style:text-properties officeooo:rsid="004231ca" officeooo:paragraph-rsid="004231ca"/>
    </style:style>
    <style:style style:name="P170" style:family="paragraph" style:parent-style-name="Heading_20_6">
      <style:text-properties officeooo:rsid="0044426f" officeooo:paragraph-rsid="0044426f"/>
    </style:style>
    <style:style style:name="P171" style:family="paragraph" style:parent-style-name="Heading_20_6">
      <style:text-properties officeooo:rsid="0045b72a" officeooo:paragraph-rsid="0045b72a"/>
    </style:style>
    <style:style style:name="P172" style:family="paragraph" style:parent-style-name="Heading_20_6">
      <style:text-properties officeooo:rsid="00478282" officeooo:paragraph-rsid="00478282"/>
    </style:style>
    <style:style style:name="P173" style:family="paragraph" style:parent-style-name="Heading_20_6">
      <style:text-properties officeooo:rsid="0048db21" officeooo:paragraph-rsid="0048db21"/>
    </style:style>
    <style:style style:name="P174" style:family="paragraph" style:parent-style-name="Heading_20_6">
      <style:text-properties officeooo:rsid="004aca81" officeooo:paragraph-rsid="004aca81"/>
    </style:style>
    <style:style style:name="P175" style:family="paragraph" style:parent-style-name="Heading_20_6">
      <style:text-properties officeooo:rsid="004cbc04" officeooo:paragraph-rsid="004cbc04"/>
    </style:style>
    <style:style style:name="P176" style:family="paragraph" style:parent-style-name="Heading_20_2">
      <style:text-properties officeooo:paragraph-rsid="009777bf"/>
    </style:style>
    <style:style style:name="P177" style:family="paragraph" style:parent-style-name="Heading_20_6">
      <style:text-properties officeooo:rsid="004da5c5" officeooo:paragraph-rsid="004e78b0"/>
    </style:style>
    <style:style style:name="P178" style:family="paragraph" style:parent-style-name="Heading_20_6">
      <style:text-properties officeooo:rsid="004e78b0" officeooo:paragraph-rsid="004e78b0"/>
    </style:style>
    <style:style style:name="P179" style:family="paragraph" style:parent-style-name="Heading_20_2">
      <style:text-properties officeooo:paragraph-rsid="00c41095"/>
    </style:style>
    <style:style style:name="P180" style:family="paragraph" style:parent-style-name="Heading_20_6">
      <style:text-properties officeooo:rsid="004e78b0" officeooo:paragraph-rsid="0050d590"/>
    </style:style>
    <style:style style:name="P181" style:family="paragraph" style:parent-style-name="Heading_20_6">
      <style:text-properties officeooo:rsid="004febc9" officeooo:paragraph-rsid="004febc9"/>
    </style:style>
    <style:style style:name="P182" style:family="paragraph" style:parent-style-name="Heading_20_6">
      <style:text-properties officeooo:rsid="0050d590" officeooo:paragraph-rsid="0050d590"/>
    </style:style>
    <style:style style:name="P183" style:family="paragraph" style:parent-style-name="Heading_20_6">
      <style:text-properties officeooo:rsid="005194d4" officeooo:paragraph-rsid="005194d4"/>
    </style:style>
    <style:style style:name="P184" style:family="paragraph" style:parent-style-name="Heading_20_6">
      <style:text-properties officeooo:paragraph-rsid="005194d4"/>
    </style:style>
    <style:style style:name="P185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6" style:family="paragraph" style:parent-style-name="Heading_20_2">
      <style:text-properties officeooo:paragraph-rsid="00cbe9a7"/>
    </style:style>
    <style:style style:name="P187" style:family="paragraph" style:parent-style-name="Heading_20_6">
      <style:text-properties officeooo:rsid="0057a35c" officeooo:paragraph-rsid="00cbe9a7"/>
    </style:style>
    <style:style style:name="P188" style:family="paragraph" style:parent-style-name="Heading_20_6">
      <style:text-properties officeooo:rsid="005a5358" officeooo:paragraph-rsid="00cbe9a7"/>
    </style:style>
    <style:style style:name="P189" style:family="paragraph" style:parent-style-name="Heading_20_6">
      <style:text-properties officeooo:rsid="005ccc8d" officeooo:paragraph-rsid="00cbe9a7"/>
    </style:style>
    <style:style style:name="P190" style:family="paragraph" style:parent-style-name="Heading_20_6">
      <style:text-properties officeooo:rsid="005ce75d" officeooo:paragraph-rsid="00cbe9a7"/>
    </style:style>
    <style:style style:name="P191" style:family="paragraph" style:parent-style-name="Heading_20_6">
      <style:text-properties officeooo:rsid="005925a4" officeooo:paragraph-rsid="00cbe9a7"/>
    </style:style>
    <style:style style:name="P192" style:family="paragraph" style:parent-style-name="Heading_20_6">
      <style:text-properties officeooo:rsid="0032f870" officeooo:paragraph-rsid="00cbe9a7"/>
    </style:style>
    <style:style style:name="P193" style:family="paragraph" style:parent-style-name="Heading_20_6">
      <style:text-properties officeooo:paragraph-rsid="00cbe9a7"/>
    </style:style>
    <style:style style:name="P194" style:family="paragraph" style:parent-style-name="Heading_20_6">
      <style:text-properties officeooo:rsid="005d7fa7" officeooo:paragraph-rsid="00cbe9a7"/>
    </style:style>
    <style:style style:name="P195" style:family="paragraph" style:parent-style-name="Heading_20_6">
      <style:text-properties officeooo:rsid="005f7e45" officeooo:paragraph-rsid="00cbe9a7"/>
    </style:style>
    <style:style style:name="P196" style:family="paragraph" style:parent-style-name="Heading_20_2">
      <style:text-properties officeooo:rsid="00de5d9f" officeooo:paragraph-rsid="0157c4a5"/>
    </style:style>
    <style:style style:name="P197" style:family="paragraph" style:parent-style-name="Heading_20_6">
      <style:text-properties officeooo:rsid="00de5d9f" officeooo:paragraph-rsid="0157c4a5"/>
    </style:style>
    <style:style style:name="P198" style:family="paragraph" style:parent-style-name="Heading_20_6">
      <style:text-properties officeooo:rsid="00612dec" officeooo:paragraph-rsid="00cbe9a7"/>
    </style:style>
    <style:style style:name="P199" style:family="paragraph" style:parent-style-name="Heading_20_6">
      <style:text-properties officeooo:rsid="00623d25" officeooo:paragraph-rsid="00cbe9a7"/>
    </style:style>
    <style:style style:name="P200" style:family="paragraph" style:parent-style-name="Heading_20_6">
      <style:text-properties officeooo:rsid="0064250a" officeooo:paragraph-rsid="00cbe9a7"/>
    </style:style>
    <style:style style:name="P201" style:family="paragraph" style:parent-style-name="Heading_20_6">
      <style:text-properties officeooo:rsid="0066bd59" officeooo:paragraph-rsid="00cbe9a7"/>
    </style:style>
    <style:style style:name="P202" style:family="paragraph" style:parent-style-name="Heading_20_2">
      <style:text-properties officeooo:paragraph-rsid="0112ac2d"/>
    </style:style>
    <style:style style:name="P203" style:family="paragraph" style:parent-style-name="Heading_20_6">
      <style:text-properties officeooo:paragraph-rsid="0112ac2d"/>
    </style:style>
    <style:style style:name="P204" style:family="paragraph" style:parent-style-name="Heading_20_6">
      <style:text-properties officeooo:rsid="0032f870" officeooo:paragraph-rsid="0112ac2d"/>
    </style:style>
    <style:style style:name="P205" style:family="paragraph" style:parent-style-name="Heading_20_6">
      <style:text-properties officeooo:rsid="00687cfd" officeooo:paragraph-rsid="00cbe9a7"/>
    </style:style>
    <style:style style:name="P206" style:family="paragraph" style:parent-style-name="Heading_20_6">
      <style:text-properties officeooo:rsid="006adf42" officeooo:paragraph-rsid="00cbe9a7"/>
    </style:style>
    <style:style style:name="P207" style:family="paragraph" style:parent-style-name="Heading_20_6">
      <style:text-properties officeooo:rsid="006bc50a" officeooo:paragraph-rsid="00cbe9a7"/>
    </style:style>
    <style:style style:name="P208" style:family="paragraph" style:parent-style-name="Heading_20_6">
      <style:text-properties officeooo:rsid="002e632f" officeooo:paragraph-rsid="00cbe9a7"/>
    </style:style>
    <style:style style:name="P209" style:family="paragraph" style:parent-style-name="Heading_20_6">
      <style:text-properties officeooo:rsid="006c0690" officeooo:paragraph-rsid="00cbe9a7"/>
    </style:style>
    <style:style style:name="P210" style:family="paragraph" style:parent-style-name="Heading_20_6">
      <style:text-properties officeooo:rsid="006c0690" officeooo:paragraph-rsid="00ed4a5f"/>
    </style:style>
    <style:style style:name="P211" style:family="paragraph" style:parent-style-name="Horizontal_20_Line">
      <style:text-properties officeooo:paragraph-rsid="00ed4a5f"/>
    </style:style>
    <style:style style:name="P212" style:family="paragraph" style:parent-style-name="Heading_20_1">
      <style:text-properties officeooo:paragraph-rsid="00cbe9a7"/>
    </style:style>
    <style:style style:name="P213" style:family="paragraph" style:parent-style-name="Text_20_body">
      <style:paragraph-properties style:writing-mode="lr-tb"/>
      <style:text-properties officeooo:paragraph-rsid="00ea689f"/>
    </style:style>
    <style:style style:name="P214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5" style:family="paragraph" style:parent-style-name="Text_20_body">
      <style:paragraph-properties style:writing-mode="lr-tb"/>
      <style:text-properties officeooo:rsid="006c0690" officeooo:paragraph-rsid="00cbe9a7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b1e7b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5b101b"/>
    </style:style>
    <style:style style:name="T123" style:family="text">
      <style:text-properties style:font-name="Courier New1" officeooo:rsid="015b101b"/>
    </style:style>
    <style:style style:name="T124" style:family="text">
      <style:text-properties officeooo:rsid="012f203e"/>
    </style:style>
    <style:style style:name="T125" style:family="text">
      <style:text-properties fo:font-weight="bold" officeooo:rsid="012f203e" style:font-weight-asian="bold" style:font-weight-complex="bold"/>
    </style:style>
    <style:style style:name="T126" style:family="text">
      <style:text-properties officeooo:rsid="01549835"/>
    </style:style>
    <style:style style:name="T127" style:family="text">
      <style:text-properties officeooo:rsid="0026fadb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9" style:family="text">
      <style:text-properties officeooo:rsid="002de707"/>
    </style:style>
    <style:style style:name="T130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31" style:family="text">
      <style:text-properties officeooo:rsid="00cea5d6"/>
    </style:style>
    <style:style style:name="T132" style:family="text">
      <style:text-properties style:font-name="Courier New1" officeooo:rsid="00cea5d6"/>
    </style:style>
    <style:style style:name="T133" style:family="text">
      <style:text-properties officeooo:rsid="00a77328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5" style:family="text">
      <style:text-properties officeooo:rsid="00aa386a"/>
    </style:style>
    <style:style style:name="T136" style:family="text">
      <style:text-properties fo:font-weight="normal" officeooo:rsid="0114c619" style:font-weight-asian="normal" style:font-weight-complex="normal"/>
    </style:style>
    <style:style style:name="T137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8" style:family="text">
      <style:text-properties fo:font-weight="normal" officeooo:rsid="011f17b7" style:font-weight-asian="normal" style:font-weight-complex="normal"/>
    </style:style>
    <style:style style:name="T139" style:family="text">
      <style:text-properties fo:font-weight="bold" officeooo:rsid="0073166a" style:font-weight-asian="bold" style:font-weight-complex="bold"/>
    </style:style>
    <style:style style:name="T140" style:family="text">
      <style:text-properties style:font-name="Courier New1" fo:font-weight="normal" officeooo:rsid="0114c619" style:font-weight-asian="normal" style:font-weight-complex="normal"/>
    </style:style>
    <style:style style:name="T141" style:family="text">
      <style:text-properties style:font-name="Arial1" fo:font-weight="normal" officeooo:rsid="0114c619" style:font-weight-asian="normal" style:font-weight-complex="normal"/>
    </style:style>
    <style:style style:name="T14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4" style:family="text">
      <style:text-properties fo:font-weight="normal" officeooo:rsid="0121d3f2" style:font-weight-asian="normal" style:font-weight-complex="normal"/>
    </style:style>
    <style:style style:name="T145" style:family="text">
      <style:text-properties fo:language="en" fo:country="US" fo:font-weight="bold" officeooo:rsid="00c41095" style:font-weight-asian="bold" style:font-weight-complex="bold"/>
    </style:style>
    <style:style style:name="T146" style:family="text">
      <style:text-properties style:font-name="Courier New1" fo:font-weight="normal" style:font-weight-asian="normal" style:font-weight-complex="normal"/>
    </style:style>
    <style:style style:name="T147" style:family="text">
      <style:text-properties fo:font-weight="normal" officeooo:rsid="012254a9" style:font-weight-asian="normal" style:font-weight-complex="normal"/>
    </style:style>
    <style:style style:name="T148" style:family="text">
      <style:text-properties style:font-name="Courier New1" fo:font-weight="normal" officeooo:rsid="012254a9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50" style:family="text">
      <style:text-properties officeooo:rsid="007221fa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52" style:family="text">
      <style:text-properties officeooo:rsid="0073166a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5" style:family="text">
      <style:text-properties officeooo:rsid="01454757"/>
    </style:style>
    <style:style style:name="T156" style:family="text">
      <style:text-properties style:font-name="Courier New1" officeooo:rsid="01454757"/>
    </style:style>
    <style:style style:name="T1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style:font-name="Courier New1" officeooo:rsid="010549aa"/>
    </style:style>
    <style:style style:name="T160" style:family="text">
      <style:text-properties officeooo:rsid="010549aa"/>
    </style:style>
    <style:style style:name="T161" style:family="text">
      <style:text-properties style:font-name="Courier New1" officeooo:rsid="00ac99f1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4" style:family="text">
      <style:text-properties style:font-name="Courier New1" officeooo:rsid="00fe523c"/>
    </style:style>
    <style:style style:name="T16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5498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6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7" style:family="text">
      <style:text-properties style:font-name="Courier New1" officeooo:rsid="011141b6"/>
    </style:style>
    <style:style style:name="T16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1" style:family="text">
      <style:text-properties officeooo:rsid="00735f64"/>
    </style:style>
    <style:style style:name="T172" style:family="text">
      <style:text-properties officeooo:rsid="00f81777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officeooo:rsid="0080c287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8" style:family="text">
      <style:text-properties style:font-name="Courier New1" officeooo:rsid="0080c287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0" style:family="text">
      <style:text-properties officeooo:rsid="0074f586"/>
    </style:style>
    <style:style style:name="T181" style:family="text">
      <style:text-properties style:font-name="Courier New1" officeooo:rsid="00735f64"/>
    </style:style>
    <style:style style:name="T182" style:family="text">
      <style:text-properties style:font-name="Courier New1" officeooo:rsid="00adf037"/>
    </style:style>
    <style:style style:name="T183" style:family="text">
      <style:text-properties officeooo:rsid="00cd0955"/>
    </style:style>
    <style:style style:name="T184" style:family="text">
      <style:text-properties officeooo:rsid="007489f5"/>
    </style:style>
    <style:style style:name="T185" style:family="text">
      <style:text-properties officeooo:rsid="00adf037"/>
    </style:style>
    <style:style style:name="T186" style:family="text">
      <style:text-properties style:font-name="Courier New1" officeooo:rsid="0074f586"/>
    </style:style>
    <style:style style:name="T18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0" style:family="text">
      <style:text-properties officeooo:rsid="00788460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3" style:family="text">
      <style:text-properties style:font-name="Courier New1" officeooo:rsid="00788460"/>
    </style:style>
    <style:style style:name="T194" style:family="text">
      <style:text-properties officeooo:rsid="00ac99f1"/>
    </style:style>
    <style:style style:name="T195" style:family="text">
      <style:text-properties style:font-name="Arial1"/>
    </style:style>
    <style:style style:name="T196" style:family="text">
      <style:text-properties style:font-name="Arial1" officeooo:rsid="00ac99f1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8" style:family="text">
      <style:text-properties officeooo:rsid="007a7724"/>
    </style:style>
    <style:style style:name="T19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1" style:family="text">
      <style:text-properties style:font-name="Courier New1" officeooo:rsid="007a7724"/>
    </style:style>
    <style:style style:name="T202" style:family="text">
      <style:text-properties officeooo:rsid="00fe523c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4" style:family="text">
      <style:text-properties officeooo:rsid="01016172"/>
    </style:style>
    <style:style style:name="T205" style:family="text">
      <style:text-properties style:font-name="Courier New1" officeooo:rsid="01016172"/>
    </style:style>
    <style:style style:name="T206" style:family="text">
      <style:text-properties officeooo:rsid="0101f59d"/>
    </style:style>
    <style:style style:name="T207" style:family="text">
      <style:text-properties style:font-name="Courier New1" officeooo:rsid="0101f59d"/>
    </style:style>
    <style:style style:name="T208" style:family="text">
      <style:text-properties officeooo:rsid="00fe0e84"/>
    </style:style>
    <style:style style:name="T209" style:family="text">
      <style:text-properties style:font-name="Courier New1" officeooo:rsid="00fe0e84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6" style:family="text">
      <style:text-properties officeooo:rsid="01181b3f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8" style:family="text">
      <style:text-properties style:font-name="Courier New1" officeooo:rsid="01181b3f"/>
    </style:style>
    <style:style style:name="T219" style:family="text">
      <style:text-properties fo:font-style="italic" officeooo:rsid="01181b3f" style:font-style-asian="italic" style:font-style-complex="italic"/>
    </style:style>
    <style:style style:name="T220" style:family="text">
      <style:text-properties fo:font-style="normal" officeooo:rsid="01181b3f" style:font-style-asian="normal" style:font-style-complex="normal"/>
    </style:style>
    <style:style style:name="T221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3" style:family="text">
      <style:text-properties officeooo:rsid="007bf9df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5" style:family="text">
      <style:text-properties style:font-name="Courier New1" officeooo:rsid="007bf9df"/>
    </style:style>
    <style:style style:name="T226" style:family="text">
      <style:text-properties style:font-name="Courier New1" officeooo:rsid="007d1909"/>
    </style:style>
    <style:style style:name="T227" style:family="text">
      <style:text-properties officeooo:rsid="0081b772"/>
    </style:style>
    <style:style style:name="T228" style:family="text">
      <style:text-properties officeooo:rsid="0082ae64"/>
    </style:style>
    <style:style style:name="T229" style:family="text">
      <style:text-properties style:font-name="Courier New1" officeooo:rsid="0082ae64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1" style:family="text">
      <style:text-properties officeooo:rsid="007d1909"/>
    </style:style>
    <style:style style:name="T232" style:family="text">
      <style:text-properties officeooo:rsid="00ae0588"/>
    </style:style>
    <style:style style:name="T233" style:family="text">
      <style:text-properties officeooo:rsid="00cff26e"/>
    </style:style>
    <style:style style:name="T234" style:family="text">
      <style:text-properties officeooo:rsid="007d81c5"/>
    </style:style>
    <style:style style:name="T235" style:family="text">
      <style:text-properties style:font-name="Courier New1" officeooo:rsid="007d81c5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7" style:family="text">
      <style:text-properties officeooo:rsid="007f4f2e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561ff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0" style:family="text">
      <style:text-properties officeooo:rsid="01561ffc"/>
    </style:style>
    <style:style style:name="T241" style:family="text">
      <style:text-properties officeooo:rsid="0080d3c8"/>
    </style:style>
    <style:style style:name="T242" style:family="text">
      <style:text-properties style:font-name="Courier New1" officeooo:rsid="0080d3c8"/>
    </style:style>
    <style:style style:name="T243" style:family="text">
      <style:text-properties officeooo:rsid="00ccd9db"/>
    </style:style>
    <style:style style:name="T244" style:family="text">
      <style:text-properties officeooo:rsid="00f8c2be"/>
    </style:style>
    <style:style style:name="T245" style:family="text">
      <style:text-properties officeooo:rsid="00ae5505"/>
    </style:style>
    <style:style style:name="T246" style:family="text">
      <style:text-properties officeooo:rsid="0036524d"/>
    </style:style>
    <style:style style:name="T247" style:family="text">
      <style:text-properties style:font-name="Arial1" fo:font-size="9pt" fo:language="en" fo:country="US" officeooo:rsid="00708c71" style:font-size-asian="9pt" style:font-size-complex="9pt"/>
    </style:style>
    <style:style style:name="T248" style:family="text">
      <style:text-properties style:font-name="Arial1" fo:font-size="9pt" fo:language="en" fo:country="US" officeooo:rsid="007221fa" style:font-size-asian="9pt" style:font-size-complex="9pt"/>
    </style:style>
    <style:style style:name="T249" style:family="text">
      <style:text-properties style:font-name="Arial1" fo:font-size="9pt" fo:language="en" fo:country="US" officeooo:rsid="00da9fd4" style:font-size-asian="9pt" style:font-size-complex="9pt"/>
    </style:style>
    <style:style style:name="T250" style:family="text">
      <style:text-properties style:font-name="Courier New1" fo:font-size="9pt" fo:language="en" fo:country="US" style:font-size-asian="9pt" style:font-size-complex="9pt"/>
    </style:style>
    <style:style style:name="T251" style:family="text">
      <style:text-properties officeooo:rsid="00da9fd4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3" style:family="text">
      <style:text-properties officeooo:rsid="00db5a99"/>
    </style:style>
    <style:style style:name="T254" style:family="text">
      <style:text-properties style:font-name="Courier New1" officeooo:rsid="00db5a99"/>
    </style:style>
    <style:style style:name="T25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6" style:family="text">
      <style:text-properties officeooo:rsid="011a38fa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8" style:family="text">
      <style:text-properties officeooo:rsid="006e91f7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0" style:family="text">
      <style:text-properties officeooo:rsid="00d0fcdc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2" style:family="text">
      <style:text-properties style:font-name="Courier New1" officeooo:rsid="006e91f7"/>
    </style:style>
    <style:style style:name="T26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4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65" style:family="text">
      <style:text-properties officeooo:rsid="0036b5d0"/>
    </style:style>
    <style:style style:name="T266" style:family="text">
      <style:text-properties officeooo:rsid="00d275e5"/>
    </style:style>
    <style:style style:name="T267" style:family="text">
      <style:text-properties officeooo:rsid="00fc58c3"/>
    </style:style>
    <style:style style:name="T268" style:family="text">
      <style:text-properties officeooo:rsid="00fd9722"/>
    </style:style>
    <style:style style:name="T269" style:family="text">
      <style:text-properties officeooo:rsid="0113d44d"/>
    </style:style>
    <style:style style:name="T270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5" style:family="text">
      <style:text-properties officeooo:rsid="0037062c"/>
    </style:style>
    <style:style style:name="T276" style:family="text">
      <style:text-properties style:font-name="Courier New1" officeooo:rsid="0037062c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0" style:family="text">
      <style:text-properties officeooo:rsid="0038dfd1"/>
    </style:style>
    <style:style style:name="T281" style:family="text">
      <style:text-properties style:font-name="Courier New1" officeooo:rsid="0038dfd1"/>
    </style:style>
    <style:style style:name="T282" style:family="text">
      <style:text-properties officeooo:rsid="00c41095"/>
    </style:style>
    <style:style style:name="T283" style:family="text">
      <style:text-properties fo:language="en" fo:country="US" fo:font-weight="bold" style:font-weight-asian="bold" style:font-weight-complex="bold"/>
    </style:style>
    <style:style style:name="T284" style:family="text">
      <style:text-properties fo:language="en" fo:country="US" officeooo:rsid="00d30090"/>
    </style:style>
    <style:style style:name="T285" style:family="text">
      <style:text-properties style:font-name="Courier New1" fo:language="en" fo:country="US"/>
    </style:style>
    <style:style style:name="T286" style:family="text">
      <style:text-properties fo:language="en" fo:country="US" officeooo:rsid="00da9fd4"/>
    </style:style>
    <style:style style:name="T287" style:family="text">
      <style:text-properties fo:font-weight="bold" officeooo:rsid="014eeb93" style:font-weight-asian="bold" style:font-weight-complex="bold"/>
    </style:style>
    <style:style style:name="T288" style:family="text">
      <style:text-properties officeooo:rsid="014fb290"/>
    </style:style>
    <style:style style:name="T289" style:family="text">
      <style:text-properties officeooo:rsid="01524af4"/>
    </style:style>
    <style:style style:name="T290" style:family="text">
      <style:text-properties officeooo:rsid="003a5871"/>
    </style:style>
    <style:style style:name="T291" style:family="text">
      <style:text-properties officeooo:rsid="00e6ad03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4" style:family="text">
      <style:text-properties style:font-name="Courier New1" officeooo:rsid="00d76946"/>
    </style:style>
    <style:style style:name="T295" style:family="text">
      <style:text-properties officeooo:rsid="00d76946"/>
    </style:style>
    <style:style style:name="T296" style:family="text">
      <style:text-properties officeooo:rsid="00e15419"/>
    </style:style>
    <style:style style:name="T297" style:family="text">
      <style:text-properties style:font-name="Courier New1" officeooo:rsid="00e15419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3" style:family="text">
      <style:text-properties officeooo:rsid="003bc049"/>
    </style:style>
    <style:style style:name="T304" style:family="text">
      <style:text-properties officeooo:rsid="003ddad5"/>
    </style:style>
    <style:style style:name="T305" style:family="text">
      <style:text-properties officeooo:rsid="00d9664a"/>
    </style:style>
    <style:style style:name="T306" style:family="text">
      <style:text-properties style:font-name="Courier New1" officeooo:rsid="00d9664a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8" style:family="text">
      <style:text-properties fo:language="en" fo:country="US" officeooo:rsid="011573ee"/>
    </style:style>
    <style:style style:name="T309" style:family="text">
      <style:text-properties style:font-name="Courier New1" fo:language="en" fo:country="US" officeooo:rsid="011573ee"/>
    </style:style>
    <style:style style:name="T31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3" style:family="text">
      <style:text-properties fo:font-size="9pt" officeooo:rsid="00be561d" style:font-size-asian="9pt" style:font-size-complex="9pt"/>
    </style:style>
    <style:style style:name="T314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15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6" style:family="text">
      <style:text-properties style:font-name="Courier New1" officeooo:rsid="00be561d"/>
    </style:style>
    <style:style style:name="T317" style:family="text">
      <style:text-properties style:font-name="Courier New1" officeooo:rsid="013dab05"/>
    </style:style>
    <style:style style:name="T318" style:family="text">
      <style:text-properties style:font-name="Arial1" fo:font-size="9pt" officeooo:rsid="011573ee" style:font-size-asian="9pt" style:font-size-complex="9pt"/>
    </style:style>
    <style:style style:name="T319" style:family="text">
      <style:text-properties officeooo:rsid="002f012a"/>
    </style:style>
    <style:style style:name="T320" style:family="text">
      <style:text-properties style:font-name="Arial1" fo:font-size="9pt" officeooo:rsid="000cda8a" style:font-size-asian="9pt" style:font-size-complex="9pt"/>
    </style:style>
    <style:style style:name="T321" style:family="text">
      <style:text-properties officeooo:rsid="000cda8a"/>
    </style:style>
    <style:style style:name="T322" style:family="text">
      <style:text-properties style:font-name="Arial1" fo:font-size="9pt" style:font-size-asian="9pt" style:font-size-complex="9pt"/>
    </style:style>
    <style:style style:name="T323" style:family="text">
      <style:text-properties officeooo:rsid="000db421"/>
    </style:style>
    <style:style style:name="T324" style:family="text">
      <style:text-properties style:font-name="Arial1" fo:font-size="9pt" officeooo:rsid="000f1643" style:font-size-asian="9pt" style:font-size-complex="9pt"/>
    </style:style>
    <style:style style:name="T325" style:family="text">
      <style:text-properties officeooo:rsid="000f1643"/>
    </style:style>
    <style:style style:name="T326" style:family="text">
      <style:text-properties officeooo:rsid="014ebe99"/>
    </style:style>
    <style:style style:name="T327" style:family="text">
      <style:text-properties officeooo:rsid="000f82b5"/>
    </style:style>
    <style:style style:name="T328" style:family="text">
      <style:text-properties style:font-name="Arial1" fo:font-size="9pt" officeooo:rsid="000f82b5" style:font-size-asian="9pt" style:font-size-complex="9pt"/>
    </style:style>
    <style:style style:name="T329" style:family="text">
      <style:text-properties style:font-name="Courier New1" fo:font-weight="normal" officeooo:rsid="001180d9" style:font-weight-asian="normal" style:font-weight-complex="normal"/>
    </style:style>
    <style:style style:name="T330" style:family="text">
      <style:text-properties fo:font-weight="normal" officeooo:rsid="001180d9" style:font-weight-asian="normal" style:font-weight-complex="normal"/>
    </style:style>
    <style:style style:name="T331" style:family="text">
      <style:text-properties style:font-name="Courier New1" fo:font-weight="normal" officeooo:rsid="00132930" style:font-weight-asian="normal" style:font-weight-complex="normal"/>
    </style:style>
    <style:style style:name="T332" style:family="text">
      <style:text-properties fo:font-weight="normal" officeooo:rsid="00132930" style:font-weight-asian="normal" style:font-weight-complex="normal"/>
    </style:style>
    <style:style style:name="T333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34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35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6" style:family="text">
      <style:text-properties officeooo:rsid="00cc5d89"/>
    </style:style>
    <style:style style:name="T337" style:family="text">
      <style:text-properties style:font-name="Courier New1" officeooo:rsid="00cc5d89"/>
    </style:style>
    <style:style style:name="T338" style:family="text">
      <style:text-properties style:font-name="Arial1" fo:font-size="9pt" officeooo:rsid="00cc5d89" style:font-size-asian="9pt" style:font-size-complex="9pt"/>
    </style:style>
    <style:style style:name="T339" style:family="text">
      <style:text-properties officeooo:rsid="00162b46"/>
    </style:style>
    <style:style style:name="T340" style:family="text">
      <style:text-properties style:font-name="Courier New1" officeooo:rsid="00162b46"/>
    </style:style>
    <style:style style:name="T341" style:family="text">
      <style:text-properties officeooo:rsid="00f69497"/>
    </style:style>
    <style:style style:name="T342" style:family="text">
      <style:text-properties style:font-name="Courier New1" officeooo:rsid="00f69497"/>
    </style:style>
    <style:style style:name="T343" style:family="text">
      <style:text-properties style:font-name="Arial1" fo:font-size="9pt" officeooo:rsid="00162b46" style:font-size-asian="9pt" style:font-size-complex="9pt"/>
    </style:style>
    <style:style style:name="T344" style:family="text">
      <style:text-properties officeooo:rsid="00f6ca1f"/>
    </style:style>
    <style:style style:name="T345" style:family="text">
      <style:text-properties style:font-name="Courier New1" officeooo:rsid="00f6ca1f"/>
    </style:style>
    <style:style style:name="T346" style:family="text">
      <style:text-properties style:font-name="Arial1" fo:font-size="9pt" officeooo:rsid="00f6ca1f" style:font-size-asian="9pt" style:font-size-complex="9pt"/>
    </style:style>
    <style:style style:name="T347" style:family="text">
      <style:text-properties style:font-name="Arial1" fo:font-size="9pt" officeooo:rsid="001fb21c" style:font-size-asian="9pt" style:font-size-complex="9pt"/>
    </style:style>
    <style:style style:name="T348" style:family="text">
      <style:text-properties style:font-name="Arial1" officeooo:rsid="001fb21c"/>
    </style:style>
    <style:style style:name="T349" style:family="text">
      <style:text-properties officeooo:rsid="0016a20e"/>
    </style:style>
    <style:style style:name="T350" style:family="text">
      <style:text-properties style:font-name="Courier New1" officeooo:rsid="0028dc1a"/>
    </style:style>
    <style:style style:name="T351" style:family="text">
      <style:text-properties officeooo:rsid="0028dc1a"/>
    </style:style>
    <style:style style:name="T352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3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4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55" style:family="text">
      <style:text-properties officeooo:rsid="00d3e1d6"/>
    </style:style>
    <style:style style:name="T356" style:family="text">
      <style:text-properties officeooo:rsid="0050d590"/>
    </style:style>
    <style:style style:name="T357" style:family="text">
      <style:text-properties officeooo:rsid="004febc9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officeooo:rsid="004231ca"/>
    </style:style>
    <style:style style:name="T36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1" style:family="text">
      <style:text-properties style:font-name="Courier New1" officeooo:rsid="0050d590"/>
    </style:style>
    <style:style style:name="T362" style:family="text">
      <style:text-properties officeooo:rsid="0044426f"/>
    </style:style>
    <style:style style:name="T363" style:family="text">
      <style:text-properties officeooo:rsid="0045b72a"/>
    </style:style>
    <style:style style:name="T3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6" style:family="text">
      <style:text-properties officeooo:rsid="00c8d0e5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8" style:family="text">
      <style:text-properties style:font-name="Courier New1" officeooo:rsid="00c8d0e5"/>
    </style:style>
    <style:style style:name="T36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0" style:family="text">
      <style:text-properties officeooo:rsid="005261c2"/>
    </style:style>
    <style:style style:name="T371" style:family="text">
      <style:text-properties style:font-name="Courier New1" officeooo:rsid="005261c2"/>
    </style:style>
    <style:style style:name="T372" style:family="text">
      <style:text-properties officeooo:rsid="00408195"/>
    </style:style>
    <style:style style:name="T373" style:family="text">
      <style:text-properties style:font-name="Courier New1" officeooo:rsid="004e78b0"/>
    </style:style>
    <style:style style:name="T374" style:family="text">
      <style:text-properties officeooo:rsid="004e78b0"/>
    </style:style>
    <style:style style:name="T375" style:family="text">
      <style:text-properties style:font-name="Arial1" officeooo:rsid="004e78b0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7" style:family="text">
      <style:text-properties officeooo:rsid="005194d4"/>
    </style:style>
    <style:style style:name="T378" style:family="text">
      <style:text-properties style:font-name="Courier New1" officeooo:rsid="005194d4"/>
    </style:style>
    <style:style style:name="T3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0" style:family="text">
      <style:text-properties fo:font-style="italic" officeooo:rsid="005194d4" style:font-style-asian="italic" style:font-style-complex="italic"/>
    </style:style>
    <style:style style:name="T381" style:family="text">
      <style:text-properties fo:font-style="normal" officeooo:rsid="005194d4" style:font-style-asian="normal" style:font-style-complex="normal"/>
    </style:style>
    <style:style style:name="T38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83" style:family="text">
      <style:text-properties officeooo:rsid="00d3e1d6" style:font-size-asian="7.84999990463257pt" style:font-weight-asian="normal" style:font-size-complex="9pt" style:font-weight-complex="normal"/>
    </style:style>
    <style:style style:name="T384" style:family="text">
      <style:text-properties officeooo:rsid="0050d590" style:font-size-asian="7.84999990463257pt" style:font-weight-asian="normal" style:font-size-complex="9pt" style:font-weight-complex="normal"/>
    </style:style>
    <style:style style:name="T385" style:family="text">
      <style:text-properties officeooo:rsid="004febc9" style:font-size-asian="7.84999990463257pt" style:font-weight-asian="normal" style:font-size-complex="9pt" style:font-weight-complex="normal"/>
    </style:style>
    <style:style style:name="T386" style:family="text">
      <style:text-properties officeooo:rsid="005ce75d" style:font-size-asian="7.84999990463257pt" style:font-weight-asian="normal" style:font-size-complex="9pt" style:font-weight-complex="normal"/>
    </style:style>
    <style:style style:name="T38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8" style:family="text">
      <style:text-properties officeooo:rsid="005a5358"/>
    </style:style>
    <style:style style:name="T389" style:family="text">
      <style:text-properties style:font-name="Courier New1" officeooo:rsid="005a5358"/>
    </style:style>
    <style:style style:name="T390" style:family="text">
      <style:text-properties officeooo:rsid="005b47d9"/>
    </style:style>
    <style:style style:name="T391" style:family="text">
      <style:text-properties officeooo:rsid="0066bd59"/>
    </style:style>
    <style:style style:name="T3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3" style:family="text">
      <style:text-properties officeooo:rsid="0034c137"/>
    </style:style>
    <style:style style:name="T394" style:family="text">
      <style:text-properties style:font-name="Courier New1" officeooo:rsid="0034c137"/>
    </style:style>
    <style:style style:name="T395" style:family="text">
      <style:text-properties officeooo:rsid="005ce75d"/>
    </style:style>
    <style:style style:name="T3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7" style:family="text">
      <style:text-properties officeooo:rsid="00b57062"/>
    </style:style>
    <style:style style:name="T398" style:family="text">
      <style:text-properties officeooo:rsid="005d7fa7"/>
    </style:style>
    <style:style style:name="T399" style:family="text">
      <style:text-properties style:font-name="Courier New1" officeooo:rsid="005d7fa7"/>
    </style:style>
    <style:style style:name="T400" style:family="text">
      <style:text-properties officeooo:rsid="0157c4a5"/>
    </style:style>
    <style:style style:name="T401" style:family="text">
      <style:text-properties officeooo:rsid="00c730ff"/>
    </style:style>
    <style:style style:name="T402" style:family="text">
      <style:text-properties officeooo:rsid="006bc50a"/>
    </style:style>
    <style:style style:name="T403" style:family="text">
      <style:text-properties officeooo:rsid="00dfbede"/>
    </style:style>
    <style:style style:name="T404" style:family="text">
      <style:text-properties style:font-name="Courier New1" officeooo:rsid="00dfbede"/>
    </style:style>
    <style:style style:name="T405" style:family="text">
      <style:text-properties style:font-name="Courier New1" officeooo:rsid="0157c4a5"/>
    </style:style>
    <style:style style:name="T40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7" style:family="text">
      <style:text-properties officeooo:rsid="00a8c39a"/>
    </style:style>
    <style:style style:name="T408" style:family="text">
      <style:text-properties style:font-name="Courier New1" officeooo:rsid="00a8c39a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0" style:family="text">
      <style:text-properties officeooo:rsid="00653164"/>
    </style:style>
    <style:style style:name="T4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2" style:family="text">
      <style:text-properties style:font-name="Courier New1" officeooo:rsid="00653164"/>
    </style:style>
    <style:style style:name="T413" style:family="text">
      <style:text-properties officeooo:rsid="0032f870"/>
    </style:style>
    <style:style style:name="T414" style:family="text">
      <style:text-properties officeooo:rsid="00f53c6c"/>
    </style:style>
    <style:style style:name="T41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16" style:family="text">
      <style:text-properties officeooo:rsid="0112ac2d"/>
    </style:style>
    <style:style style:name="T41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8" style:family="text">
      <style:text-properties style:font-name="Courier New1" officeooo:rsid="0112ac2d"/>
    </style:style>
    <style:style style:name="T419" style:family="text">
      <style:text-properties officeooo:rsid="00c05bfa"/>
    </style:style>
    <style:style style:name="T420" style:family="text">
      <style:text-properties style:font-name="Courier New1" officeooo:rsid="00c05bfa"/>
    </style:style>
    <style:style style:name="T4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5" style:family="text">
      <style:text-properties officeooo:rsid="00b80e06"/>
    </style:style>
    <style:style style:name="T426" style:family="text">
      <style:text-properties style:font-name="Courier New1" officeooo:rsid="00b80e06"/>
    </style:style>
    <style:style style:name="T42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9" style:family="text">
      <style:text-properties officeooo:rsid="006c0690"/>
    </style:style>
    <style:style style:name="T430" style:family="text">
      <style:text-properties style:font-name="Courier New1" officeooo:rsid="006c0690"/>
    </style:style>
    <style:style style:name="T43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32" style:family="text">
      <style:text-properties officeooo:rsid="00320722"/>
    </style:style>
    <style:style style:name="T433" style:family="text">
      <style:text-properties style:font-name="Courier New1" officeooo:rsid="00320722"/>
    </style:style>
    <style:style style:name="T4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35" style:family="text">
      <style:text-properties officeooo:rsid="006c5dae"/>
    </style:style>
    <style:style style:name="T436" style:family="text">
      <style:text-properties fo:language="en" fo:country="US" fo:font-weight="bold" officeooo:rsid="00e86c1e" style:font-weight-asian="bold" style:font-weight-complex="bold"/>
    </style:style>
    <style:style style:name="T437" style:family="text">
      <style:text-properties fo:language="en" fo:country="US" fo:font-weight="normal" officeooo:rsid="00e86c1e" style:font-weight-asian="normal" style:font-weight-complex="normal"/>
    </style:style>
    <style:style style:name="T438" style:family="text">
      <style:text-properties fo:language="en" fo:country="US" fo:font-weight="normal" officeooo:rsid="00ee95d9" style:font-weight-asian="normal" style:font-weight-complex="normal"/>
    </style:style>
    <style:style style:name="T439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40" style:family="text">
      <style:text-properties fo:language="en" fo:country="US" fo:font-weight="normal" officeooo:rsid="009943ad" style:font-weight-asian="normal" style:font-weight-complex="normal"/>
    </style:style>
    <style:style style:name="T441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42" style:family="text">
      <style:text-properties fo:language="en" fo:country="US" fo:font-weight="bold" officeooo:rsid="00ea689f" style:font-weight-asian="bold" style:font-weight-complex="bold"/>
    </style:style>
    <style:style style:name="T443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44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45" style:family="text">
      <style:text-properties fo:language="en" fo:country="US" fo:font-weight="normal" officeooo:rsid="00ea689f" style:font-weight-asian="normal" style:font-weight-complex="normal"/>
    </style:style>
    <style:style style:name="T446" style:family="text">
      <style:text-properties fo:language="en" fo:country="US" fo:font-weight="normal" officeooo:rsid="00ed151b" style:font-weight-asian="normal" style:font-weight-complex="normal"/>
    </style:style>
    <style:style style:name="T447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8" style:family="text">
      <style:text-properties fo:language="en" fo:country="US" fo:font-weight="normal" officeooo:rsid="00eb95d3" style:font-weight-asian="normal" style:font-weight-complex="normal"/>
    </style:style>
    <style:style style:name="T449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50" style:family="text">
      <style:text-properties fo:language="en" fo:country="US" fo:font-weight="normal" officeooo:rsid="00cbe9a7" style:font-weight-asian="normal" style:font-weight-complex="normal"/>
    </style:style>
    <style:style style:name="T451" style:family="text">
      <style:text-properties fo:language="en" fo:country="US" fo:font-weight="normal" officeooo:rsid="00dd98da" style:font-weight-asian="normal" style:font-weight-complex="normal"/>
    </style:style>
    <style:style style:name="T452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53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54" style:family="text">
      <style:text-properties fo:language="en" fo:country="US" fo:font-weight="normal" officeooo:rsid="00c41095" style:font-weight-asian="normal" style:font-weight-complex="normal"/>
    </style:style>
    <style:style style:name="T455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7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58" text:outline-level="2">OPTIONAL_NO_<text:span text:style-name="T122">ADD_TO_SCOPE</text:span><text:span text:style-name="T45"> </text:span><text:span text:style-name="T17">PUNY++</text:span></text:h>
      <text:h text:style-name="P59" text:outline-level="6"><text:span text:style-name="T122">Remove support for </text:span><text:span text:style-name="T123">add_to_scope</text:span><text:span text:style-name="T122"> property</text:span>.</text:h>
      <text:h text:style-name="P58" text:outline-level="2">OPTIONAL_NO_DARKNESS<text:span text:style-name="T45"> </text:span><text:span text:style-name="T17">PUNY++</text:span></text:h>
      <text:h text:style-name="P59" text:outline-level="6"><text:span text:style-name="T117">Rooms are</text:span> always li<text:span text:style-name="T117">t</text:span>. Don’t define the <text:span text:style-name="T14">light</text:span> attribute.</text:h>
      <text:h text:style-name="P58" text:outline-level="2">OPTIONAL_NON_FLASHING_STATUSLINE<text:span text:style-name="T124"> </text:span><text:span text:style-name="T125">PUNY++</text:span></text:h>
      <text:h text:style-name="P60" text:outline-level="6">Use a faster but less compatible statusline <text:span text:style-name="T126">(</text:span>z5+ <text:span text:style-name="T126">only)</text:span>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7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8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8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61" text:outline-level="6">Show score <text:span text:style-name="T129">and moves</text:span>, <text:span text:style-name="T127">not time</text:span> on the statusline.</text:h>
      <text:h text:style-name="P47" text:outline-level="2">STATUSLINE_TIME<text:span text:style-name="T45"> </text:span><text:span text:style-name="T17">PUNY++</text:span></text:h>
      <text:h text:style-name="P61" text:outline-level="6">Show <text:span text:style-name="T68">time, </text:span><text:span text:style-name="T128">not score</text:span> on the statusline.</text:h>
      <text:h text:style-name="P62" text:outline-level="2">Story = <text:span text:style-name="T130">"</text:span>text<text:span text:style-name="T130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3"/>
      <text:h text:style-name="P64" text:outline-level="1">Library routines</text:h>
      <text:h text:style-name="P65" text:outline-level="2">Achieved(number)</text:h>
      <text:h text:style-name="P66" text:outline-level="6">Complete task<text:span text:style-name="T131"> </text:span><text:span text:style-name="T132">number</text:span>. Requires <text:span text:style-name="T14">TASKS_PROVIDED</text:span>.</text:h>
      <text:h text:style-name="Heading_20_2" text:outline-level="2">Banner<text:span text:style-name="T133">()</text:span></text:h>
      <text:h text:style-name="P67" text:outline-level="6">Print the game name, <text:span text:style-name="T134">serial#</text:span><text:span text:style-name="T109"> </text:span>etc. <text:span text:style-name="T109">To </text:span><text:span text:style-name="T134">skip</text:span><text:span text:style-name="T109"> this at game start, </text:span><text:span text:style-name="T134">r</text:span><text:span text:style-name="T109">eturn 2 from </text:span><text:span text:style-name="T14">Initialise</text:span><text:span text:style-name="T135"> </text:span><text:span text:style-name="T109">and call </text:span><text:span text:style-name="T14">Banner</text:span> later.</text:h>
      <text:h text:style-name="P68" text:outline-level="2"><text:span text:style-name="T136">C</text:span><text:span text:style-name="T137">hangeFgColour</text:span><text:span text:style-name="T99">(</text:span><text:span text:style-name="T137">colour</text:span><text:span text:style-name="T99">)</text:span><text:span text:style-name="T138"> </text:span><text:span text:style-name="T139">PUNY++</text:span></text:h>
      <text:h text:style-name="P69" text:outline-level="6">Change the foreground colour, if game is in z5+ format and colour has been enabled. </text:h>
      <text:h text:style-name="P70" text:outline-level="2">ChooseObjectsFinal_Discard(number) <text:span text:style-name="T139">PUNY++</text:span></text:h>
      <text:h text:style-name="P71" text:outline-level="6"><text:span text:style-name="T136">Call from entry point routine </text:span><text:span text:style-name="T140">ChooseObjectsFinal </text:span>to remove option<text:span text:style-name="T141"> </text:span><text:span text:style-name="T140">number</text:span><text:span text:style-name="T141"> </text:span>(0 or higher)<text:span text:style-name="T141">.</text:span></text:h>
      <text:h text:style-name="P70" text:outline-level="2">ChooseObjectsFinal_<text:span text:style-name="T142">Pick</text:span>(number) <text:span text:style-name="T139">PUNY++</text:span></text:h>
      <text:h text:style-name="P71" text:outline-level="6"><text:span text:style-name="T141">Call from entry point routine </text:span><text:span text:style-name="T140">ChooseObjectsFinal </text:span><text:span text:style-name="T141">to </text:span><text:span text:style-name="T143">pick</text:span><text:span text:style-name="T141"> option </text:span><text:span text:style-name="T140">number</text:span><text:span text:style-name="T141"> (0 or higher).</text:span></text:h>
      <text:h text:style-name="P72" text:outline-level="2"><text:span text:style-name="T136">C</text:span><text:span text:style-name="T99">learScreen(window)</text:span><text:span text:style-name="T144"> </text:span><text:span text:style-name="T145">~P</text:span><text:span text:style-name="T55">UNY</text:span></text:h>
      <text:h text:style-name="P73" text:outline-level="6"><text:span text:style-name="T99">z5+ only. Call with argument </text:span><text:span text:style-name="T146">WIN_MAIN</text:span><text:span text:style-name="T99">, </text:span><text:span text:style-name="T146">WIN_STATUS</text:span><text:span text:style-name="T99"> or </text:span><text:span text:style-name="T146">WIN_ALL </text:span><text:span text:style-name="T99">to </text:span><text:span text:style-name="T147">set colours (if </text:span><text:span text:style-name="T148">clr_on</text:span><text:span text:style-name="T147"> is </text:span><text:span text:style-name="T148">true</text:span><text:span text:style-name="T147">) and </text:span><text:span text:style-name="T99">clear main and/or </text:span><text:span text:style-name="T149">status</text:span><text:span text:style-name="T99"> window. </text:span></text:h>
      <text:h text:style-name="Heading_20_2" text:outline-level="2">CommonAncestor<text:span text:style-name="T150">(object1, object2)</text:span></text:h>
      <text:h text:style-name="P67" text:outline-level="6"><text:span text:style-name="T151">Return</text:span> the <text:span text:style-name="T151">neare</text:span>st object that contains both <text:span text:style-name="T14">object1</text:span> and <text:span text:style-name="T14">object2</text:span> <text:span text:style-name="T152">on some level</text:span>, or <text:span text:style-name="T14">false</text:span>.</text:h>
      <text:h text:style-name="P74" text:outline-level="2">DoorDir(object) <text:span text:style-name="T139">PUNY++</text:span></text:h>
      <text:h text:style-name="P75" text:outline-level="6">Returns the direction <text:span text:style-name="T153">in which</text:span> the door object lies.</text:h>
      <text:h text:style-name="P74" text:outline-level="2">Door<text:span text:style-name="T142">To</text:span>(object) <text:span text:style-name="T139">PUNY++</text:span></text:h>
      <text:h text:style-name="P75" text:outline-level="6">Returns the room which the door object <text:span text:style-name="T153">leads to</text:span><text:span text:style-name="T154">, or 1 if object.door_to is a routine and it returned 1, meaning it printed a message why the player can't enter</text:span>.</text:h>
      <text:h text:style-name="P76" text:outline-level="2">DrawStatusLine<text:span text:style-name="T152">(</text:span><text:span text:style-name="T155">newlines</text:span><text:span text:style-name="T152">)</text:span><text:span text:style-name="T155"> </text:span><text:span text:style-name="T145">~P</text:span><text:span text:style-name="T55">UNY</text:span></text:h>
      <text:h text:style-name="P77" text:outline-level="6"><text:span text:style-name="T155">z5+ only. </text:span>Print the statusline.<text:span text:style-name="T155"> If </text:span><text:span text:style-name="T156">newlines</text:span><text:span text:style-name="T155"> is true, it must instead print as many newlines as the statusline height</text:span></text:h>
      <text:h text:style-name="P78" text:outline-level="2"><text:span text:style-name="T157">FastSpaces</text:span>(<text:span text:style-name="T157">number</text:span>) <text:span text:style-name="T158">PUNY++</text:span></text:h>
      <text:h text:style-name="Heading_20_6" text:outline-level="6">Print <text:span text:style-name="T159">number</text:span><text:span text:style-name="T160"> spaces in an efficient manner.</text:span></text:h>
      <text:h text:style-name="P79" text:outline-level="2">ImplicitDisrobeIfWorn(object) <text:span text:style-name="T139">PUNY++</text:span></text:h>
      <text:h text:style-name="P80" text:outline-level="6">Take off object if worn. Return false for success.</text:h>
      <text:h text:style-name="P79" text:outline-level="2">Implicit<text:span text:style-name="T142">Grab</text:span>If<text:span text:style-name="T142">NotHeld</text:span>(object) <text:span text:style-name="T139">PUNY++</text:span></text:h>
      <text:h text:style-name="P80" text:outline-level="6">Take object if <text:span text:style-name="T153">not held</text:span>. Return false for success.</text:h>
      <text:h text:style-name="P81" text:outline-level="2">IndirectlyContains<text:span text:style-name="T152">(object1, object2)</text:span></text:h>
      <text:h text:style-name="P82" text:outline-level="6">Return <text:span text:style-name="T14">true</text:span> if <text:span text:style-name="T14">object</text:span><text:span text:style-name="T161">1</text:span> <text:span text:style-name="T162">holds</text:span> <text:span text:style-name="T14">object</text:span><text:span text:style-name="T163">2</text:span>, on some level.<text:span text:style-name="T164"> </text:span></text:h>
      <text:h text:style-name="P83" text:outline-level="2"><text:span text:style-name="T165">IsARoutine</text:span>(<text:span text:style-name="T165">value</text:span>) <text:span text:style-name="T158">PUNY++</text:span></text:h>
      <text:h text:style-name="P84" text:outline-level="6"><text:span text:style-name="T126">Return true if value can be a routine address</text:span><text:span text:style-name="T160">.</text:span></text:h>
      <text:h text:style-name="P83" text:outline-level="2"><text:span text:style-name="T165">IsAString</text:span>(<text:span text:style-name="T165">value</text:span>) <text:span text:style-name="T158">PUNY++</text:span></text:h>
      <text:h text:style-name="P84" text:outline-level="6"><text:span text:style-name="T126">Return true if value can be a string address</text:span><text:span text:style-name="T160">.</text:span></text:h>
      <text:h text:style-name="P85" text:outline-level="2"><text:span text:style-name="T166">LanguageNumber</text:span><text:span text:style-name="T152">(</text:span><text:span text:style-name="T166">number</text:span><text:span text:style-name="T152">)</text:span></text:h>
      <text:h text:style-name="P82" text:outline-level="6"><text:span text:style-name="T134">Print</text:span> <text:span text:style-name="T167">number</text:span><text:span text:style-name="T134"> using words</text:span>.<text:span text:style-name="T109"> Requires </text:span><text:span text:style-name="T167">OPTIONAL_LANGUAGE_NUMBER</text:span><text:span text:style-name="T109">.</text:span><text:span text:style-name="T164"> </text:span></text:h>
      <text:h text:style-name="P81" text:outline-level="2">LoopOverScope<text:span text:style-name="T152">(</text:span><text:span text:style-name="T168">routine</text:span><text:span text:style-name="T152">, actor)</text:span></text:h>
      <text:h text:style-name="P77" text:outline-level="6">Call <text:span text:style-name="T169">routine</text:span> once for e<text:span text:style-name="T170">ach</text:span> object in scope for <text:span text:style-name="T14">actor</text:span> (default<text:span text:style-name="T170">:</text:span> <text:span text:style-name="T14">player</text:span>), passing the object as a parameter.</text:h>
      <text:h text:style-name="P86" text:outline-level="2">MoveFloatingObjects()</text:h>
      <text:h text:style-name="P87" text:outline-level="6">Check which objects with <text:span text:style-name="T14">found_in</text:span> should be present.</text:h>
      <text:h text:style-name="Heading_20_2" text:outline-level="2"><text:soft-page-break/>NextWord<text:span text:style-name="T152">()</text:span></text:h>
      <text:h text:style-name="P77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71">()</text:span></text:h>
      <text:h text:style-name="P88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NumberWord<text:span text:style-name="T171">(numword)</text:span></text:h>
      <text:h text:style-name="P89" text:outline-level="6">If <text:span text:style-name="T14">numword</text:span> is a word<text:span text:style-name="T172">, e.g. </text:span><text:span text:style-name="T173">'</text:span><text:span text:style-name="T174">six</text:span><text:span text:style-name="T173">'</text:span><text:span text:style-name="T174">,</text:span> representing a number<text:span text:style-name="T175"> 1-20</text:span>, return the number. <text:span text:style-name="T175">If not,</text:span> return <text:span text:style-name="T14">false</text:span>.<text:span text:style-name="T176"> </text:span><text:span text:style-name="T177">Requires</text:span><text:span text:style-name="T176"> </text:span><text:span text:style-name="T178">OPTIONAL_ALLOW_WRITTEN_NUMBERS</text:span><text:span text:style-name="T176">.</text:span></text:h>
      <text:h text:style-name="Heading_20_2" text:outline-level="2">NumberWords<text:span text:style-name="T171">()</text:span></text:h>
      <text:h text:style-name="P88" text:outline-level="6">Return the number of words in player input.</text:h>
      <text:h text:style-name="P90" text:outline-level="2">ObjectCapacity<text:span text:style-name="T171">(object)</text:span><text:span text:style-name="T45"> </text:span><text:span text:style-name="T17">PUNY++</text:span></text:h>
      <text:h text:style-name="P88" text:outline-level="6">Return the object's value for the <text:span text:style-name="T14">capacity</text:span> property, <text:span text:style-name="T49">defaulting to</text:span> <text:span text:style-name="T14">DEFAULT_CAPACITY</text:span> <text:span text:style-name="T179">or 100 if not defined</text:span>.</text:h>
      <text:h text:style-name="Heading_20_2" text:outline-level="2">ObjectIsUntouchable<text:span text:style-name="T180">(object, flag)</text:span></text:h>
      <text:h text:style-name="P91" text:outline-level="6"><text:span text:style-name="T171">Return </text:span><text:span text:style-name="T181">true</text:span><text:span text:style-name="T171"> if </text:span><text:span text:style-name="T182">player</text:span> can't <text:span text:style-name="T183">touch</text:span> <text:span text:style-name="T182">o</text:span><text:span text:style-name="T181">bject</text:span><text:span text:style-name="T184">. If</text:span><text:span text:style-name="T185"> so, </text:span><text:span text:style-name="T180">and </text:span><text:span text:style-name="T186">flag</text:span><text:span text:style-name="T180"> is </text:span><text:span text:style-name="T186">false</text:span><text:span text:style-name="T180"> or unspecified, also print a message.</text:span></text:h>
      <text:h text:style-name="P92" text:outline-level="2"><text:span text:style-name="T187">OzmooColoursAvailable</text:span>() <text:span text:style-name="T139">PUNY++</text:span></text:h>
      <text:h text:style-name="P93" text:outline-level="6"><text:span text:style-name="T188">Returns true if the game is being played on Z-code interpreter Ozmoo, with the 8 extra colours available</text:span><text:span text:style-name="T141">.</text:span></text:h>
      <text:h text:style-name="P94" text:outline-level="2">ParseToken(type, data)</text:h>
      <text:h text:style-name="P95" text:outline-level="6">Use <text:span text:style-name="T189">in general parsing routines</text:span>. See DM4 index for examples.</text:h>
      <text:h text:style-name="Heading_20_2" text:outline-level="2">PlaceInScope<text:span text:style-name="T190">(object)</text:span></text:h>
      <text:h text:style-name="P96" text:outline-level="6">Use in user-supplied scope routines to put <text:span text:style-name="T191">object</text:span> in scope. <text:span text:style-name="T192">Ignores</text:span><text:span text:style-name="T190"> </text:span><text:span text:style-name="T193">add_to_scope</text:span><text:span text:style-name="T190"> property</text:span><text:span text:style-name="T194"> </text:span><text:span text:style-name="T192">and</text:span><text:span text:style-name="T194"> children</text:span><text:span text:style-name="T190">.</text:span></text:h>
      <text:h text:style-name="Heading_20_2" text:outline-level="2">PlayerTo<text:span text:style-name="T190">(object, flag)</text:span></text:h>
      <text:h text:style-name="P97" text:outline-level="6">Move player to <text:span text:style-name="T14">object</text:span><text:span text:style-name="T195">, which must be a room or an enterable object. If </text:span><text:span text:style-name="T14">flag</text:span><text:span text:style-name="T195"> is </text:span><text:span text:style-name="T163">0</text:span><text:span text:style-name="T195"> or omitted, print a </text:span><text:span text:style-name="T196">long</text:span><text:span text:style-name="T195"> room description. If </text:span><text:span text:style-name="T14">flag</text:span><text:span text:style-name="T195"> is </text:span><text:span text:style-name="T14">1</text:span><text:span text:style-name="T195">, </text:span><text:span text:style-name="T197">keep quiet</text:span><text:span text:style-name="T195">. If </text:span><text:span text:style-name="T14">flag</text:span><text:span text:style-name="T195"> is </text:span><text:span text:style-name="T14">2</text:span><text:span text:style-name="T195">, print a room description </text:span><text:span text:style-name="T49">based on</text:span><text:span text:style-name="T195"> the </text:span><text:span text:style-name="T14">lookmode</text:span><text:span text:style-name="T195"> value.</text:span></text:h>
      <text:h text:style-name="P90" text:outline-level="2">PrintContents<text:span text:style-name="T190">(</text:span><text:span text:style-name="T198">text, object, </text:span><text:span text:style-name="T199">style</text:span><text:span text:style-name="T198">)</text:span><text:span text:style-name="T45"> </text:span><text:span text:style-name="T17">PUNY++</text:span></text:h>
      <text:h text:style-name="P98" text:outline-level="6"><text:span text:style-name="T200">Recursively l</text:span><text:span text:style-name="T190">ist contents of </text:span><text:span text:style-name="T193">object</text:span><text:span text:style-name="T190">.</text:span><text:span text:style-name="T198"> Hide items that have </text:span><text:span text:style-name="T201">concealed</text:span><text:span text:style-name="T198"> or </text:span><text:span text:style-name="T201">scenery</text:span><text:span text:style-name="T198">, unless </text:span><text:span text:style-name="T201">action</text:span><text:span text:style-name="T198"> is </text:span><text:span text:style-name="T201">##Inv</text:span><text:span text:style-name="T198">.</text:span><text:span text:style-name="T109"> </text:span><text:span text:style-name="T197">P</text:span><text:span text:style-name="T198">rint </text:span><text:span text:style-name="T185">or run </text:span><text:span text:style-name="T201">text</text:span><text:span text:style-name="T198"> </text:span><text:span text:style-name="T202">(unless 0) </text:span><text:span text:style-name="T198">before first </text:span><text:span text:style-name="T197">item</text:span><text:span text:style-name="T198">. If </text:span><text:span text:style-name="T203">style</text:span><text:span text:style-name="T204"> has</text:span><text:span text:style-name="T198"> </text:span><text:span text:style-name="T205">WORKFLAG_BIT </text:span>set, <text:span text:style-name="T198">only print objects which have the </text:span><text:span text:style-name="T201">workflag</text:span><text:span text:style-name="T198"> attribute. If </text:span><text:span text:style-name="T134">it</text:span><text:span text:style-name="T204"> has</text:span><text:span text:style-name="T198"> </text:span><text:span text:style-name="T205">ISARE_BIT</text:span><text:span text:style-name="T204"> s</text:span><text:span text:style-name="T198">et,</text:span><text:span text:style-name="T204"> print "is" or "are" before list.</text:span><text:span text:style-name="T206"> If it has </text:span><text:span text:style-name="T207">NEWLINE_BIT</text:span><text:span text:style-name="T206"> set, print each object on a new line.</text:span><text:span text:style-name="T204"> </text:span><text:span text:style-name="T198">Return </text:span><text:span text:style-name="T201">true</text:span><text:span text:style-name="T198"> if any objects were listed.</text:span><text:span text:style-name="T208"> Call with </text:span><text:span text:style-name="T209">text==1</text:span><text:span text:style-name="T208"> to not print anything but return </text:span><text:span text:style-name="T209">0</text:span><text:span text:style-name="T208"> </text:span><text:span text:style-name="T210">if </text:span><text:span text:style-name="T211">object</text:span><text:span text:style-name="T210"> contains no</text:span><text:span text:style-name="T208"> </text:span><text:span text:style-name="T210">printable objects</text:span><text:span text:style-name="T208">, </text:span><text:span text:style-name="T209">1</text:span><text:span text:style-name="T208"> </text:span><text:span text:style-name="T212">if contents </text:span><text:span text:style-name="T213">can</text:span><text:span text:style-name="T212"> be prefixed with "is", </text:span><text:span text:style-name="T214">2</text:span><text:span text:style-name="T212"> for "are"</text:span><text:span text:style-name="T215">.</text:span><text:span text:style-name="T208"> </text:span></text:h>
      <text:h text:style-name="P99" text:outline-level="2">PrintContents<text:span text:style-name="T216">FromR</text:span><text:span text:style-name="T190">(</text:span><text:span text:style-name="T198">text, objec</text:span><text:span text:style-name="T216">t</text:span><text:span text:style-name="T198">)</text:span><text:span text:style-name="T45"> </text:span><text:span text:style-name="T17">PUNY++</text:span></text:h>
      <text:h text:style-name="P100" text:outline-level="6"><text:span text:style-name="T217">Like PrintContents, but </text:span><text:span text:style-name="T200">l</text:span><text:span text:style-name="T190">ist </text:span><text:span text:style-name="T193">object</text:span><text:span text:style-name="T218"> </text:span><text:span text:style-name="T219">and its siblings </text:span><text:span text:style-name="T220">+ contents</text:span><text:span text:style-name="T216">, retaining </text:span><text:span text:style-name="T217">curr</text:span><text:span text:style-name="T216">ent style and indentation</text:span><text:span text:style-name="T217">.</text:span><text:span text:style-name="T198"> </text:span></text:h>
      <text:h text:style-name="Heading_20_2" text:outline-level="2">PrintMsg(<text:span text:style-name="T221">msg</text:span>, arg1, arg2) <text:span text:style-name="T158">PUNY++</text:span></text:h>
      <text:h text:style-name="P101" text:outline-level="6">Print<text:span text:style-name="T185"> </text:span>library message<text:span text:style-name="T185"> </text:span><text:span text:style-name="T182">msg</text:span><text:span text:style-name="T185"> </text:span>. Some <text:span text:style-name="T222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8">(object, property</text:span><text:span text:style-name="T223">, flag</text:span><text:span text:style-name="T198">)</text:span></text:h>
      <text:h text:style-name="P101" text:outline-level="6">If <text:span text:style-name="T14">object.property</text:span> <text:span text:style-name="T224">holds a</text:span><text:span text:style-name="T223"> routine or list of routines, run them using </text:span><text:span text:style-name="T225">RunRoutines</text:span><text:span text:style-name="T226">(object, property)</text:span><text:span text:style-name="T223">. If it holds </text:span>a string, print <text:span text:style-name="T224">it</text:span><text:span text:style-name="T223"> and then a newline. If </text:span><text:span text:style-name="T225">flag</text:span><text:span text:style-name="T223"> is </text:span><text:span text:style-name="T225">true</text:span><text:span text:style-name="T223">, skip the newline.</text:span></text:h>
      <text:h text:style-name="Heading_20_2" text:outline-level="2">PronounNotice<text:span text:style-name="T223">(objec</text:span><text:span text:style-name="T227">t</text:span><text:span text:style-name="T223">)</text:span></text:h>
      <text:h text:style-name="P102" text:outline-level="6">Make <text:span text:style-name="T192">a</text:span><text:span text:style-name="T228"> pronoun (</text:span><text:span text:style-name="T229">'it'</text:span><text:span text:style-name="T228">, </text:span><text:span text:style-name="T229">'her'</text:span><text:span text:style-name="T228"> </text:span><text:span text:style-name="T230">etc</text:span><text:span text:style-name="T228">) refer to </text:span><text:span text:style-name="T229">object</text:span><text:span text:style-name="T228">.</text:span></text:h>
      <text:h text:style-name="Heading_20_2" text:outline-level="2">RunRoutines<text:span text:style-name="T223">(object, property, switch)</text:span></text:h>
      <text:h text:style-name="P103" text:outline-level="6">I<text:span text:style-name="T198">f </text:span><text:span text:style-name="T201">object.property</text:span><text:span text:style-name="T198"> </text:span>holds a routine or list of routines, run <text:span text:style-name="T231">each routine </text:span>until one of them return<text:span text:style-name="T231">s</text:span> <text:span text:style-name="T232">a non-zero value</text:span>. Return the return value of the last routine <text:span text:style-name="T232">run</text:span>.<text:line-break/><text:span text:style-name="T231">If </text:span><text:span text:style-name="T226">switch</text:span><text:span text:style-name="T231"> has a non-zero value, the routines can have switch-clauses to match this value</text:span><text:span text:style-name="T233">, otherwise </text:span><text:span text:style-name="T231">they can have switch-clauses </text:span><text:span text:style-name="T233">to </text:span><text:span text:style-name="T231">match </text:span><text:span text:style-name="T226">action</text:span><text:span text:style-name="T231">.</text:span></text:h>
      <text:h text:style-name="Heading_20_2" text:outline-level="2">ScopeWithin<text:span text:style-name="T231">(object)</text:span></text:h>
      <text:h text:style-name="P104" text:outline-level="6">Use in user-supplied scope routines<text:span text:style-name="T234">. Put all </text:span><text:span text:style-name="T192">item</text:span><text:span text:style-name="T234">s which are in </text:span><text:span text:style-name="T235">object</text:span><text:span text:style-name="T234"> into scope, also recursively searching supporters, transparent objects and open containers, and check the </text:span><text:span text:style-name="T235">add_to_scope</text:span><text:span text:style-name="T234"> property of all objects added</text:span><text:span text:style-name="T190">.</text:span></text:h>
      <text:h text:style-name="Heading_20_2" text:outline-level="2">SetTime(<text:span text:style-name="T24">number</text:span>, step)</text:h>
      <text:h text:style-name="P105" text:outline-level="6">Sets the time to <text:span text:style-name="T14">number</text:span> minutes after midnight. If <text:span text:style-name="T14">step</text:span> is a positive number, one turn takes <text:span text:style-name="T236">step</text:span> minutes. Otherwise, there are <text:span text:style-name="T14">-step</text:span> turns to a minute.</text:h>
      <text:h text:style-name="Heading_20_2" text:outline-level="2">TestScope<text:span text:style-name="T237">(</text:span><text:span text:style-name="T176">object, actor)</text:span></text:h>
      <text:h text:style-name="P106" text:outline-level="6"><text:span text:style-name="T176">Return </text:span><text:span text:style-name="T178">true</text:span><text:span text:style-name="T176"> if </text:span><text:span text:style-name="T178">object</text:span><text:span text:style-name="T176"> is in scope for </text:span><text:span text:style-name="T178">actor</text:span><text:span text:style-name="T176"> (defaults to </text:span><text:span text:style-name="T178">player</text:span><text:span text:style-name="T176">).</text:span></text:h>
      <text:h text:style-name="Heading_20_2" text:outline-level="2">TryNumber<text:span text:style-name="T176">(wordnum)</text:span></text:h>
      <text:h text:style-name="P107" text:outline-level="6"><text:span text:style-name="T49">Try to parse</text:span> word <text:span text:style-name="T14">wordnum</text:span> in player input as a number<text:span text:style-name="T49">. </text:span><text:span text:style-name="T238">R</text:span><text:span text:style-name="T49">eturn the number (0-10000</text:span><text:span text:style-name="T238">)</text:span><text:span text:style-name="T49">, </text:span><text:span text:style-name="T238">or -1000 for invalid number</text:span><text:span text:style-name="T49">. If </text:span><text:span text:style-name="T236">OPTIONAL_ALLOW_WRITTEN_NUMBERS</text:span><text:span text:style-name="T49"> is defined, also </text:span><text:span text:style-name="T239">parse</text:span><text:span text:style-name="T49"> number word</text:span><text:span text:style-name="T239">s</text:span><text:span text:style-name="T49"> (</text:span><text:span text:style-name="T236">'one'</text:span><text:span text:style-name="T49"> .. </text:span><text:span text:style-name="T236">'twenty'</text:span><text:span text:style-name="T49">).</text:span></text:h>
      <text:h text:style-name="Heading_20_2" text:outline-level="2">WordAddress<text:span text:style-name="T176">(wordnum)</text:span></text:h>
      <text:h text:style-name="P107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6">(wordnum)</text:span></text:h>
      <text:h text:style-name="P107" text:outline-level="6">Return the <text:span text:style-name="T240">length of</text:span> word <text:span text:style-name="T14">wordnum</text:span> in player input.</text:h>
      <text:h text:style-name="Heading_20_2" text:outline-level="2">WordValue<text:span text:style-name="T176">(wordnum)</text:span></text:h>
      <text:h text:style-name="P107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3">()</text:span></text:h>
      <text:h text:style-name="P108" text:outline-level="6"><text:span text:style-name="T241">Wait for the player to type something. Return </text:span><text:span text:style-name="T242">true</text:span><text:span text:style-name="T241"> if they type</text:span><text:span text:style-name="T243">d</text:span><text:span text:style-name="T244"> yes</text:span><text:span text:style-name="T245">, </text:span><text:span text:style-name="T242">false</text:span><text:span text:style-name="T241"> if they type</text:span><text:span text:style-name="T243">d</text:span><text:span text:style-name="T244"> no</text:span><text:span text:style-name="T245">, or ask again.</text:span></text:h>
      <text:p text:style-name="P37"/>
      <text:h text:style-name="P109" text:outline-level="1">Print<text:span text:style-name="T246">ing</text:span> rules</text:h>
      <text:p text:style-name="P110">A printing rule is used to print something based on one argument, typically an object. <text:span text:style-name="T247">Example</text:span><text:span text:style-name="T248"> of </text:span><text:span text:style-name="T249">use</text:span>: <text:line-break/><text:span text:style-name="T14">print "The </text:span><text:span text:style-name="T250">pump</text:span><text:span text:style-name="T14"> is ", (OnOff) Pump, ".^";</text:span></text:p>
      <text:h text:style-name="P111" text:outline-level="2">CObjIs<text:span text:style-name="T45"> </text:span><text:span text:style-name="T17">PUNY++</text:span></text:h>
      <text:h text:style-name="P112" text:outline-level="6">Prints <text:span text:style-name="T251">"</text:span><text:span text:style-name="T252">T</text:span>he <text:span text:style-name="T251">(</text:span>object<text:span text:style-name="T251">) "</text:span>, and "is" or "are"<text:span text:style-name="T253"> (see </text:span><text:span text:style-name="T254">IsOrAre</text:span><text:span text:style-name="T253">).</text:span></text:h>
      <text:h text:style-name="P113" text:outline-level="2">CTheyreor<text:span text:style-name="T255">I</text:span>ts<text:span text:style-name="T256"> </text:span><text:span text:style-name="T17">PUNY++</text:span></text:h>
      <text:h text:style-name="P114" text:outline-level="6">Prints "<text:span text:style-name="T257">It</text:span>'s" or "They're" or "He's" <text:span text:style-name="T252">etc</text:span><text:span text:style-name="T258">.</text:span></text:h>
      <text:h text:style-name="P115" text:outline-level="2">CTheyreorThats</text:h>
      <text:h text:style-name="P114" text:outline-level="6">Prints "That's" or "They're" or "He's" <text:span text:style-name="T252">etc</text:span><text:span text:style-name="T258">.</text:span></text:h>
      <text:h text:style-name="P115" text:outline-level="2">IsOrAre</text:h>
      <text:h text:style-name="P116" text:outline-level="6">Prints "is" or "are", based on <text:span text:style-name="T14">pluralname</text:span><text:span text:style-name="T258"> and if the object is the player object</text:span>.</text:h>
      <text:h text:style-name="P117" text:outline-level="2">ItorThem</text:h>
      <text:h text:style-name="P116" text:outline-level="6"><text:span text:style-name="T258">Prints "it", "them", "her"</text:span><text:span text:style-name="T259"> etc</text:span><text:span text:style-name="T260">.</text:span></text:h>
      <text:h text:style-name="P118" text:outline-level="2">ObjIs<text:span text:style-name="T45"> </text:span><text:span text:style-name="T17">PUNY++</text:span></text:h>
      <text:h text:style-name="P119" text:outline-level="6">Prints <text:span text:style-name="T251">"</text:span><text:span text:style-name="T261">t</text:span>he <text:span text:style-name="T251">(</text:span>object<text:span text:style-name="T251">) "</text:span>, and "is" or "are"<text:span text:style-name="T253"> (see </text:span><text:span text:style-name="T254">IsOrAre</text:span><text:span text:style-name="T253">).</text:span></text:h>
      <text:h text:style-name="P90" text:outline-level="2">OnOff<text:span text:style-name="T45"> </text:span><text:span text:style-name="T17">PUNY++</text:span></text:h>
      <text:h text:style-name="P112" text:outline-level="6">Prints "on" or "off", based on <text:span text:style-name="T14">on</text:span>.</text:h>
      <text:h text:style-name="P120" text:outline-level="2">SingularS <text:span text:style-name="T17">PUNY++</text:span></text:h>
      <text:h text:style-name="P121" text:outline-level="6">Prints "s" if the object doesn't have <text:span text:style-name="T262">pluralname</text:span><text:span text:style-name="T195">.</text:span></text:h>
      <text:h text:style-name="P122" text:outline-level="2">That<text:span text:style-name="T263">o</text:span>rThose</text:h>
      <text:h text:style-name="P123" text:outline-level="6"><text:span text:style-name="T258">Prints "that" or "those" based on </text:span><text:span text:style-name="T262">pluralname</text:span><text:span text:style-name="T258">.</text:span></text:h>
      <text:h text:style-name="P124" text:outline-level="1"/>
      <text:h text:style-name="P125" text:outline-level="1"><text:span text:style-name="T264">E</text:span>ntry point routines</text:h>
      <text:p text:style-name="P126">The<text:span text:style-name="T265">se routines, if defined by the game author, are run under the circumstances stated for each routine.</text:span></text:p>
      <text:h text:style-name="P127" text:outline-level="2">AfterLife<text:span text:style-name="T266">()</text:span></text:h>
      <text:h text:style-name="P128" text:outline-level="6"><text:span text:style-name="T49">When</text:span> player has died. Can <text:span text:style-name="T260">be used to </text:span>revive player.</text:h>
      <text:h text:style-name="P127" text:outline-level="2">AfterPrompt<text:span text:style-name="T266">()</text:span></text:h>
      <text:h text:style-name="P128" text:outline-level="6"><text:span text:style-name="T49">A</text:span>fter the input prompt has been printed.</text:h>
      <text:h text:style-name="P127" text:outline-level="2">Amusing<text:span text:style-name="T266">()</text:span></text:h>
      <text:h text:style-name="P128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5">.</text:span></text:h>
      <text:h text:style-name="P127" text:outline-level="2">BeforeParsing<text:span text:style-name="T266">()</text:span></text:h>
      <text:h text:style-name="P129" text:outline-level="6">After player input, before parsing starts.</text:h>
      <text:h text:style-name="Heading_20_2" text:outline-level="2">ChooseObjects(<text:span text:style-name="T267">obj, code</text:span>)</text:h>
      <text:h text:style-name="P130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8">ex</text:span>clude (<text:span text:style-name="T268">0</text:span>) or include (<text:span text:style-name="T268">1</text:span>) the object. Return 0 to don't interfere, 1 to force inclusion, 2 to force exclusion.</text:h>
      <text:h text:style-name="P131" text:outline-level="2">ChooseObjects<text:span text:style-name="T269">Final</text:span>(<text:span text:style-name="T270">array</text:span><text:span text:style-name="T267">, </text:span><text:span text:style-name="T270">length</text:span>)<text:span text:style-name="T269"> </text:span><text:span text:style-name="T17">PUNY++</text:span></text:h>
      <text:h text:style-name="Heading_20_6" text:outline-level="6"><text:span text:style-name="T271">Called just before having to ask the player which object they mean. </text:span><text:span text:style-name="T272">array</text:span><text:span text:style-name="T271"> holds the address of a word array holding object numbers, </text:span><text:span text:style-name="T272">length</text:span><text:span text:style-name="T271"> holds the number of objects. Use </text:span><text:span text:style-name="T272">ChooseObjectsFinal_Pick</text:span><text:span text:style-name="T273"> </text:span><text:span text:style-name="T271">and/or </text:span><text:span text:style-name="T272">ChooseObjectsFinal_Discard </text:span><text:span text:style-name="T271">to either pick an object or discard options. You may rearrange </text:span><text:span text:style-name="T274">the array.</text:span></text:h>
      <text:h text:style-name="P131" text:outline-level="2">DarkToDark<text:span text:style-name="T266">()</text:span></text:h>
      <text:h text:style-name="P128" text:outline-level="6">When player moves from one dark location to another.</text:h>
      <text:h text:style-name="P127" text:outline-level="2">DeathMessage<text:span text:style-name="T266">()</text:span></text:h>
      <text:h text:style-name="P128" text:outline-level="6">When game ends and <text:span text:style-name="T14">deadflag</text:span> is set to 3 or higher. Should print a <text:span text:style-name="T49">few words</text:span> to say why the game ended.</text:h>
      <text:h text:style-name="P90" text:outline-level="2">DebugParseNameObject<text:span text:style-name="T275">(object)</text:span><text:span text:style-name="T45"> </text:span><text:span text:style-name="T17">PUNY++</text:span></text:h>
      <text:h text:style-name="P128" text:outline-level="6">When the parser checks for match<text:span text:style-name="T275">ing objects</text:span> for a debug verb <text:span text:style-name="T275">like </text:span><text:span text:style-name="T276">'purloin'</text:span>. Return true if <text:span text:style-name="T277">object</text:span> has a <text:span text:style-name="T14">parse_name</text:span> routine.</text:h>
      <text:h text:style-name="P90" text:outline-level="2">DisallowTakeAnimate<text:span text:style-name="T266">()</text:span><text:span text:style-name="T45"> </text:span><text:span text:style-name="T17">PUNY++</text:span></text:h>
      <text:h text:style-name="P132" text:outline-level="6">When the player tries to <text:span text:style-name="T278">take</text:span> <text:span text:style-name="T279">noun</text:span><text:span text:style-name="T278">, which has </text:span><text:span text:style-name="T279">animate</text:span>. Return <text:span text:style-name="T14">false</text:span> <text:span text:style-name="T278">to allow this, or true to disallow it</text:span>.</text:h>
      <text:h text:style-name="P127" text:outline-level="2">GamePostRoutine<text:span text:style-name="T266">()</text:span></text:h>
      <text:h text:style-name="P132" text:outline-level="6">When <text:span text:style-name="T14">after</text:span> routines have been run.</text:h>
      <text:h text:style-name="P127" text:outline-level="2">GamePreRoutine<text:span text:style-name="T266">()</text:span></text:h>
      <text:h text:style-name="P132" text:outline-level="6">Before <text:span text:style-name="T14">before</text:span> routines have been run.</text:h>
      <text:h text:style-name="P133" text:outline-level="2">InScope<text:span text:style-name="T275">(actor)</text:span></text:h>
      <text:h text:style-name="P132" text:outline-level="6">When working out the scope for the actor. <text:span text:style-name="T280">Call </text:span><text:span text:style-name="T281">ScopeWithin</text:span><text:span text:style-name="T280"> and </text:span><text:span text:style-name="T281">PlaceInScope</text:span><text:span text:style-name="T280"> to add objects to scope. Return true if no other objects should be in scope.</text:span></text:h>
      <text:h text:style-name="P134" text:outline-level="2">Initialise<text:span text:style-name="T282"> </text:span><text:span text:style-name="T102">~P</text:span><text:span text:style-name="T17">UNY</text:span></text:h>
      <text:h text:style-name="P135" text:outline-level="6"><text:span text:style-name="T283">Mandatory</text:span><text:span text:style-name="T24">: A </text:span><text:span text:style-name="T284">(possibly empty) </text:span><text:span text:style-name="T24">routine which is called when the game starts. </text:span><text:span text:style-name="T252">May</text:span><text:span text:style-name="T24"> print an introduction. May return 2 to skip the game banner. </text:span><text:span text:style-name="T252">M</text:span><text:span text:style-name="T24">ust set </text:span><text:span text:style-name="T285">location</text:span><text:span text:style-name="T24">, unless </text:span><text:span text:style-name="T285">INITIAL_LOCATION_VALUE</text:span><text:span text:style-name="T24"> </text:span><text:span text:style-name="T252">is</text:span><text:span text:style-name="T24"> defined</text:span><text:span text:style-name="T286">.</text:span></text:h>
      <text:h text:style-name="P136" text:outline-level="2">IsARoom(obj, verdict) <text:span text:style-name="T287">PUNY++</text:span></text:h>
      <text:h text:style-name="P137" text:outline-level="6"><text:span text:style-name="T288">Player has typed </text:span><text:span text:style-name="T289">PLACES,</text:span><text:span text:style-name="T288"> GOTO or ROOMS. </text:span><text:span text:style-name="T14">Verdict </text:span>= <text:span text:style-name="T288">1 or 0</text:span> says if library thinks <text:span text:style-name="T14">obj</text:span> is a room <text:span text:style-name="T288">or not</text:span>. Return 0 to accept, 1 to say it’s a room, 2 to say it’s not.</text:h>
      <text:h text:style-name="P138" text:outline-level="2">LibraryMessages<text:span text:style-name="T133">(number, arg1, arg2)</text:span><text:span text:style-name="T45"> </text:span><text:span text:style-name="T17">PUNY++</text:span></text:h>
      <text:h text:style-name="P139" text:outline-level="6">When a library message is about to be printed. <text:span text:style-name="T290">Use it to print your own complex library messages.</text:span></text:h>
      <text:h text:style-name="P133" text:outline-level="2">LookRoutine</text:h>
      <text:h text:style-name="P140" text:outline-level="6">After the room and everything in it has been described.</text:h>
      <text:h text:style-name="P133" text:outline-level="2">NewRoom</text:h>
      <text:h text:style-name="P140" text:outline-level="6">When the player has entered a new room, before the room is described.</text:h>
      <text:h text:style-name="P141" text:outline-level="2">ParseNoun(object)<text:span text:style-name="T291"> </text:span><text:span text:style-name="T145">~P</text:span><text:span text:style-name="T55">UNY</text:span></text:h>
      <text:h text:style-name="P142" text:outline-level="6"><text:span text:style-name="T292">When checking if input matches </text:span><text:span text:style-name="T293">object</text:span><text:span text:style-name="T24">, before</text:span> <text:span text:style-name="T294">parse_name</text:span><text:span text:style-name="T295"> </text:span><text:span text:style-name="T296">and </text:span><text:span text:style-name="T297">name</text:span><text:span text:style-name="T296"> </text:span><text:span text:style-name="T295">propert</text:span><text:span text:style-name="T292">ies are checked</text:span><text:span text:style-name="T295">. </text:span><text:span text:style-name="T296">Can advance </text:span><text:span text:style-name="T297">wn</text:span><text:span text:style-name="T296"> and</text:span><text:span text:style-name="T298"> </text:span><text:span text:style-name="T299">return </text:span><text:span text:style-name="T300">-1</text:span><text:span text:style-name="T292"> to consume words</text:span><text:span text:style-name="T301"> (</text:span><text:span text:style-name="T302">parse_name</text:span><text:span text:style-name="T301"> + </text:span><text:span text:style-name="T302">name</text:span><text:span text:style-name="T301"> will also be checked)</text:span><text:span text:style-name="T292">, just return <text:line-break/></text:span><text:span text:style-name="T293">-1</text:span><text:span text:style-name="T292"> to not interfere, or return how many words matched.</text:span></text:h>
      <text:h text:style-name="P133" text:outline-level="2">ParseNumber<text:span text:style-name="T303">(buffer, length)</text:span></text:h>
      <text:h text:style-name="P140" text:outline-level="6">When the parser needs to check if <text:span text:style-name="T49">the input word that starts at </text:span><text:span text:style-name="T236">buffer</text:span><text:span text:style-name="T49"> and is </text:span><text:span text:style-name="T236">length</text:span><text:span text:style-name="T49"> bytes long, </text:span>is a number. Return the number, or <text:span text:style-name="T14">false</text:span> if no number was found.</text:h>
      <text:h text:style-name="P127" text:outline-level="2">PrintRank<text:span text:style-name="T266">()</text:span></text:h>
      <text:h text:style-name="P143" text:outline-level="6">When the scor<text:span text:style-name="T49">ing</text:span> message is printed. Prints the final part, typically giving the player a rank based on <text:span text:style-name="T14">score</text:span>.</text:h>
      <text:h text:style-name="P133" text:outline-level="2">PrintTaskName<text:span text:style-name="T304">(n)</text:span></text:h>
      <text:h text:style-name="P143" text:outline-level="6">When listing a completed task. Print name of task <text:span text:style-name="T14">n</text:span>.</text:h>
      <text:h text:style-name="P133" text:outline-level="2">PrintVerb<text:span text:style-name="T304">(verb)</text:span></text:h>
      <text:h text:style-name="P143" text:outline-level="6">When the parser needs to print a verb. Typically needed for long verbs. Return true if the routine printed the verb.</text:h>
      <text:h text:style-name="P127" text:outline-level="2">TimePasses<text:span text:style-name="T266">()</text:span></text:h>
      <text:h text:style-name="P143" text:outline-level="6">After a game turn has ended, in which <text:span text:style-name="T14">turns</text:span> increased.</text:h>
      <text:h text:style-name="P133" text:outline-level="2">UnknownVerb<text:span text:style-name="T304">(word)</text:span></text:h>
      <text:h text:style-name="P144" text:outline-level="6"><text:span text:style-name="T304">When the parser doesn’t recognize the verb. Return</text:span><text:span text:style-name="T305"> </text:span><text:span text:style-name="T304">a dictionary word to use as the verb instead</text:span><text:span text:style-name="T305">, or </text:span><text:span text:style-name="T306">false</text:span><text:span text:style-name="T304">.</text:span></text:h>
      <text:p text:style-name="P145"/>
      <text:h text:style-name="P146" text:outline-level="1">Library objects</text:h>
      <text:h text:style-name="P147" text:outline-level="2">Directions<text:span text:style-name="T45"> </text:span><text:span text:style-name="T17">PUNY</text:span><text:span text:style-name="T57">++</text:span></text:h>
      <text:h text:style-name="P148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9" text:outline-level="6"><text:span text:style-name="T24">The default player object. It’s better to use the </text:span><text:span text:style-name="T285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7">F</text:span><text:span text:style-name="T24">ake room</text:span><text:span text:style-name="T308">. </text:span><text:span text:style-name="T24"><text:s/></text:span><text:span text:style-name="T308">W</text:span><text:span text:style-name="T24">hen </text:span><text:span text:style-name="T285">real_location</text:span><text:span text:style-name="T309"> </text:span><text:span text:style-name="T24">is </text:span><text:span text:style-name="T308">dark, </text:span><text:span text:style-name="T309">location</text:span><text:span text:style-name="T308"> points </text:span><text:span text:style-name="T307">here</text:span><text:span text:style-name="T24">. The player is never moved to </text:span><text:span text:style-name="T285">thedark</text:span><text:span text:style-name="T24">.</text:span></text:h>
      <text:h text:style-name="P150" text:outline-level="2"/>
      <text:h text:style-name="P125" text:outline-level="1">Group 1 actions</text:h>
      <text:p text:style-name="P151"><text:span text:style-name="T310">Group 1 actions are metaverbs that control gameplay, and debug verbs. They don’t run </text:span><text:span text:style-name="T311">before</text:span><text:span text:style-name="T312"> </text:span><text:span text:style-name="T310">or </text:span><text:span text:style-name="T311">after</text:span><text:span text:style-name="T312"> </text:span><text:span text:style-name="T310">routines.</text:span></text:p>
      <text:p text:style-name="P152">Again, FullScore, LookModeLong, LookModeNormal, LookModeShort, NotifyO<text:span text:style-name="T313">ff</text:span>, NotifyO<text:span text:style-name="T313">n</text:span>, Oops, OopsCorrection, Restart, Restore, Save, Score, Version, Quit</text:p>
      <text:p text:style-name="P153"><text:span text:style-name="T314">OPTIONAL_EXTENDED_METAVERBS</text:span><text:span text:style-name="T315"> adds</text:span>: <text:span text:style-name="T14">CommandsOff, CommandsOn, CommandsRead, Objects, Places, Scrip</text:span><text:span text:style-name="T316">t</text:span><text:span text:style-name="T14">Off, ScriptOn, Verify</text:span></text:p>
      <text:p text:style-name="P154"><text:span text:style-name="T314">DEBUG</text:span><text:span text:style-name="T315"> adds</text:span>: <text:span text:style-name="T14">ActionsOff, ActionsOn, Debug, </text:span><text:span text:style-name="T317">Forest, </text:span><text:span text:style-name="T14">GoNear, </text:span><text:span text:style-name="T317">Goto, </text:span><text:span text:style-name="T14">Pronouns, Purloin, RandomSeed, </text:span><text:span text:style-name="T317">Rooms, </text:span><text:span text:style-name="T14">RoutinesOff, RoutinesOn, Scope, TimersOff, TimersOn, Tree</text:span></text:p>
      <text:p text:style-name="P155"/>
      <text:h text:style-name="P156" text:outline-level="1">Group 2 actions</text:h>
      <text:p text:style-name="P157">The<text:span text:style-name="T318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9">r</text:span>outines.</text:p>
      <text:p text:style-name="P153"><text:span text:style-name="T14">Close</text:span><text:tab/><text:tab/>"CLOSE (<text:span text:style-name="T320">noun</text:span>)"<text:line-break/><text:span text:style-name="T14">Disrobe</text:span><text:tab/>"<text:span text:style-name="T321">TAKE OFF (</text:span><text:span text:style-name="T320">noun</text:span><text:span text:style-name="T321">)"<text:line-break/></text:span><text:span text:style-name="T14">Drop</text:span><text:tab/><text:tab/>"<text:span text:style-name="T321">DROP (</text:span><text:span text:style-name="T320">noun</text:span><text:span text:style-name="T321">)"<text:line-break/></text:span><text:span text:style-name="T14">Eat</text:span><text:tab/><text:tab/>"<text:span text:style-name="T321">EAT (</text:span><text:span text:style-name="T320">noun</text:span><text:span text:style-name="T321">)"<text:line-break/></text:span><text:span text:style-name="T14">Enter</text:span><text:tab/><text:tab/>"<text:span text:style-name="T321">ENTER (noun)"<text:line-break/></text:span><text:span text:style-name="T14">Examine</text:span><text:tab/>"<text:span text:style-name="T321">EXAMINE (noun)"<text:line-break/></text:span><text:span text:style-name="T14">Exit</text:span><text:tab/><text:tab/>"<text:span text:style-name="T321">EXIT (noun)"<text:line-break/></text:span><text:span text:style-name="T14">GetOff</text:span><text:tab/><text:tab/>"<text:span text:style-name="T321">GET OFF (noun)"<text:line-break/></text:span><text:span text:style-name="T14">Go</text:span><text:tab/><text:tab/>"<text:span text:style-name="T321">GO (direction)"<text:line-break/></text:span><text:span text:style-name="T14">Insert</text:span><text:tab/><text:tab/>"<text:span text:style-name="T321">INSERT (noun) INTO (second)"<text:line-break/></text:span><text:span text:style-name="T14">Inv</text:span><text:tab/><text:tab/>"<text:span text:style-name="T321">INVENTORY"<text:line-break/></text:span><text:span text:style-name="T14">Lock</text:span><text:tab/><text:tab/>"<text:span text:style-name="T321">LOCK (noun) with (</text:span><text:span text:style-name="T320">second</text:span><text:span text:style-name="T321">)"<text:line-break/></text:span><text:span text:style-name="T14">Look</text:span><text:tab/><text:tab/>"<text:span text:style-name="T321">LOOK"<text:line-break/></text:span><text:span text:style-name="T14">Open</text:span><text:tab/><text:tab/>"<text:span text:style-name="T321">OPEN (noun)"<text:line-break/></text:span><text:span text:style-name="T14">PutOn</text:span><text:tab/><text:tab/>"<text:span text:style-name="T321">PUT (noun) ON (</text:span><text:span text:style-name="T320">second</text:span><text:span text:style-name="T321">)"<text:line-break/></text:span><text:span text:style-name="T14">Remove</text:span><text:tab/><text:tab/>"<text:span text:style-name="T321">REMOVE (noun) FROM (second)"<text:line-break/></text:span><text:span text:style-name="T14">Search</text:span><text:tab/><text:tab/>"<text:span text:style-name="T321">SEARCH (noun)"<text:line-break/></text:span><text:span text:style-name="T14">SwitchOff</text:span><text:tab/>"<text:span text:style-name="T321">SWITCH OFF (noun)"<text:line-break/></text:span><text:span text:style-name="T14">SwitchOn</text:span><text:tab/>"<text:span text:style-name="T321">SWITCH ON (noun)"<text:line-break/></text:span><text:span text:style-name="T14">Take</text:span><text:tab/><text:tab/>"<text:span text:style-name="T321">TAKE (noun)"<text:line-break/></text:span><text:span text:style-name="T14">Transfer</text:span><text:tab/>"<text:span text:style-name="T321">TRANSFER (noun) </text:span><text:span text:style-name="T320">TO</text:span><text:span text:style-name="T321"> (second)"<text:line-break/></text:span><text:span text:style-name="T14">Unlock</text:span><text:tab/><text:tab/>"<text:span text:style-name="T321">UNLOCK (noun) WITH (</text:span><text:span text:style-name="T320">second</text:span><text:span text:style-name="T321">)"<text:line-break/></text:span><text:span text:style-name="T14">Wait</text:span><text:tab/><text:tab/>"<text:span text:style-name="T321">WAIT"<text:line-break/></text:span><text:span text:style-name="T14">Wear</text:span><text:tab/><text:tab/>"<text:span text:style-name="T321">WEAR (noun)"</text:span></text:p>
      <text:p text:style-name="P158">OPTIONAL_EXTENDED_VERBSET adds<text:span text:style-name="T99">:</text:span></text:p>
      <text:p text:style-name="P159"><text:span text:style-name="T146">Empty</text:span><text:span text:style-name="T99"><text:tab/><text:tab/>"EMPTY (noun)"<text:line-break/></text:span><text:span text:style-name="T146">EmptyT</text:span><text:span text:style-name="T99"><text:tab/><text:tab/>"EMPTY (noun) INTO (second)"<text:line-break/></text:span><text:span text:style-name="T146">GoIn</text:span><text:span text:style-name="T99"><text:tab/><text:tab/>"INSIDE"</text:span></text:p>
      <text:p text:style-name="P155"/>
      <text:h text:style-name="P156" text:outline-level="1">Group 3 actions</text:h>
      <text:p text:style-name="P157">These actions normally <text:span text:style-name="T318">just</text:span> print a standard message. They run <text:span text:style-name="T14">before</text:span> <text:span text:style-name="T319">r</text:span>outines <text:span text:style-name="T322">but not</text:span> <text:span text:style-name="T14">after</text:span> <text:span text:style-name="T319">r</text:span>outines.</text:p>
      <text:p text:style-name="P153"><text:span text:style-name="T14">Answer</text:span><text:tab/><text:tab/>"<text:span text:style-name="T323">ANSWER (topic) TO (</text:span><text:span text:style-name="T324">second</text:span><text:span text:style-name="T323">)"</text:span><text:line-break/><text:span text:style-name="T14">Ask</text:span><text:tab/><text:tab/>"<text:span text:style-name="T325">ASK (noun) ABOUT (topic)"</text:span><text:line-break/><text:span text:style-name="T14">AskFor</text:span><text:tab/><text:tab/>"<text:span text:style-name="T325">ASK (noun) FOR (second)"</text:span><text:line-break/><text:span text:style-name="T14">AskTo</text:span><text:tab/><text:tab/>"<text:span text:style-name="T325">ASK (noun) TO (topic)"</text:span><text:line-break/><text:span text:style-name="T14">Attack</text:span><text:tab/><text:tab/>"<text:span text:style-name="T325">ATTACK (noun)"</text:span><text:line-break/><text:span text:style-name="T14">Climb</text:span><text:tab/><text:tab/>"<text:span text:style-name="T325">CLIMB (noun)"</text:span><text:line-break/><text:span text:style-name="T14">Consult</text:span><text:tab/>"<text:span text:style-name="T326">READ</text:span><text:span text:style-name="T325"> ABOUT (topic) </text:span><text:span text:style-name="T326">IN (noun)</text:span><text:span text:style-name="T325">"</text:span><text:line-break/><text:span text:style-name="T14">Cut</text:span><text:tab/><text:tab/>"<text:span text:style-name="T325">CUT (noun)"</text:span><text:line-break/><text:span text:style-name="T14">Dig</text:span><text:tab/><text:tab/>"<text:span text:style-name="T325">DIG (noun)"</text:span><text:line-break/><text:span text:style-name="T14">Drink</text:span><text:tab/><text:tab/>"<text:span text:style-name="T325">DRINK (noun)"</text:span><text:line-break/><text:span text:style-name="T14">Fill</text:span><text:tab/><text:tab/>"<text:span text:style-name="T325">FILL (noun)"</text:span><text:line-break/><text:span text:style-name="T14">Give</text:span><text:tab/><text:tab/>"<text:span text:style-name="T325">GIVE (noun) to <text:s/>(</text:span><text:span text:style-name="T324">second</text:span><text:span text:style-name="T325">)"</text:span><text:line-break/><text:span text:style-name="T14">Jump</text:span><text:tab/><text:tab/>"<text:span text:style-name="T325">JUMP"</text:span><text:line-break/><text:span text:style-name="T14">JumpOver</text:span><text:tab/>"<text:span text:style-name="T325">JUMP OVER (noun)"</text:span><text:line-break/><text:span text:style-name="T14">Listen</text:span><text:tab/><text:tab/>"<text:span text:style-name="T325">LISTEN </text:span><text:span text:style-name="T327">TO (noun)</text:span><text:span text:style-name="T325">"</text:span><text:line-break/><text:span text:style-name="T14">Pull</text:span><text:tab/><text:tab/>"<text:span text:style-name="T325">PULL (noun)"</text:span><text:line-break/><text:span text:style-name="T14">Push</text:span><text:tab/><text:tab/>"<text:span text:style-name="T325">PUSH (noun)"</text:span><text:line-break/><text:span text:style-name="T14">PushDir</text:span><text:tab/>"<text:span text:style-name="T325">PUSH (noun) (direction)"</text:span><text:line-break/><text:span text:style-name="T14">Rub</text:span><text:tab/><text:tab/>"<text:span text:style-name="T325">RUB (noun)"</text:span><text:line-break/><text:span text:style-name="T14">Shout</text:span><text:tab/><text:tab/>"<text:span text:style-name="T325">SHOUT (topic)"</text:span><text:line-break/><text:span text:style-name="T14">ShoutAt</text:span><text:tab/>"<text:span text:style-name="T325">SHOUT (topic) AT (second)"</text:span><text:line-break/><text:span text:style-name="T14">Show</text:span><text:tab/><text:tab/>"<text:span text:style-name="T325">SHOW (noun) (second)"</text:span><text:line-break/><text:span text:style-name="T14">Smell</text:span><text:tab/><text:tab/><text:span text:style-name="T325">"</text:span><text:span text:style-name="T327">SMELL (noun)"</text:span><text:line-break/><text:span text:style-name="T14">Tell</text:span><text:tab/><text:tab/>"<text:span text:style-name="T327">TELL</text:span><text:span text:style-name="T325"> (noun) </text:span><text:span text:style-name="T327">ABOUT</text:span><text:span text:style-name="T325"> (</text:span><text:span text:style-name="T328">topic</text:span><text:span text:style-name="T325">)"</text:span><text:line-break/><text:span text:style-name="T14">ThrowAt</text:span><text:tab/>"<text:span text:style-name="T327">THROW (noun) AT (second)"</text:span><text:line-break/><text:span text:style-name="T14">Tie</text:span><text:tab/><text:tab/>"<text:span text:style-name="T327">TIE (noun) TO (second)"</text:span><text:line-break/><text:span text:style-name="T14">Touch</text:span><text:tab/><text:tab/>"<text:span text:style-name="T327">TOUCH (noun)"</text:span><text:line-break/><text:span text:style-name="T14">Turn</text:span><text:tab/><text:tab/>"<text:span text:style-name="T327">TURN</text:span><text:span text:style-name="T325"> (noun)"</text:span></text:p>
      <text:p text:style-name="P158">OPTIONAL_EXTENDED_VERBSET adds<text:span text:style-name="T99">:</text:span></text:p>
      <text:p text:style-name="P153"><text:span text:style-name="T329">Blow</text:span><text:span text:style-name="T330"><text:tab/><text:tab/>"BLOW (noun)"<text:line-break/></text:span><text:span text:style-name="T329">Mild</text:span><text:span text:style-name="T330"><text:tab/><text:tab/>"DARN"<text:line-break/></text:span><text:span text:style-name="T329">Burn</text:span><text:span text:style-name="T330"><text:tab/><text:tab/>"BURN (noun)"<text:line-break/></text:span><text:span text:style-name="T329">Buy</text:span><text:span text:style-name="T330"><text:tab/><text:tab/>"BUY (noun)"<text:line-break/></text:span><text:span text:style-name="T331">Kiss</text:span><text:span text:style-name="T332"><text:tab/><text:tab/>"KISS (noun)"<text:line-break/></text:span><text:span text:style-name="T331">No</text:span><text:span text:style-name="T332"><text:tab/><text:tab/>"NO"<text:line-break/></text:span><text:span text:style-name="T333">Set</text:span><text:span text:style-name="T334"><text:tab/><text:tab/>"SET</text:span><text:span text:style-name="T335"> (noun)"<text:line-break/></text:span><text:span text:style-name="T333">SetTo</text:span><text:span text:style-name="T334"><text:tab/><text:tab/>"SET (noun) TO (special)"<text:line-break/></text:span><text:span text:style-name="T333">Strong</text:span><text:span text:style-name="T334"><text:tab/><text:tab/>"SHIT"<text:line-break/></text:span><text:span text:style-name="T333">Sing</text:span><text:span text:style-name="T334"><text:tab/><text:tab/>"SING"<text:line-break/></text:span><text:span text:style-name="T333">Sleep</text:span><text:span text:style-name="T334"><text:tab/><text:tab/>"SLEEP"<text:line-break/></text:span><text:span text:style-name="T333">Sorry</text:span><text:span text:style-name="T334"><text:tab/><text:tab/>"SORRY"<text:line-break/></text:span><text:span text:style-name="T333">Squeeze</text:span><text:span text:style-name="T334"><text:tab/>"SQUEEZE</text:span><text:span text:style-name="T335"> (noun)"<text:line-break/></text:span><text:span text:style-name="T333">Swim</text:span><text:span text:style-name="T334"><text:tab/><text:tab/>"SWIM"<text:line-break/></text:span><text:span text:style-name="T333">Swing</text:span><text:span text:style-name="T334"><text:tab/><text:tab/>"SWING (noun)"<text:line-break/></text:span><text:span text:style-name="T333">Taste</text:span><text:span text:style-name="T334"><text:tab/><text:tab/>"TASTE (noun)"<text:line-break/></text:span><text:span text:style-name="T333">Think</text:span><text:span text:style-name="T334"><text:tab/><text:tab/>"THINK"<text:line-break/></text:span><text:span text:style-name="T333">Transfer</text:span><text:span text:style-name="T334"><text:tab/>"TRANSFER (noun) TO</text:span><text:span text:style-name="T335"> (</text:span><text:span text:style-name="T334">second</text:span><text:span text:style-name="T335">)"<text:line-break/></text:span><text:span text:style-name="T333">Wake</text:span><text:span text:style-name="T334"><text:tab/><text:tab/>"WAKE UP"<text:line-break/></text:span><text:span text:style-name="T333">WakeOther</text:span><text:span text:style-name="T334"><text:tab/>"WAKE UP</text:span><text:span text:style-name="T335"> (noun)"<text:line-break/></text:span><text:span text:style-name="T333">Wave</text:span><text:span text:style-name="T334"><text:tab/><text:tab/>"WAVE"<text:line-break/></text:span><text:span text:style-name="T333">Yes</text:span><text:span text:style-name="T334"><text:tab/><text:tab/>"YES"</text:span><text:span text:style-name="T330"><text:line-break/></text:span></text:p>
      <text:h text:style-name="P160" text:outline-level="1">Fake actions</text:h>
      <text:p text:style-name="P161">These actions are not referred to anywhere in the grammar, and they don’t have action routines, e.g. the<text:span text:style-name="T336"> fake action </text:span><text:span text:style-name="T337">Going</text:span><text:span text:style-name="T336"> </text:span><text:span text:style-name="T338">ha</text:span>s no <text:span text:style-name="T336">action routine </text:span><text:span text:style-name="T14">GoingSub</text:span>.</text:p>
      <text:p text:style-name="P162"><text:span text:style-name="T14">Going</text:span><text:tab/><text:tab/><text:span text:style-name="T339">Sent to the </text:span><text:span text:style-name="T340">before</text:span><text:span text:style-name="T339"> routine for the room<text:line-break/><text:tab/><text:tab/>that the player is about to enter.</text:span></text:p>
      <text:p text:style-name="P162"><text:span text:style-name="T14">LetGo</text:span><text:tab/><text:tab/><text:span text:style-name="T339">Sent to the container/supporter from<text:line-break/><text:tab/><text:tab/>which the player takes something.</text:span></text:p>
      <text:p text:style-name="P162"><text:span text:style-name="T14">NotUnderstood</text:span><text:tab/><text:span text:style-name="T339">Sent to creature</text:span><text:span text:style-name="T341">'s </text:span><text:span text:style-name="T342">orders</text:span><text:span text:style-name="T339"> when player </text:span><text:span text:style-name="T341"><text:s/><text:tab/><text:tab/></text:span><text:span text:style-name="T339">issued</text:span><text:span text:style-name="T341"> </text:span><text:span text:style-name="T339">an incomprehensible </text:span><text:span text:style-name="T343">order</text:span><text:span text:style-name="T339"> to it.</text:span></text:p>
      <text:p text:style-name="P162"><text:soft-page-break/><text:span text:style-name="T14">Order</text:span><text:tab/><text:tab/><text:span text:style-name="T339">Sent to </text:span><text:span text:style-name="T344">creature's </text:span><text:span text:style-name="T345">life</text:span><text:span text:style-name="T344"> when player<text:line-break/><text:tab/><text:tab/>issued </text:span><text:span text:style-name="T346">an</text:span><text:span text:style-name="T305"> order</text:span><text:span text:style-name="T344"> to it, and </text:span><text:span text:style-name="T345">orders</text:span><text:span text:style-name="T344"> didn't<text:line-break/><text:tab/><text:tab/>handle it</text:span><text:span text:style-name="T305">.</text:span></text:p>
      <text:p text:style-name="P162"><text:span text:style-name="T14">PluralFound</text:span><text:tab/><text:span text:style-name="T347">A </text:span><text:span text:style-name="T340">parse_name</text:span><text:span text:style-name="T339"> routine </text:span><text:span text:style-name="T46">can set<text:line-break/><text:tab/><text:tab/></text:span><text:span text:style-name="T47">parser_action </text:span><text:span text:style-name="T348">to this value when a<text:line-break/><text:tab/><text:tab/>match is found and it’s in plural.</text:span></text:p>
      <text:p text:style-name="P162"><text:span text:style-name="T14">Receive</text:span><text:tab/><text:span text:style-name="T339">Sent to the </text:span><text:span text:style-name="T349">object the player tries to place<text:line-break/><text:tab/><text:tab/>something in/on. </text:span><text:span text:style-name="T350">receive_action<text:line-break/><text:tab/><text:tab/></text:span><text:span text:style-name="T351">holds the original action.</text:span></text:p>
      <text:p text:style-name="P163"><text:span text:style-name="T352">ThrownAt</text:span><text:span text:style-name="T353"><text:tab/></text:span><text:span text:style-name="T24">Sent by action </text:span><text:span text:style-name="T354">ThrowAt</text:span><text:span text:style-name="T24"> to the object the<text:line-break/><text:tab/><text:tab/>player tries to throw something at.</text:span></text:p>
      <text:p text:style-name="P164"><text:line-break/></text:p>
      <text:h text:style-name="P64" text:outline-level="1">Object attributes<text:span text:style-name="T355"> (flags)</text:span></text:h>
      <text:p text:style-name="P165"><text:span text:style-name="T355">An attribute is a flag which can be on or off.</text:span><text:span text:style-name="T356"><text:line-break/>[</text:span>OBJ <text:span text:style-name="T356">]</text:span>means this is used for regular object<text:span text:style-name="T356">s</text:span>.<text:line-break/><text:span text:style-name="T356">[</text:span>ROOM<text:span text:style-name="T356">]</text:span> means this is used for rooms.</text:p>
      <text:h text:style-name="Heading_20_2" text:outline-level="2"><text:span text:style-name="T24">a</text:span>bsent [OBJ]</text:h>
      <text:h text:style-name="P166" text:outline-level="6">For object with <text:span text:style-name="T14">found_in</text:span>: Remove<text:span text:style-name="T357">d</text:span> from game for now.</text:h>
      <text:h text:style-name="Heading_20_2" text:outline-level="2"><text:span text:style-name="T24">a</text:span>nimate [OBJ]</text:h>
      <text:h text:style-name="P166" text:outline-level="6">Is a living thing, can be talked to etc.</text:h>
      <text:h text:style-name="Heading_20_2" text:outline-level="2"><text:span text:style-name="T24">c</text:span>lothing [OBJ]</text:h>
      <text:h text:style-name="P166" text:outline-level="6">Can be worn.</text:h>
      <text:h text:style-name="Heading_20_2" text:outline-level="2"><text:span text:style-name="T24">c</text:span>oncealed [OBJ]</text:h>
      <text:h text:style-name="P166" text:outline-level="6"><text:span text:style-name="T358">Is visible but not easy to spot, like a secret door. </text:span>Can be interacted with but is not <text:span text:style-name="T359">printed in room desc</text:span><text:span text:style-name="T358">r</text:span><text:span text:style-name="T359">iption.</text:span></text:h>
      <text:h text:style-name="P167" text:outline-level="2">container<text:span text:style-name="T356"> [OBJ]</text:span></text:h>
      <text:h text:style-name="P168" text:outline-level="6">Objects can be p<text:span text:style-name="T49">ut</text:span> in it and removed from it, if it's <text:span text:style-name="T14">open</text:span>.<text:span text:style-name="T356"> Can't also have </text:span><text:span text:style-name="T360">support</text:span><text:span text:style-name="T361">er</text:span><text:span text:style-name="T356">. Can have </text:span><text:span text:style-name="T361">enterable</text:span><text:span text:style-name="T356">.</text:span></text:h>
      <text:h text:style-name="P167" text:outline-level="2">door<text:span text:style-name="T356"> [OBJ]</text:span></text:h>
      <text:h text:style-name="P169" text:outline-level="6">Is a portal between rooms. Use<text:span text:style-name="T362"> properties</text:span> <text:span text:style-name="T14">door_to</text:span>, <text:span text:style-name="T14">door_dir</text:span> and, unless it's a one-way door, <text:span text:style-name="T14">found_in</text:span>.</text:h>
      <text:h text:style-name="P167" text:outline-level="2">edible<text:span text:style-name="T356"> [OBJ]</text:span></text:h>
      <text:h text:style-name="P170" text:outline-level="6">Can be eaten.</text:h>
      <text:h text:style-name="P167" text:outline-level="2">enterable<text:span text:style-name="T356"> [OBJ]</text:span></text:h>
      <text:h text:style-name="P170" text:outline-level="6"><text:span text:style-name="T49">C</text:span>an<text:span text:style-name="T363"> be</text:span> <text:span text:style-name="T49">entered</text:span>. <text:span text:style-name="T364">Must have</text:span> <text:span text:style-name="T14">container</text:span> or <text:span text:style-name="T14">supporter</text:span>.</text:h>
      <text:h text:style-name="P167" text:outline-level="2">female<text:span text:style-name="T356"> [OBJ]</text:span></text:h>
      <text:h text:style-name="P171" text:outline-level="6">Can be referred to as <text:span text:style-name="T365">she/her</text:span>. Must have <text:span text:style-name="T14">animate</text:span>.</text:h>
      <text:h text:style-name="Heading_20_2" text:outline-level="2">general [OBJ] [<text:span text:style-name="T24">ROOM</text:span>]</text:h>
      <text:h text:style-name="P172" text:outline-level="6">To be used by the game author for whatever they like.</text:h>
      <text:h text:style-name="Heading_20_2" text:outline-level="2">light [OBJ] [<text:span text:style-name="T24">ROOM</text:span>]</text:h>
      <text:h text:style-name="P172" text:outline-level="6">Provides light. For room and container, lights up what's inside as well.<text:span text:style-name="T366"> Note: </text:span><text:span text:style-name="T367">This attribute is not defined if</text:span><text:span text:style-name="T366"> </text:span><text:span text:style-name="T368">OPTIONAL_NO_DARKNESS</text:span><text:span text:style-name="T366"> is defined.</text:span></text:h>
      <text:h text:style-name="P167" text:outline-level="2">lockable<text:span text:style-name="T356"> [OBJ]</text:span></text:h>
      <text:h text:style-name="P173" text:outline-level="6">Can be locked and unlocked, using the object specified by <text:span text:style-name="T14">with_key</text:span> property.</text:h>
      <text:h text:style-name="P167" text:outline-level="2">locked<text:span text:style-name="T356"> [OBJ]</text:span></text:h>
      <text:h text:style-name="P173" text:outline-level="6"><text:span text:style-name="T369">Can't be opened</text:span>.</text:h>
      <text:h text:style-name="P167" text:outline-level="2">moved<text:span text:style-name="T356"> [OBJ]</text:span></text:h>
      <text:h text:style-name="P173" text:outline-level="6">Is or has been held directly by the player.</text:h>
      <text:h text:style-name="P167" text:outline-level="2">neuter<text:span text:style-name="T356"> [OBJ]</text:span></text:h>
      <text:h text:style-name="P173" text:outline-level="6">Can be referred to as "it" (<text:span text:style-name="T49">Main</text:span>ly used for <text:span text:style-name="T14">animate</text:span> objects, as this is default behaviour for non-animates).</text:h>
      <text:h text:style-name="P167" text:outline-level="2">on<text:span text:style-name="T356"> [OBJ]</text:span></text:h>
      <text:h text:style-name="P174" text:outline-level="6">Is currently switched on.<text:span text:style-name="T370"> See </text:span><text:span text:style-name="T371">switchable</text:span><text:span text:style-name="T370"> attribute.</text:span></text:h>
      <text:h text:style-name="P167" text:outline-level="2">open<text:span text:style-name="T356"> [OBJ]</text:span></text:h>
      <text:h text:style-name="P174" text:outline-level="6">For doors and containers: Is currently open.</text:h>
      <text:h text:style-name="P167" text:outline-level="2">openable<text:span text:style-name="T356"> [OBJ]</text:span></text:h>
      <text:h text:style-name="P174" text:outline-level="6"><text:span text:style-name="T49">For doors and containers:</text:span> Can be opened and closed.</text:h>
      <text:h text:style-name="P167" text:outline-level="2">pluralname<text:span text:style-name="T356"> [OBJ]</text:span></text:h>
      <text:h text:style-name="P175" text:outline-level="6"><text:span text:style-name="T49">C</text:span>an be referred to as they/them. </text:h>
      <text:h text:style-name="P167" text:outline-level="2"><text:span text:style-name="T372">p</text:span>roper<text:span text:style-name="T356"> [OBJ]</text:span></text:h>
      <text:h text:style-name="P175" text:outline-level="6">Has a name which should n<text:span text:style-name="T49">ever</text:span> be preceded by an article, like "John".</text:h>
      <text:h text:style-name="P176" text:outline-level="2">reactive [OBJ] [<text:span text:style-name="T24">ROOM</text:span>]<text:span text:style-name="T45"> </text:span><text:span text:style-name="T17">PUNY++</text:span></text:h>
      <text:h text:style-name="P177" text:outline-level="6">The object provides at least one of <text:span text:style-name="T373">add_to_scope</text:span><text:span text:style-name="T374">, </text:span><text:span text:style-name="T14">each_turn</text:span><text:span text:style-name="T375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6">reactive</text:span><text:span text:style-name="T49"> attribute </text:span>is set automatically.</text:h>
      <text:h text:style-name="P167" text:outline-level="2">scenery<text:span text:style-name="T356"> [OBJ]</text:span></text:h>
      <text:h text:style-name="P178" text:outline-level="6">Can't be taken, is not mentioned in room descriptions.</text:h>
      <text:h text:style-name="P179" text:outline-level="2">scored [OBJ] [<text:span text:style-name="T24">ROOM</text:span>]</text:h>
      <text:h text:style-name="P178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7" text:outline-level="2">static<text:span text:style-name="T356"> [OBJ]</text:span></text:h>
      <text:h text:style-name="P178" text:outline-level="6">Can't be taken.</text:h>
      <text:h text:style-name="P167" text:outline-level="2">supporter<text:span text:style-name="T356"> [OBJ]</text:span></text:h>
      <text:h text:style-name="P180" text:outline-level="6">Is a supporter, meaning things can be placed on top of it.<text:span text:style-name="T356"> Can't also have </text:span><text:span text:style-name="T361">container</text:span><text:span text:style-name="T356">. Can have </text:span><text:span text:style-name="T361">enterable</text:span><text:span text:style-name="T356">.</text:span></text:h>
      <text:h text:style-name="P167" text:outline-level="2">switchable<text:span text:style-name="T356"> [OBJ]</text:span></text:h>
      <text:h text:style-name="P181" text:outline-level="6">Can be switched on and off. The <text:span text:style-name="T14">on</text:span> attribute tells its current state.</text:h>
      <text:h text:style-name="P167" text:outline-level="2">talkable<text:span text:style-name="T356"> [OBJ]</text:span></text:h>
      <text:h text:style-name="P182" text:outline-level="6">Can be talked to, even though it's not <text:span text:style-name="T14">animate</text:span>.</text:h>
      <text:h text:style-name="P167" text:outline-level="2">transparent<text:span text:style-name="T356"> [OBJ]</text:span></text:h>
      <text:h text:style-name="P182" text:outline-level="6"><text:span text:style-name="T376">F</text:span><text:span text:style-name="T377">or a </text:span><text:span text:style-name="T378">container</text:span><text:span text:style-name="T377">: </text:span><text:span text:style-name="T376">T</text:span><text:span text:style-name="T377">he contents are visible even if the container is closed. For an </text:span><text:span text:style-name="T379">animate</text:span><text:span text:style-name="T376"> object</text:span><text:span text:style-name="T377">: Held objects are visible to others</text:span><text:span text:style-name="T376">.</text:span><text:span text:style-name="T377"> For other objects: </text:span><text:span text:style-name="T376">O</text:span><text:span text:style-name="T377">bjects that are part of this objects (i.e. are </text:span><text:span text:style-name="T380">inside</text:span><text:span text:style-name="T381"> this object) are visible</text:span><text:span text:style-name="T382">.</text:span></text:h>
      <text:h text:style-name="Heading_20_2" text:outline-level="2">visited [<text:span text:style-name="T24">ROOM</text:span>]</text:h>
      <text:h text:style-name="P183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83" text:outline-level="6"><text:span text:style-name="T49">Temporary internal flag. C</text:span>an be used by game code too.</text:h>
      <text:h text:style-name="P167" text:outline-level="2">worn<text:span text:style-name="T356"> [OBJ]</text:span></text:h>
      <text:h text:style-name="P184" text:outline-level="6"><text:span text:style-name="T377">For object that has </text:span><text:span text:style-name="T378">clothing</text:span><text:span text:style-name="T377">: Is currently being worn.</text:span></text:h>
      <text:h text:style-name="P125" text:outline-level="1">Object properties</text:h>
      <text:p text:style-name="P185"><text:span text:style-name="T383">A property is a 16-bit value or a list of values.</text:span><text:span text:style-name="T384"><text:line-break/>[</text:span><text:span text:style-name="T385">OBJ</text:span><text:span text:style-name="T384">]</text:span><text:span text:style-name="T383"> </text:span><text:span text:style-name="T385">means this is used for regular object</text:span><text:span text:style-name="T384">s</text:span><text:span text:style-name="T385">.<text:line-break/></text:span><text:span text:style-name="T384">[</text:span><text:span text:style-name="T385">ROOM</text:span><text:span text:style-name="T384">]</text:span><text:span text:style-name="T385"> means this is used for rooms.<text:line-break/></text:span><text:span text:style-name="T386">(+) means "additive" - if an object which defines the property inherits from a class which also defines the property, it gets both values.</text:span></text:p>
      <text:h text:style-name="P186" text:outline-level="2">add_to_scope<text:span text:style-name="T356"> [OBJ]</text:span></text:h>
      <text:h text:style-name="P187" text:outline-level="6"><text:span text:style-name="T387">A</text:span> list <text:span text:style-name="T388">of objects that should be added to scope when this object is in scope, or a routine which puts objects in scope using </text:span><text:span text:style-name="T389">ScopeWithin</text:span><text:span text:style-name="T388"> and </text:span><text:span text:style-name="T389">PlaceInScope</text:span><text:span text:style-name="T388">.</text:span></text:h>
      <text:h text:style-name="P186" text:outline-level="2">after [OBJ] [<text:span text:style-name="T24">ROOM</text:span>] (+)</text:h>
      <text:h text:style-name="P188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90"> The routine should return false to continue, telling the player what has happened, or true to stop processing the action and produce no further output.</text:span></text:h>
      <text:h text:style-name="P186" text:outline-level="2">article<text:span text:style-name="T356"> [OBJ]</text:span><text:span text:style-name="T282"> </text:span><text:span text:style-name="T102">~P</text:span><text:span text:style-name="T17">UNY</text:span></text:h>
      <text:h text:style-name="P189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6" text:outline-level="2">before [OBJ] [<text:span text:style-name="T24">ROOM</text:span>] (+)</text:h>
      <text:h text:style-name="P190" text:outline-level="6">Li<text:span text:style-name="T391">ke</text:span> <text:span text:style-name="T14">after</text:span>, but is run before the action happens. Returning true stops the default action from happening at all.</text:h>
      <text:h text:style-name="P186" text:outline-level="2">cant_go [<text:span text:style-name="T24">ROOM</text:span>]</text:h>
      <text:h text:style-name="P188" text:outline-level="6">A string or a routine to print a message<text:span text:style-name="T49">,</text:span> when the player tries to go in a direction where there's no exit.</text:h>
      <text:h text:style-name="P186" text:outline-level="2">capacity<text:span text:style-name="T356"> [OBJ]</text:span><text:span text:style-name="T282"> </text:span><text:span text:style-name="T102">~P</text:span><text:span text:style-name="T17">UNY</text:span></text:h>
      <text:h text:style-name="P191" text:outline-level="6">The maximum number of items that can be in this container, on this supporter or held by this <text:span text:style-name="T392">actor</text:span>. To read the <text:span text:style-name="T49">capacity of an object</text:span>, taking the default capacity into consideration, you must call <text:span text:style-name="T14">ObjectCapacity(object)</text:span>.</text:h>
      <text:h text:style-name="P186" text:outline-level="2">d_to [<text:span text:style-name="T24">ROOM</text:span>]</text:h>
      <text:h text:style-name="P192" text:outline-level="6">Holds a possible exit. The value can be <text:span text:style-name="T393">any of:</text:span></text:h>
      <text:h text:style-name="P192" text:outline-level="6"><text:span text:style-name="T393">* </text:span><text:span text:style-name="T394">false</text:span><text:span text:style-name="T393"> – not an exit<text:line-break/>* </text:span>a room where the exits leads<text:line-break/>* <text:span text:style-name="T393">a door object – the exit leads through this door<text:line-break/></text:span>* a string saying why the player can’t go there<text:line-break/><text:span text:style-name="T393">* </text:span>a routine which either returns <text:span text:style-name="T14">false</text:span>, <text:span text:style-name="T393">a room, a door object</text:span>, or prints <text:span text:style-name="T49">its own</text:span> message and returns <text:span text:style-name="T14">true</text:span>.</text:h>
      <text:h text:style-name="P186" text:outline-level="2">daemon [OBJ] [<text:span text:style-name="T24">ROOM</text:span>]</text:h>
      <text:h text:style-name="P193" text:outline-level="6"><text:span text:style-name="T395">A routine </text:span><text:span text:style-name="T392">that is</text:span><text:span text:style-name="T395"> </text:span><text:span text:style-name="T396">executed</text:span><text:span text:style-name="T395"> every turn</text:span><text:span text:style-name="T397"> once it is started</text:span><text:span text:style-name="T398">. </text:span><text:span text:style-name="T392">Use</text:span><text:span text:style-name="T398"> </text:span><text:span text:style-name="T399">StartDaemon</text:span><text:span text:style-name="T398"> and </text:span><text:span text:style-name="T399">StopDaemon</text:span> to start/stop it.</text:h>
      <text:h text:style-name="P186" text:outline-level="2">describe<text:span text:style-name="T356"> [OBJ]</text:span><text:span text:style-name="T395"> (+)</text:span><text:span text:style-name="T282"> </text:span><text:span text:style-name="T102">~P</text:span><text:span text:style-name="T17">UNY</text:span></text:h>
      <text:h text:style-name="P194" text:outline-level="6">A string or a routine to print a paragraph of text for an object in a room description. If it's a string, <text:span text:style-name="T400">the value 1 or 2,</text:span> or a routine which returns <text:span text:style-name="T400">1 or 2</text:span>, the object won't be further described. <text:span text:style-name="T400">If the value / return value is 2, the library will consider it as if nothing was printed.</text:span> <text:span text:style-name="T401">Not supported for rooms as in DM4. </text:span>Note: Start <text:span text:style-name="T402">and end </text:span>the description with a newline ("^").</text:h>
      <text:h text:style-name="P186" text:outline-level="2">description [OBJ] [<text:span text:style-name="T24">ROOM</text:span>]</text:h>
      <text:h text:style-name="P194" text:outline-level="6">For an object: A string or a routine to print the text the player should get when examining the object.<text:line-break/>For a room: A string or a routine to print the room description.</text:h>
      <text:h text:style-name="P186" text:outline-level="2">door_dir<text:span text:style-name="T356"> [OBJ]</text:span><text:span text:style-name="T282"> </text:span><text:span text:style-name="T102">~P</text:span><text:span text:style-name="T17">UNY</text:span></text:h>
      <text:h text:style-name="P194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6" text:outline-level="2">door_to<text:span text:style-name="T356"> [OBJ]</text:span><text:span text:style-name="T282"> </text:span><text:span text:style-name="T102">~P</text:span><text:span text:style-name="T17">UNY</text:span></text:h>
      <text:h text:style-name="P194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6">to</text:span> can be <text:span text:style-name="T49">omitted</text:span>.</text:h>
      <text:h text:style-name="P186" text:outline-level="2">e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each_turn [OBJ] [<text:span text:style-name="T24">ROOM</text:span>] (+)</text:h>
      <text:h text:style-name="P195" text:outline-level="6">A routine which is executed every turn when the object is in scope.</text:h>
      <text:h text:style-name="P186" text:outline-level="2">found_in<text:span text:style-name="T356"> [OBJ]</text:span></text:h>
      <text:h text:style-name="P195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6" text:outline-level="2">grammar [OBJ] <text:span text:style-name="T102">~P</text:span><text:span text:style-name="T17">UNY</text:span></text:h>
      <text:h text:style-name="P197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403">Return </text:span><text:span text:style-name="T404">true</text:span><text:span text:style-name="T403"> if routine has parsed all input and set up </text:span><text:span text:style-name="T404">action</text:span><text:span text:style-name="T403">, </text:span><text:span text:style-name="T404">noun</text:span><text:span text:style-name="T403"> and </text:span><text:span text:style-name="T404">second</text:span><text:span text:style-name="T403">. Return 'verb' </text:span><text:span text:style-name="T400">and set </text:span><text:span text:style-name="T405">parser_one = 1</text:span><text:span text:style-name="T403"> to use this verb's grammar instead, or </text:span><text:span text:style-name="T400">return </text:span><text:span text:style-name="T403">-'verb' </text:span><text:span text:style-name="T400">and set </text:span><text:span text:style-name="T405">parser_one = -1</text:span><text:span text:style-name="T403"> to use this verb's grammar but fall back to the verb in player input if parsing fails. Return </text:span><text:span text:style-name="T404">false</text:span><text:span text:style-name="T403"> to parse as usual.</text:span></text:h>
      <text:h text:style-name="P186" text:outline-level="2">in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initial [OBJ] [<text:span text:style-name="T24">ROOM</text:span>]</text:h>
      <text:h text:style-name="P198" text:outline-level="6">For an object: A string or a routine to <text:span text:style-name="T406">describe</text:span> the object before it's been picked up.<text:span text:style-name="T407"> Note: For doors/containers and switchable objects, use </text:span><text:span text:style-name="T408">when_open</text:span><text:span text:style-name="T407"> + </text:span><text:span text:style-name="T408">when_closed</text:span><text:span text:style-name="T407"> and </text:span><text:span text:style-name="T408">when_on</text:span><text:span text:style-name="T407"> + </text:span><text:span text:style-name="T408">when_off</text:span><text:span text:style-name="T407"> respectively. </text:span><text:line-break/>For a <text:span text:style-name="T49">room</text:span>: A string or a routine to print a text when the player enters the room.</text:h>
      <text:h text:style-name="P186" text:outline-level="2">inside_description<text:span text:style-name="T356"> [OBJ]</text:span></text:h>
      <text:h text:style-name="P199" text:outline-level="6">For a<text:span text:style-name="T409">n enterable object</text:span>: A string or a routine <text:span text:style-name="T49">that will </text:span><text:span text:style-name="T409">printed/run</text:span> when the player is in<text:span text:style-name="T409">/on the object</text:span>.</text:h>
      <text:h text:style-name="P186" text:outline-level="2">invent<text:span text:style-name="T356"> [OBJ]</text:span></text:h>
      <text:h text:style-name="P200" text:outline-level="6">A routine to print the object in a list (typically in player inventory or a room description). First the routine is called before the object name has been printed<text:span text:style-name="T410">, </text:span>with <text:span text:style-name="T14">inventory_stage</text:span> set to 1.<text:span text:style-name="T410"> Then </text:span><text:span text:style-name="T411">it'</text:span><text:span text:style-name="T410">s called again when the object name has been printed but no additional information (e.g. "(providing light)"), with </text:span><text:span text:style-name="T14">inventory_stage</text:span> set to <text:span text:style-name="T410"><text:s/>2.<text:line-break/>For both calls, </text:span><text:span text:style-name="T411">t</text:span><text:span text:style-name="T410">he routine should return </text:span><text:span text:style-name="T412">false</text:span><text:span text:style-name="T410"> to continue or </text:span><text:span text:style-name="T412">true</text:span><text:span text:style-name="T410"> to stop all further output.</text:span></text:h>
      <text:h text:style-name="P186" text:outline-level="2"><text:span text:style-name="T413">l</text:span>ife<text:span text:style-name="T356"> [OBJ]</text:span><text:span text:style-name="T395"> (+)</text:span></text:h>
      <text:h text:style-name="P201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oft-page-break/>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14">Can be a string instead of a routine.</text:span></text:h>
      <text:h text:style-name="P202" text:outline-level="2"><text:span text:style-name="T415">list_together</text:span> [<text:span text:style-name="T415">OBJ</text:span>]<text:span text:style-name="T416"> </text:span><text:span text:style-name="T102">~P</text:span><text:span text:style-name="T17">UNY</text:span></text:h>
      <text:h text:style-name="P203" text:outline-level="6"><text:span text:style-name="T417">Objects that have the same value are listed together in object listings</text:span><text:span text:style-name="T413">.</text:span><text:span text:style-name="T416"> Set to a low number to print them adjacent to each other, a string to print them as a group, or (advanced) a routine to handle the printing yourself. Can't handle identical objects. Requires </text:span><text:span text:style-name="T418">OPTIONAL_LIST_TOGETHER</text:span><text:span text:style-name="T416">. </text:span></text:h>
      <text:h text:style-name="P202" text:outline-level="2">n_to [<text:span text:style-name="T24">ROOM</text:span>]</text:h>
      <text:h text:style-name="P204" text:outline-level="6"><text:span text:style-name="T49">An exit</text:span> property. See <text:span text:style-name="T14">d_to</text:span>.</text:h>
      <text:h text:style-name="P202" text:outline-level="2">name [<text:span text:style-name="T24">OBJ</text:span>] [<text:span text:style-name="T24">ROOM</text:span>]</text:h>
      <text:h text:style-name="P201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6" text:outline-level="2">ne_to [<text:span text:style-name="T24">ROOM</text:span>]</text:h>
      <text:h text:style-name="P192" text:outline-level="6"><text:span text:style-name="T49">An exit</text:span> property. See <text:span text:style-name="T14">d_to</text:span>. Requires <text:span text:style-name="T14">OPTIONAL_FULL_DIRECTIONS</text:span> to work.</text:h>
      <text:h text:style-name="P186" text:outline-level="2">nw_to [<text:span text:style-name="T24">ROOM</text:span>]</text:h>
      <text:h text:style-name="P192" text:outline-level="6"><text:span text:style-name="T49">An exit</text:span> property. See <text:span text:style-name="T14">d_to</text:span>. Requires <text:span text:style-name="T14">OPTIONAL_FULL_DIRECTIONS</text:span> to work.</text:h>
      <text:h text:style-name="P186" text:outline-level="2">orders<text:span text:style-name="T356"> [OBJ]</text:span></text:h>
      <text:h text:style-name="P205" text:outline-level="6">For <text:span text:style-name="T14">animate</text:span> or <text:span text:style-name="T14">talkable</text:span> objects: A routine to carry out the player's orders<text:span text:style-name="T419"> or decline to do so</text:span>. <text:span text:style-name="T419">The routine should either return </text:span><text:span text:style-name="T420">false</text:span><text:span text:style-name="T419">, or print a message and return </text:span><text:span text:style-name="T420">true</text:span><text:span text:style-name="T419"> to stop further processing. </text:span><text:span text:style-name="T49">T</text:span>he player object's <text:span text:style-name="T14">orders</text:span> routine is called first<text:span text:style-name="T419">, and then</text:span> the addressed object's <text:span text:style-name="T14">orders</text:span> routine is called.</text:h>
      <text:h text:style-name="P186" text:outline-level="2">out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parse_name<text:span text:style-name="T356"> [OBJ]</text:span></text:h>
      <text:h text:style-name="P206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21"> or </text:span><text:span text:style-name="T422">-1</text:span><text:span text:style-name="T421"> to say it chooses not to decide</text:span><text:span text:style-name="T423"> (i.e. the </text:span><text:span text:style-name="T424">name</text:span><text:span text:style-name="T423"> property will be consulted, if provided)</text:span>.</text:h>
      <text:h text:style-name="P186" text:outline-level="2">react_after<text:span text:style-name="T356"> [OBJ]</text:span></text:h>
      <text:h text:style-name="P206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6" text:outline-level="2">react_before<text:span text:style-name="T356"> [OBJ]</text:span></text:h>
      <text:h text:style-name="P206" text:outline-level="6"><text:span text:style-name="T49">L</text:span>ike <text:span text:style-name="T236">before</text:span>, but re<text:span text:style-name="T49">ceives</text:span> all actions taking place when this object is in scope.</text:h>
      <text:h text:style-name="P186" text:outline-level="2">s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se_to [<text:span text:style-name="T24">ROOM</text:span>]</text:h>
      <text:h text:style-name="P192" text:outline-level="6"><text:span text:style-name="T49">An exit</text:span> property. See <text:span text:style-name="T14">d_to</text:span>. Requires <text:span text:style-name="T14">OPTIONAL_FULL_DIRECTIONS</text:span> to work.</text:h>
      <text:h text:style-name="P186" text:outline-level="2">short_name<text:span text:style-name="T356"> [OBJ]</text:span></text:h>
      <text:h text:style-name="P207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25">Sometimes it's useful to print a prefix (e.g. an adjective) and return </text:span><text:span text:style-name="T426">false</text:span><text:span text:style-name="T425">.</text:span></text:h>
      <text:h text:style-name="P186" text:outline-level="2">sw_to [<text:span text:style-name="T24">ROOM</text:span>]</text:h>
      <text:h text:style-name="P192" text:outline-level="6"><text:span text:style-name="T49">An exit</text:span> property. See <text:span text:style-name="T14">d_to</text:span>. Requires <text:span text:style-name="T14">OPTIONAL_FULL_DIRECTIONS</text:span> to work.</text:h>
      <text:h text:style-name="P186" text:outline-level="2">time_left [OBJ] [<text:span text:style-name="T24">ROOM</text:span>]</text:h>
      <text:h text:style-name="P207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27">will be</text:span> called.<text:line-break/><text:span text:style-name="T425">For other objects/rooms: Use it as a general variable.</text:span></text:h>
      <text:h text:style-name="P186" text:outline-level="2">time_out [OBJ] [<text:span text:style-name="T24">ROOM</text:span>] (+)</text:h>
      <text:h text:style-name="P207" text:outline-level="6">A routine to be called <text:span text:style-name="T428">when a timer times out</text:span><text:span text:style-name="T429">. Start the countdown with </text:span><text:span text:style-name="T430">StartTimer(object, turns)</text:span><text:span text:style-name="T429">. <text:s/></text:span></text:h>
      <text:h text:style-name="P186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8" text:outline-level="6"><text:span text:style-name="T431">A number that d</text:span>etermines when this object’s <text:span text:style-name="T14">timer</text:span>/<text:span text:style-name="T14">daemon</text:span> executes relative to other timers/daemons. The lower the earlier. <text:span text:style-name="T432">Objects that don’t provide it have the value 100. Requires </text:span><text:span text:style-name="T433">OPTIONAL_ORDERED_TIMERS</text:span><text:span text:style-name="T432">.</text:span></text:h>
      <text:h text:style-name="P186" text:outline-level="2">u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w_to [<text:span text:style-name="T24">ROOM</text:span>]</text:h>
      <text:h text:style-name="P192" text:outline-level="6"><text:span text:style-name="T49">An exit</text:span> property. See <text:span text:style-name="T14">d_to</text:span>.</text:h>
      <text:h text:style-name="P186" text:outline-level="2">when_closed<text:span text:style-name="T356"> [OBJ]</text:span></text:h>
      <text:h text:style-name="P209" text:outline-level="6">For doors <text:span text:style-name="T49">and</text:span> containers: A string or routine to describe the object when it's closed.</text:h>
      <text:h text:style-name="P186" text:outline-level="2">when_off<text:span text:style-name="T356"> [OBJ]</text:span></text:h>
      <text:h text:style-name="P209" text:outline-level="6">For a switchable object: A string or routine to describe the object when it's <text:span text:style-name="T49">off</text:span>.</text:h>
      <text:h text:style-name="P186" text:outline-level="2">when_on<text:span text:style-name="T356"> [OBJ]</text:span></text:h>
      <text:h text:style-name="P209" text:outline-level="6">Like <text:span text:style-name="T14">when_off</text:span>, but for when it's on.<text:span text:style-name="T407"> </text:span><text:span text:style-name="T49">Not used if </text:span><text:span text:style-name="T434">the object</text:span> has <text:span text:style-name="T14">moved</text:span>.</text:h>
      <text:h text:style-name="P186" text:outline-level="2">when_open<text:span text:style-name="T356"> [OBJ]</text:span></text:h>
      <text:h text:style-name="P209" text:outline-level="6">Like <text:span text:style-name="T14">when</text:span><text:span text:style-name="T236">_</text:span><text:span text:style-name="T14">closed</text:span>, but for when it's open.<text:span text:style-name="T407"> </text:span><text:span text:style-name="T49">Not used if </text:span><text:span text:style-name="T434">the object</text:span> has <text:span text:style-name="T14">moved</text:span>.</text:h>
      <text:h text:style-name="P186" text:outline-level="2">with_key<text:span text:style-name="T356"> [OBJ]</text:span><text:span text:style-name="T282"> </text:span><text:span text:style-name="T102">~P</text:span><text:span text:style-name="T17">UNY</text:span></text:h>
      <text:h text:style-name="P210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35">the object held in </text:span><text:span text:style-name="T14">second</text:span> <text:span text:style-name="T49">works as a key</text:span>.</text:h>
      <text:p text:style-name="P211"/>
      <text:h text:style-name="P212" text:outline-level="1">About this document</text:h>
      <text:p text:style-name="P213"><text:span text:style-name="T436">This is</text:span><text:span text:style-name="T437"> meant to </text:span><text:span text:style-name="T438">be printed out and </text:span><text:span text:style-name="T437">serve as a quick index to all the functionality that the PunyInform library provides. </text:span><text:span text:style-name="T439">A similar</text:span><text:span text:style-name="T437"> document for the Inform 6 language is Inform in Four Minutes, available at http://www.firthworks.com/roger/</text:span><text:span text:style-name="T440"><text:line-break/><text:line-break/></text:span><text:span text:style-name="T441">T</text:span><text:span text:style-name="T442">his is not</text:span><text:span text:style-name="T443"> </text:span><text:span text:style-name="T444">meant to be </text:span><text:span text:style-name="T24">a</text:span><text:span text:style-name="T445"> document from which to learn PunyInform, a replacement for </text:span><text:span text:style-name="T446">The </text:span><text:span text:style-name="T445">Inform Designer's Manual, </text:span><text:span text:style-name="T447">Four</text:span><text:span text:style-name="T445">th Edition (DM4) or th</text:span><text:span text:style-name="T443">e</text:span><text:span text:style-name="T445"> PunyInform manual and tutorials. To keep it short, this document</text:span><text:span text:style-name="T448"> </text:span><text:span text:style-name="T445">leave</text:span><text:span text:style-name="T448">s</text:span><text:span text:style-name="T445"> out </text:span><text:span text:style-name="T448">finer </text:span><text:span text:style-name="T445">details. Always consult DM4 and/or the PunyInform manual to get the full picture (See Legend below).</text:span><text:span text:style-name="T440"><text:line-break/><text:line-break/></text:span><text:span text:style-name="T449">C</text:span><text:span text:style-name="T440">reated and </text:span><text:span text:style-name="T449">maintain</text:span><text:span text:style-name="T440">ed by Fredrik Ramsberg</text:span><text:span text:style-name="T450">. Improvement suggestions by Garry Francis</text:span><text:span text:style-name="T451">,</text:span><text:span text:style-name="T450"> Johan Berntsson</text:span><text:span text:style-name="T451"> and Nick Moffitt</text:span><text:span text:style-name="T450">.</text:span><text:span text:style-name="T440"><text:line-break/><text:line-break/>Based on InfoLib at Your Fingertips by Roger Firth.</text:span></text:p>
      <text:p text:style-name="P214">Legend</text:p>
      <text:p text:style-name="P215"><text:span text:style-name="T440">Items marked </text:span><text:span text:style-name="T452">PUNY++</text:span><text:span text:style-name="T440"> are</text:span><text:span text:style-name="T453">n't</text:span><text:span text:style-name="T440"> </text:span><text:span text:style-name="T453">described in DM4</text:span><text:span text:style-name="T440">. </text:span><text:span text:style-name="T454">Items marked </text:span><text:span text:style-name="T455">~</text:span><text:span text:style-name="T452">PUNY</text:span><text:span text:style-name="T454"> don't work exactly as described in DM4. </text:span><text:span text:style-name="T440">See PunyInform manual</text:span><text:span text:style-name="T454"> for details on these items</text:span><text:span text:style-name="T44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6-06-12T11:23:33.050870900</dc:date>
    <meta:editing-duration>P28DT15H57M42S</meta:editing-duration>
    <meta:editing-cycles>194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7" meta:word-count="5693" meta:character-count="36020" meta:non-whitespace-character-count="30767"/>
  </office:meta>
</office:document-meta>
</file>